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9D12E7F.png" manifest:media-type="image/png"/>
  <manifest:file-entry manifest:full-path="Pictures/1000000100000100000001000AC5B597.png" manifest:media-type="image/png"/>
  <manifest:file-entry manifest:full-path="Pictures/1000000100000100000001001221C892.png" manifest:media-type="image/png"/>
  <manifest:file-entry manifest:full-path="Pictures/100000010000010000000100A43C8061.png" manifest:media-type="image/png"/>
  <manifest:file-entry manifest:full-path="Pictures/1000000100000100000001009D4045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ec4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d4a84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24365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162236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20%" loext:shadow-blur="0.141cm" loext:decorative="false"/>
    </style:style>
    <style:style style:name="gr4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303cm" fo:min-width="20.836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62cm" fo:min-width="6.866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62cm" fo:min-width="6.501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62cm" fo:min-width="6.864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2ec4b6"/>
      <style:paragraph-properties fo:text-align="start"/>
      <style:text-properties fo:font-size="18pt"/>
    </style:style>
    <style:style style:name="P2" style:family="paragraph">
      <loext:graphic-properties draw:fill="solid" draw:fill-color="#d4a843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1a2940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243652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28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16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17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18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19" style:family="paragraph">
      <loext:graphic-properties draw:fill="solid" draw:fill-color="#162236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.282cm" fo:line-height="150%" fo:text-align="justify" fo:text-indent="0cm" style:punctuation-wrap="hanging" loext:tab-stop-distance="2.54cm" style:writing-mode="lr-tb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1" style:family="paragraph">
      <loext:graphic-properties draw:fill="none"/>
      <style:paragraph-properties fo:margin-left="0cm" fo:margin-right="0cm" fo:margin-top="0cm" fo:margin-bottom="0.282cm" fo:line-height="150%" fo:text-align="justify" fo:text-indent="0cm" style:punctuation-wrap="hanging" loext:tab-stop-distance="2.54cm" style:font-independent-line-spacing="true">
        <style:tab-stops/>
      </style:paragraph-properties>
      <style:text-properties style:font-name="LM Sans Quot 8" fo:font-size="14pt" style:font-size-asian="14pt" style:font-size-complex="14pt" fo:hyphenate="false"/>
    </style:style>
    <style:style style:name="P22" style:family="paragraph"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23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24" style:family="paragraph">
      <style:paragraph-properties fo:margin-left="0cm" fo:margin-right="0cm" fo:margin-top="0cm" fo:margin-bottom="0.282cm" fo:line-height="100%" fo:text-align="justify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25" style:family="paragraph">
      <loext:graphic-properties draw:fill="none"/>
      <style:paragraph-properties fo:margin-left="0cm" fo:margin-right="0cm" fo:margin-top="0cm" fo:margin-bottom="0.282cm" fo:line-height="100%" fo:text-align="justify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P26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Unslanted 10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Roman Unslanted 10" fo:font-size="18pt" fo:hyphenate="false"/>
    </style:style>
    <style:style style:name="P28" style:family="paragraph">
      <style:paragraph-properties fo:margin-left="0cm" fo:margin-right="0cm" fo:margin-top="0cm" fo:margin-bottom="0.212cm" fo:line-height="150%" fo:text-align="start" fo:text-indent="0cm" style:punctuation-wrap="hanging" loext:tab-stop-distance="2.54cm" style:writing-mode="lr-tb">
        <style:tab-stops/>
      </style:paragraph-properties>
      <style:text-properties style:font-name="LM Sans Quot 8" fo:hyphenate="false"/>
    </style:style>
    <style:style style:name="P29" style:family="paragraph">
      <loext:graphic-properties draw:fill="none"/>
      <style:paragraph-properties fo:margin-left="0cm" fo:margin-right="0cm" fo:margin-top="0cm" fo:margin-bottom="0.212cm" fo:line-height="150%" fo:text-align="start" fo:text-indent="0cm" style:punctuation-wrap="hanging" loext:tab-stop-distance="2.54cm" style:font-independent-line-spacing="true">
        <style:tab-stops/>
      </style:paragraph-properties>
      <style:text-properties style:font-name="LM Sans Quot 8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4" style:family="text">
      <style:text-properties fo:font-variant="normal" fo:text-transform="none" fo:color="#a8b8c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7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9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" style:font-size-complex="15pt" style:font-style-complex="normal" style:font-weight-complex="bold"/>
    </style:style>
    <style:style style:name="T10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name-asian="Calibri2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name-asian="Calibri2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14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5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16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17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4pt" fo:letter-spacing="normal" fo:language="en" fo:country="US" fo:font-style="normal" style:text-underline-style="none" fo:font-weight="bold" fo:background-color="transparent" style:font-name-asian="Georgia1" style:font-size-asian="24pt" style:font-style-asian="normal" style:font-weight-asian="bold" style:font-name-complex="Georgia" style:font-size-complex="24pt" style:font-style-complex="normal" style:font-weight-complex="bold"/>
    </style:style>
    <style:style style:name="T18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LM Sans Quot 8" fo:font-size="14pt" fo:letter-spacing="normal" fo:language="en" fo:country="US" fo:font-style="italic" style:text-underline-style="none" fo:font-weight="bold" fo:background-color="transparent" style:font-name-asian="Calibri2" style:font-size-asian="14pt" style:font-style-asian="italic" style:font-weight-asian="bold" style:font-name-complex="Calibri" style:font-size-complex="14pt" style:font-style-complex="italic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italic" style:text-underline-style="none" fo:font-weight="bold" fo:background-color="transparent" style:font-name-asian="Georgia1" style:font-size-asian="32pt" style:font-style-asian="italic" style:font-weight-asian="bold" style:font-name-complex="Georgia" style:font-size-complex="32pt" style:font-style-complex="italic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21" style:family="text">
      <style:text-properties fo:font-variant="normal" fo:text-transform="none" fo:color="#cbd5e1" loext:opacity="100%" style:text-outline="false" style:text-line-through-style="none" style:text-line-through-type="none" style:text-position="0% 100%" style:font-name="MathJax_Typewriter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3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4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LM Roman Unslanted 10" fo:font-size="14pt" fo:letter-spacing="normal" fo:language="en" fo:country="US" fo:font-style="italic" style:text-underline-style="none" fo:font-weight="normal" fo:background-color="transparent" style:font-name-asian="Georgia1" style:font-size-asian="14pt" style:font-style-asian="italic" style:font-weight-asian="normal" style:font-name-complex="Georgia" style:font-size-complex="14pt" style:font-style-complex="italic" style:font-weight-complex="normal"/>
    </style:style>
    <style:style style:name="T25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26" style:family="text">
      <style:text-properties fo:font-variant="normal" fo:text-transform="none" fo:color="#d4a84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7" style:family="text">
      <style:text-properties fo:font-variant="normal" fo:text-transform="none" fo:color="#8899aa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ec4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4a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8b8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bd5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99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OpenSymbol" fo:color="#cbd5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)" style:num-format="a">
        <style:list-level-properties text:min-label-width="0.953cm"/>
        <style:text-properties fo:color="#cbd5e1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>
        <style:list-level-properties text:min-label-width="0.953cm"/>
        <style:text-properties fo:color="#cbd5e1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0.304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01cm" svg:x="0cm" svg:y="9.6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1.589cm" svg:height="2.539cm" svg:x="2.032cm" svg:y="2.54cm">
          <text:p text:style-name="P3"><text:span text:style-name="T1">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1.589cm" svg:height="1.523cm" svg:x="2.032cm" svg:y="5.334cm">
          <text:p text:style-name="P3"><text:span text:style-name="T2">Capítulo 4 — Ambientes de Desenvolvim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21.589cm" svg:height="1.269cm" svg:x="2.032cm" svg:y="7.239cm">
          <text:p text:style-name="P3"><text:span text:style-name="T3">Aula 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21.589cm" svg:height="1.587cm" svg:x="2.032cm" svg:y="12.7cm">
          <text:p text:style-name="P3"><text:span text:style-name="T4">Universidade Santa Amaro — UNIS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4" draw:layer="layout" svg:width="22.351cm" svg:height="2.031cm" svg:x="1.524cm" svg:y="0.127cm">
          <text:p text:style-name="P3"><text:span text:style-name="T6">O que veremos hoj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1.066cm" svg:height="1.066cm" svg:x="2.032cm" svg:y="3.04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0" draw:text-style-name="P10" draw:layer="layout" svg:width="1.066cm" svg:height="1.066cm" svg:x="2.032cm" svg:y="3.048cm">
          <text:p text:style-name="P9"><text:span text:style-name="T7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4" draw:layer="layout" svg:width="19.811cm" svg:height="1.066cm" svg:x="3.683cm" svg:y="3.048cm">
          <text:p text:style-name="P3"><text:span text:style-name="T8">Características de uma linguagem 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66cm" svg:height="1.066cm" svg:x="2.032cm" svg:y="4.62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2" draw:text-style-name="P10" draw:layer="layout" svg:width="1.066cm" svg:height="1.066cm" svg:x="2.032cm" svg:y="4.623cm">
          <text:p text:style-name="P9"><text:span text:style-name="T7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" draw:text-style-name="P4" draw:layer="layout" svg:width="19.811cm" svg:height="1.066cm" svg:x="3.683cm" svg:y="4.623cm">
          <text:p text:style-name="P3"><text:span text:style-name="T8">A linguagem C como base históric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066cm" svg:height="1.066cm" svg:x="2.032cm" svg:y="6.1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4" draw:text-style-name="P10" draw:layer="layout" svg:width="1.066cm" svg:height="1.066cm" svg:x="2.032cm" svg:y="6.198cm">
          <text:p text:style-name="P9"><text:span text:style-name="T7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4" draw:layer="layout" svg:width="19.811cm" svg:height="1.066cm" svg:x="3.683cm" svg:y="6.198cm">
          <text:p text:style-name="P3"><text:span text:style-name="T8">O que é uma IDE? Compiladores e ferrament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1.066cm" svg:height="1.066cm" svg:x="2.032cm" svg:y="7.7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6" draw:text-style-name="P10" draw:layer="layout" svg:width="1.066cm" svg:height="1.066cm" svg:x="2.032cm" svg:y="7.772cm">
          <text:p text:style-name="P9"><text:span text:style-name="T7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" draw:text-style-name="P4" draw:layer="layout" svg:width="19.811cm" svg:height="1.066cm" svg:x="3.683cm" svg:y="7.772cm">
          <text:p text:style-name="P3"><text:span text:style-name="T8">IDE NetBeans — história e recurs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066cm" svg:height="1.066cm" svg:x="2.032cm" svg:y="9.3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8" draw:text-style-name="P10" draw:layer="layout" svg:width="1.066cm" svg:height="1.066cm" svg:x="2.032cm" svg:y="9.347cm">
          <text:p text:style-name="P9"><text:span text:style-name="T7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9" draw:text-style-name="P4" draw:layer="layout" svg:width="19.811cm" svg:height="1.066cm" svg:x="3.683cm" svg:y="9.347cm">
          <text:p text:style-name="P3"><text:span text:style-name="T8">IDE Eclipse e IDE Visual Stud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" draw:text-style-name="P2" draw:layer="layout" svg:width="1.066cm" svg:height="1.066cm" svg:x="2.032cm" svg:y="10.92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20" draw:text-style-name="P10" draw:layer="layout" svg:width="1.066cm" svg:height="1.066cm" svg:x="2.032cm" svg:y="10.922cm">
          <text:p text:style-name="P9"><text:span text:style-name="T7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" draw:text-style-name="P4" draw:layer="layout" svg:width="19.811cm" svg:height="1.066cm" svg:x="3.683cm" svg:y="10.922cm">
          <text:p text:style-name="P3"><text:span text:style-name="T9">Dinâmicas &amp; Atividades prátic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22" draw:style-name="gr2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3" draw:text-style-name="P12" draw:layer="layout" svg:width="2.539cm" svg:height="1.079cm" svg:x="21.59cm" svg:y="13.208cm">
          <text:p text:style-name="P11"><text:span text:style-name="T10">2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9D404509.png" xlink:type="simple" xlink:show="embed" xlink:actuate="onLoad" draw:mime-type="image/png">
            <text:p/>
          </draw:image>
          <svg:desc>preencoded.png</svg:desc>
        </draw:frame>
        <draw:custom-shape draw:name="Text 2" draw:style-name="gr26" draw:text-style-name="P4" draw:layer="layout" svg:width="18.287cm" svg:height="1.777cm" svg:x="5.08cm" svg:y="4.064cm">
          <text:p text:style-name="P3"><text:span text:style-name="T11">4.1 Linguagens 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" draw:text-style-name="P4" draw:layer="layout" svg:width="18.287cm" svg:height="1.523cm" svg:x="5.08cm" svg:y="6.096cm">
          <text:p text:style-name="P3"><text:span text:style-name="T12">O que uma linguagem precisa ter para suportar OO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2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9" draw:text-style-name="P12" draw:layer="layout" svg:width="2.539cm" svg:height="1.079cm" svg:x="21.59cm" svg:y="13.208cm">
          <text:p text:style-name="P11"><text:span text:style-name="T10">3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4" draw:layer="layout" svg:width="22.351cm" svg:height="2.031cm" svg:x="1.524cm" svg:y="0.127cm">
          <text:p text:style-name="P3"><text:span text:style-name="T13">Requisitos de uma linguagem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16" draw:layer="layout" svg:width="21.335cm" svg:height="9.651cm" svg:x="2.032cm" svg:y="3.048cm">
          <text:list text:style-name="L10">
            <text:list-item>
              <text:p text:style-name="P15"><text:span text:style-name="T14">Deve oferecer suporte obrigatório a: encapsulamento, herança e polimorfismo;</text:span></text:p>
            </text:list-item>
            <text:list-item>
              <text:p text:style-name="P15"><text:span text:style-name="T14">A abstração é representada pela possibilidade de criar classes e trocar mensagens entre objetos;</text:span></text:p>
            </text:list-item>
            <text:list-item>
              <text:p text:style-name="P15"><text:span text:style-name="T14">Os 4 princípios devem ser considerados desde a análise de requisitos junto ao cliente;</text:span></text:p>
            </text:list-item>
            <text:list-item>
              <text:p text:style-name="P15"><text:span text:style-name="T14">A maioria das linguagens atuais é multi-paradigma — aceita mais de um estilo de programação;</text:span></text:p>
            </text:list-item>
            <text:list-item>
              <text:p text:style-name="P15"><text:span text:style-name="T14">Exemplos com suporte pleno a OO: </text:span><text:span text:style-name="T15">Java</text:span><text:span text:style-name="T14">, </text:span><text:span text:style-name="T15">C#</text:span><text:span text:style-name="T14">, </text:span><text:span text:style-name="T15">C++</text:span><text:span text:style-name="T14">, </text:span><text:span text:style-name="T15">Python</text:span><text:span text:style-name="T14">, </text:span><text:span text:style-name="T15">Ruby</text:span><text:span text:style-name="T14">, </text:span><text:span text:style-name="T15">PHP</text:span><text:span text:style-name="T14">, </text:span><text:span text:style-name="T15">VB.NET</text:span><text:span text:style-name="T14">, </text:span><text:span text:style-name="T15">Object Pascal</text:span><text:span text:style-name="T14">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12" draw:layer="layout" svg:width="2.539cm" svg:height="1.079cm" svg:x="21.59cm" svg:y="13.208cm">
          <text:p text:style-name="P11"><text:span text:style-name="T10">4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" draw:text-style-name="P4" draw:layer="layout" svg:width="22.351cm" svg:height="2.031cm" svg:x="1.524cm" svg:y="0.127cm">
          <text:p text:style-name="P3"><text:span text:style-name="T13">A linguagem C: mãe das linguagens 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5" draw:text-style-name="P18" draw:layer="layout" svg:width="21.335cm" svg:height="9.651cm" svg:x="2.032cm" svg:y="2.548cm">
          <text:list text:style-name="L10">
            <text:list-item>
              <text:p text:style-name="P17"><text:span text:style-name="T14">A linguagem </text:span><text:span text:style-name="T15">C</text:span><text:span text:style-name="T14"> não é OO — é a maior representante da programação estruturada;</text:span></text:p>
            </text:list-item>
            <text:list-item>
              <text:p text:style-name="P17"><text:span text:style-name="T14">Porém, inspirou diversas linguagens OO: </text:span><text:span text:style-name="T15">Java</text:span><text:span text:style-name="T14">, </text:span><text:span text:style-name="T15">C#</text:span><text:span text:style-name="T14">, </text:span><text:span text:style-name="T15">C++</text:span><text:span text:style-name="T14">, </text:span><text:span text:style-name="T15">Objective-C</text:span><text:span text:style-name="T14">;</text:span></text:p>
            </text:list-item>
            <text:list-item>
              <text:p text:style-name="P17"><text:span text:style-name="T14">Linguagem de 3ª geração (alto nível), criada no início da década de 1970;</text:span></text:p>
            </text:list-item>
            <text:list-item>
              <text:p text:style-name="P17"><text:span text:style-name="T14">Compilador </text:span><text:span text:style-name="T15">C</text:span><text:span text:style-name="T14"> era distribuído com sistemas </text:span><text:span text:style-name="T15">Unix</text:span><text:span text:style-name="T14"> e tinha fácil portabilidade de </text:span><text:span text:style-name="T15">hardware</text:span><text:span text:style-name="T14">;</text:span></text:p>
            </text:list-item>
            <text:list-item>
              <text:p text:style-name="P17"><text:span text:style-name="T14">Rapidamente se tornou popular, servindo de base sintática para linguagens atuais;</text:span></text:p>
            </text:list-item>
            <text:list-item>
              <text:p text:style-name="P17"><text:span text:style-name="T15">Java</text:span><text:span text:style-name="T14"> e </text:span><text:span text:style-name="T15">C#</text:span><text:span text:style-name="T14"> herdam a estrutura de sintaxe do </text:span><text:span text:style-name="T15">C</text:span><text:span text:style-name="T14"> — quem aprende uma, facilita nas outra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3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7" draw:text-style-name="P12" draw:layer="layout" svg:width="2.539cm" svg:height="1.079cm" svg:x="21.59cm" svg:y="13.208cm">
          <text:p text:style-name="P11"><text:span text:style-name="T10">5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" draw:text-style-name="P4" draw:layer="layout" svg:width="22.351cm" svg:height="1.777cm" svg:x="1.524cm" svg:y="0.762cm">
          <text:p text:style-name="P3"><text:span text:style-name="T16">Dinâmica 1 — Linguagem é OO ou não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0" draw:text-style-name="P18" draw:layer="layout" svg:width="20.319cm" svg:height="8.127cm" svg:x="2.54cm" svg:y="2.756cm">
          <text:list text:style-name="L10">
            <text:list-item>
              <text:p text:style-name="P17"><text:span text:style-name="T14">Em duplas, analisem a lista de linguagens abaixo e classifiquem:</text:span></text:p>
              <text:list>
                <text:list-item>
                  <text:p text:style-name="P17"><text:span text:style-name="T15">C</text:span><text:span text:style-name="T14">, </text:span><text:span text:style-name="T15">Java</text:span><text:span text:style-name="T14">, </text:span><text:span text:style-name="T15">Assembly</text:span><text:span text:style-name="T14">, </text:span><text:span text:style-name="T15">Python</text:span><text:span text:style-name="T14">, </text:span><text:span text:style-name="T15">HTML</text:span><text:span text:style-name="T14">, </text:span><text:span text:style-name="T15">C#</text:span><text:span text:style-name="T14">, </text:span><text:span text:style-name="T15">SQL</text:span><text:span text:style-name="T14">, </text:span><text:span text:style-name="T15">Ruby</text:span><text:span text:style-name="T14">, </text:span><text:span text:style-name="T15">JavaScript</text:span><text:span text:style-name="T14">, </text:span><text:span text:style-name="T15">PHP</text:span><text:span text:style-name="T14">;</text:span></text:p>
                </text:list-item>
                <text:list-item>
                  <text:p text:style-name="P17"><text:span text:style-name="T14">Para cada uma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7"><text:span text:style-name="T14">é linguagem OO?</text:span></text:p>
                    </text:list-item>
                    <text:list-item>
                      <text:p text:style-name="P17"><text:span text:style-name="T14">é multi-paradigma?</text:span></text:p>
                    </text:list-item>
                    <text:list-item>
                      <text:p text:style-name="P17"><text:span text:style-name="T14">herda sintaxe do </text:span><text:span text:style-name="T15">C</text:span><text:span text:style-name="T14">?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p text:style-name="P17"><text:span text:style-name="T14">Dica: nem tudo que parece linguagem de programação suporta OO!</text:span></text:p>
            </text:list-item>
            <text:list-item>
              <text:p text:style-name="P17"><text:span text:style-name="T14">Tempo: 5 minutos. Discutam as respostas com a turm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4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2" draw:text-style-name="P12" draw:layer="layout" svg:width="2.539cm" svg:height="1.079cm" svg:x="21.59cm" svg:y="13.208cm">
          <text:p text:style-name="P11"><text:span text:style-name="T10">6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" draw:text-style-name="P4" draw:layer="layout" svg:width="22.351cm" svg:height="1.777cm" svg:x="1.524cm" svg:y="0.762cm">
          <text:p text:style-name="P3"><text:span text:style-name="T17">Respostas — Dinâmica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" draw:text-style-name="P21" draw:layer="layout" svg:width="21.335cm" svg:height="9.651cm" svg:x="2.032cm" svg:y="3.048cm">
          <text:list text:style-name="L10">
            <text:list-item>
              <text:p text:style-name="P20"><text:span text:style-name="T18">C</text:span><text:span text:style-name="T14">: estruturada, não OO, base sintática. </text:span><text:span text:style-name="T15">Assembly</text:span><text:span text:style-name="T14">: baixo nível, não OO;</text:span></text:p>
            </text:list-item>
            <text:list-item>
              <text:p text:style-name="P20"><text:span text:style-name="T15">Java</text:span><text:span text:style-name="T14">: OO (multi-paradigma), sintaxe baseada em </text:span><text:span text:style-name="T15">C</text:span><text:span text:style-name="T14">;</text:span></text:p>
            </text:list-item>
            <text:list-item>
              <text:p text:style-name="P20"><text:span text:style-name="T15">Python</text:span><text:span text:style-name="T14">: multi-paradigma (OO + funcional + estruturada), sintaxe própria;</text:span></text:p>
            </text:list-item>
            <text:list-item>
              <text:p text:style-name="P20"><text:span text:style-name="T15">HTML</text:span><text:span text:style-name="T14">: NÃO é linguagem de programação — é linguagem de marcação. </text:span><text:span text:style-name="T15">SQL</text:span><text:span text:style-name="T14">: linguagem de consulta;</text:span></text:p>
            </text:list-item>
            <text:list-item>
              <text:p text:style-name="P20"><text:span text:style-name="T15">C#</text:span><text:span text:style-name="T14">: OO (multi-paradigma), sintaxe baseada em </text:span><text:span text:style-name="T15">C</text:span><text:span text:style-name="T14">. </text:span><text:span text:style-name="T15">Ruby</text:span><text:span text:style-name="T14">: OO puro. </text:span><text:span text:style-name="T15">PHP</text:span><text:span text:style-name="T14">: multi-paradigma. </text:span><text:span text:style-name="T15">JavaScript</text:span><text:span text:style-name="T14">: multi-paradigma;</text:span></text:p>
            </text:list-item>
            <text:list-item>
              <text:p text:style-name="P20"><text:span text:style-name="T14">Chave: nem toda linguagem popular é OO, e nem toda linguagem de computador é de programaçã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45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" draw:text-style-name="P12" draw:layer="layout" svg:width="2.539cm" svg:height="1.079cm" svg:x="21.59cm" svg:y="13.208cm">
          <text:p text:style-name="P11"><text:span text:style-name="T10">7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1221C892.png" xlink:type="simple" xlink:show="embed" xlink:actuate="onLoad" draw:mime-type="image/png">
            <text:p/>
          </draw:image>
          <svg:desc>preencoded.png</svg:desc>
        </draw:frame>
        <draw:custom-shape draw:name="Text 2" draw:style-name="gr47" draw:text-style-name="P4" draw:layer="layout" svg:width="18.287cm" svg:height="1.777cm" svg:x="5.08cm" svg:y="4.064cm">
          <text:p text:style-name="P3"><text:span text:style-name="T11">4.2 O que é uma ID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8" draw:text-style-name="P4" draw:layer="layout" svg:width="18.287cm" svg:height="1.523cm" svg:x="5.08cm" svg:y="6.096cm">
          <text:p text:style-name="P3"><text:span text:style-name="T12">Ambiente Integrado de Desenvolvim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4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0" draw:text-style-name="P12" draw:layer="layout" svg:width="2.539cm" svg:height="1.079cm" svg:x="21.59cm" svg:y="13.208cm">
          <text:p text:style-name="P11"><text:span text:style-name="T10">8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" draw:text-style-name="P4" draw:layer="layout" svg:width="22.351cm" svg:height="2.031cm" svg:x="1.524cm" svg:y="0.127cm">
          <text:p text:style-name="P3"><text:span text:style-name="T13">Do código-fonte ao executáv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2" draw:text-style-name="P18" draw:layer="layout" svg:width="21.335cm" svg:height="9.651cm" svg:x="2.032cm" svg:y="2.648cm">
          <text:list text:style-name="L10">
            <text:list-item>
              <text:p text:style-name="P17"><text:span text:style-name="T14">Algoritmos precisam ser escritos em linguagem de programação com rigor absoluto;</text:span></text:p>
            </text:list-item>
            <text:list-item>
              <text:p text:style-name="P17"><text:span text:style-name="T14">Compilador: ferramenta que transforma código de alto nível em linguagem de máquina (executável);</text:span></text:p>
            </text:list-item>
            <text:list-item>
              <text:p text:style-name="P17"><text:span text:style-name="T14">Editores de código indicam erros de sintaxe com cores, sublinhados e sugestões em tempo real;</text:span></text:p>
            </text:list-item>
            <text:list-item>
              <text:p text:style-name="P17"><text:span text:style-name="T14">Além do editor e compilador: ferramentas de modelagem, refatoração, templates de interface;</text:span></text:p>
            </text:list-item>
            <text:list-item>
              <text:p text:style-name="P17"><text:span text:style-name="T14">Quando tudo se junta num só ambiente → </text:span><text:span text:style-name="T15">IDE</text:span><text:span text:style-name="T14"> (</text:span><text:span text:style-name="T15">Integrated Development Environment</text:span><text:span text:style-name="T14">), em português: Ambiênte Integrado de Desenvolviment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4" draw:text-style-name="P12" draw:layer="layout" svg:width="2.539cm" svg:height="1.079cm" svg:x="21.59cm" svg:y="13.208cm">
          <text:p text:style-name="P11"><text:span text:style-name="T10">9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5" draw:text-style-name="P4" draw:layer="layout" svg:width="22.351cm" svg:height="2.031cm" svg:x="1.524cm" svg:y="0.127cm">
          <text:p text:style-name="P3"><text:span text:style-name="T13">Características gerais das ID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6" draw:text-style-name="P18" draw:layer="layout" svg:width="21.335cm" svg:height="7.552cm" svg:x="2.032cm" svg:y="3.448cm">
          <text:list text:style-name="L10">
            <text:list-item>
              <text:p text:style-name="P17"><text:span text:style-name="T14">Objetivo principal: aumentar a agilidade e precisão do desenvolvimento;</text:span></text:p>
            </text:list-item>
            <text:list-item>
              <text:p text:style-name="P17"><text:span text:style-name="T14">Muitas </text:span><text:span text:style-name="T15">IDE</text:span><text:span text:style-name="T14">s suportam múltiplas linguagens e são configuráveis via </text:span><text:span text:style-name="T15">plug-ins</text:span><text:span text:style-name="T14">;</text:span></text:p>
            </text:list-item>
            <text:list-item>
              <text:p text:style-name="P17"><text:span text:style-name="T14">É comum haver uma </text:span><text:span text:style-name="T15">IDE</text:span><text:span text:style-name="T14"> principal para cada linguagem e vice-versa.</text:span></text:p>
            </text:list-item>
            <text:list-item>
              <text:p text:style-name="P17"><text:span text:style-name="T14">Exemplos populares: </text:span><text:span text:style-name="T15">NetBeans</text:span><text:span text:style-name="T14">, </text:span><text:span text:style-name="T15">Eclipse</text:span><text:span text:style-name="T14">, </text:span><text:span text:style-name="T15">Visual Studio</text:span><text:span text:style-name="T14">, </text:span><text:span text:style-name="T15">Delphi</text:span><text:span text:style-name="T14">, </text:span><text:span text:style-name="T15">DEV C++</text:span><text:span text:style-name="T14">, </text:span><text:span text:style-name="T15">Android Studio</text:span><text:span text:style-name="T14"> e </text:span><text:span text:style-name="T15">IntelliJ</text:span><text:span text:style-name="T14">.</text:span></text:p>
            </text:list-item>
            <text:list-item>
              <text:p text:style-name="P17"><text:span text:style-name="T14">Todas são gratuitas ou possuem versões gratuitas para estudante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57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8" draw:text-style-name="P12" draw:layer="layout" svg:width="2.539cm" svg:height="1.079cm" svg:x="21.59cm" svg:y="13.208cm">
          <text:p text:style-name="P11"><text:span text:style-name="T10">10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9" draw:text-style-name="P4" draw:layer="layout" svg:width="22.351cm" svg:height="1.777cm" svg:x="1.524cm" svg:y="0.762cm">
          <text:p text:style-name="P3"><text:span text:style-name="T16">Dinâmica 2 — Montando sua IDE Id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18" draw:layer="layout" svg:width="20.319cm" svg:height="8.127cm" svg:x="2.54cm" svg:y="3.256cm">
          <text:list text:style-name="L10">
            <text:list-item>
              <text:p text:style-name="P17"><text:span text:style-name="T14">Em grupos de 3, imaginem que vão criar uma </text:span><text:span text:style-name="T15">IDE</text:span><text:span text:style-name="T14"> do zero para desenvolvimento </text:span><text:span text:style-name="T15">Java</text:span><text:span text:style-name="T14">;</text:span></text:p>
            </text:list-item>
            <text:list-item>
              <text:p text:style-name="P17"><text:span text:style-name="T14">Quais funcionalidades incluiriam? Listem pelo menos 6 recursos;</text:span></text:p>
            </text:list-item>
            <text:list-item>
              <text:p text:style-name="P17"><text:span text:style-name="T14">Classifiquem cada recurso como: ESSENCIAL, IMPORTANTE ou DESEJÁVEL;</text:span></text:p>
            </text:list-item>
            <text:list-item>
              <text:p text:style-name="P17"><text:span text:style-name="T14">Comparem a lista do grupo com as funcionalidades reais do </text:span><text:span text:style-name="T15">NetBeans</text:span><text:span text:style-name="T14"> ou </text:span><text:span text:style-name="T15">Eclipse</text:span><text:span text:style-name="T14">;</text:span></text:p>
            </text:list-item>
            <text:list-item>
              <text:p text:style-name="P17"><text:span text:style-name="T14">Tempo: 6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6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2" draw:text-style-name="P12" draw:layer="layout" svg:width="2.539cm" svg:height="1.079cm" svg:x="21.59cm" svg:y="13.208cm">
          <text:p text:style-name="P11"><text:span text:style-name="T10">11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4" draw:layer="layout" svg:width="22.351cm" svg:height="1.777cm" svg:x="1.524cm" svg:y="0.762cm">
          <text:p text:style-name="P3"><text:span text:style-name="T17">Exemplos de resposta — Dinâmica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4" draw:text-style-name="P21" draw:layer="layout" svg:width="21.335cm" svg:height="9.651cm" svg:x="2.032cm" svg:y="3.048cm">
          <text:list text:style-name="L10">
            <text:list-item>
              <text:p text:style-name="P20"><text:span text:style-name="T14">ESSENCIAL: editor de código com </text:span><text:span text:style-name="T15">syntax highlighting</text:span><text:span text:style-name="T14">, compilador integrado, console de saída, gerenciador de arquivos;</text:span></text:p>
            </text:list-item>
            <text:list-item>
              <text:p text:style-name="P20"><text:span text:style-name="T14">IMPORTANTE: depurador (</text:span><text:span text:style-name="T15">debugger</text:span><text:span text:style-name="T14">), autocompletar código, gerenciamento de dependências;</text:span></text:p>
            </text:list-item>
            <text:list-item>
              <text:p text:style-name="P20"><text:span text:style-name="T14">DESEJÁVEL: integração com banco de dados, </text:span><text:span text:style-name="T15">designer</text:span><text:span text:style-name="T14"> de interface gráfica, controle de versão (</text:span><text:span text:style-name="T15">Git</text:span><text:span text:style-name="T14">), temas visuais;</text:span></text:p>
            </text:list-item>
            <text:list-item>
              <text:p text:style-name="P20"><text:span text:style-name="T14">As </text:span><text:span text:style-name="T15">IDE</text:span><text:span text:style-name="T14">s reais oferecem tudo isso e mais — </text:span><text:span text:style-name="T15">plug-ins</text:span><text:span text:style-name="T14"> permitem expandir infinitamente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65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6" draw:text-style-name="P12" draw:layer="layout" svg:width="2.539cm" svg:height="1.079cm" svg:x="21.59cm" svg:y="13.208cm">
          <text:p text:style-name="P11"><text:span text:style-name="T10">12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A43C8061.png" xlink:type="simple" xlink:show="embed" xlink:actuate="onLoad" draw:mime-type="image/png">
            <text:p/>
          </draw:image>
          <svg:desc>preencoded.png</svg:desc>
        </draw:frame>
        <draw:custom-shape draw:name="Text 2" draw:style-name="gr67" draw:text-style-name="P4" draw:layer="layout" svg:width="18.287cm" svg:height="1.777cm" svg:x="5.08cm" svg:y="4.064cm">
          <text:p text:style-name="P3"><text:span text:style-name="T11">4.3 </text:span><text:span text:style-name="T19">IDE NetBe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8" draw:text-style-name="P4" draw:layer="layout" svg:width="18.287cm" svg:height="1.523cm" svg:x="5.08cm" svg:y="6.096cm">
          <text:p text:style-name="P3"><text:span text:style-name="T12">De Praga para o mundo: a história do Apache NetBe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6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0" draw:text-style-name="P12" draw:layer="layout" svg:width="2.539cm" svg:height="1.079cm" svg:x="21.59cm" svg:y="13.208cm">
          <text:p text:style-name="P11"><text:span text:style-name="T10">13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1" draw:text-style-name="P4" draw:layer="layout" svg:width="22.351cm" svg:height="2.031cm" svg:x="1.524cm" svg:y="0.127cm">
          <text:p text:style-name="P3"><text:span text:style-name="T13">História do </text:span><text:span text:style-name="T20">NetBe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2" draw:text-style-name="P18" draw:layer="layout" svg:width="21.335cm" svg:height="9.651cm" svg:x="2.032cm" svg:y="3.048cm">
          <text:list text:style-name="L10">
            <text:list-item>
              <text:p text:style-name="P17"><text:span text:style-name="T14">1996: projeto iniciado por estudantes tchecos em Praga — </text:span><text:span text:style-name="T15">IDE</text:span><text:span text:style-name="T14"> em </text:span><text:span text:style-name="T15">Java</text:span><text:span text:style-name="T14">, para </text:span><text:span text:style-name="T15">Java</text:span><text:span text:style-name="T14">.</text:span></text:p>
            </text:list-item>
            <text:list-item>
              <text:p text:style-name="P17"><text:span text:style-name="T14">2000: </text:span><text:span text:style-name="T15">Sun Microsystems</text:span><text:span text:style-name="T14"> (detentora do </text:span><text:span text:style-name="T15">Java</text:span><text:span text:style-name="T14">) adquire o projeto e incorpora à sua linha;</text:span></text:p>
            </text:list-item>
            <text:list-item>
              <text:p text:style-name="P17"><text:span text:style-name="T14">2010: </text:span><text:span text:style-name="T15">Oracle</text:span><text:span text:style-name="T14"> compra a </text:span><text:span text:style-name="T15">Sun</text:span><text:span text:style-name="T14"> e assume o </text:span><text:span text:style-name="T15">NetBeans</text:span><text:span text:style-name="T14">, já como projeto livre e de código aberto.</text:span></text:p>
            </text:list-item>
            <text:list-item>
              <text:p text:style-name="P17"><text:span text:style-name="T14">2016: </text:span><text:span text:style-name="T15">Oracle</text:span><text:span text:style-name="T14"> transfere o </text:span><text:span text:style-name="T15">NetBeans</text:span><text:span text:style-name="T14"> para a comunidade </text:span><text:span text:style-name="T15">Apache Foundation</text:span><text:span text:style-name="T14">.</text:span></text:p>
            </text:list-item>
            <text:list-item>
              <text:p text:style-name="P17"><text:span text:style-name="T14">Hoje: </text:span><text:span text:style-name="T15">Apache NetBeans IDE</text:span><text:span text:style-name="T14"> — ambiente completo, gratuito, mantido pela comunidade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4" draw:text-style-name="P12" draw:layer="layout" svg:width="2.539cm" svg:height="1.079cm" svg:x="21.59cm" svg:y="13.208cm">
          <text:p text:style-name="P11"><text:span text:style-name="T10">14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5" draw:text-style-name="P4" draw:layer="layout" svg:width="22.351cm" svg:height="2.031cm" svg:x="1.524cm" svg:y="0.127cm">
          <text:p text:style-name="P3"><text:span text:style-name="T13">Recursos do NetBe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6" draw:text-style-name="P18" draw:layer="layout" svg:width="21.335cm" svg:height="9.651cm" svg:x="2.032cm" svg:y="3.048cm">
          <text:list text:style-name="L10">
            <text:list-item>
              <text:p text:style-name="P17"><text:span text:style-name="T14">Editor de código para: </text:span><text:span text:style-name="T15">Java</text:span><text:span text:style-name="T14">, </text:span><text:span text:style-name="T15">XML</text:span><text:span text:style-name="T14">, </text:span><text:span text:style-name="T15">CSS</text:span><text:span text:style-name="T14">, </text:span><text:span text:style-name="T15">HTML</text:span><text:span text:style-name="T14">, </text:span><text:span text:style-name="T15">JSP</text:span><text:span text:style-name="T14">, </text:span><text:span text:style-name="T15">JavaScript</text:span><text:span text:style-name="T14">, </text:span><text:span text:style-name="T15">PHP</text:span><text:span text:style-name="T14">, </text:span><text:span text:style-name="T15">Groovy</text:span><text:span text:style-name="T14">, </text:span><text:span text:style-name="T15">C</text:span><text:span text:style-name="T14">, </text:span><text:span text:style-name="T15">C++</text:span><text:span text:style-name="T14"> e mais;</text:span></text:p>
            </text:list-item>
            <text:list-item>
              <text:p text:style-name="P17"><text:span text:style-name="T15">Plug-ins</text:span><text:span text:style-name="T14"> variados para necessidades específicas — banco de dados, </text:span><text:span text:style-name="T15">frameworks</text:span><text:span text:style-name="T14">, testes;</text:span></text:p>
            </text:list-item>
            <text:list-item>
              <text:p text:style-name="P17"><text:span text:style-name="T14">Suporte nativo a conexão com banco de dados e ferramentas de interface gráfica;</text:span></text:p>
            </text:list-item>
            <text:list-item>
              <text:p text:style-name="P17"><text:span text:style-name="T14">Compilação, depuração e execução integrados — tudo sem sair da </text:span><text:span text:style-name="T15">IDE</text:span><text:span text:style-name="T14">;</text:span></text:p>
            </text:list-item>
            <text:list-item>
              <text:p text:style-name="P17"><text:span text:style-name="T15">Download</text:span><text:span text:style-name="T14"> gratuito em </text:span><text:span text:style-name="T21">netbeans.apache.org</text:span><text:span text:style-name="T14">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77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8" draw:text-style-name="P12" draw:layer="layout" svg:width="2.539cm" svg:height="1.079cm" svg:x="21.59cm" svg:y="13.208cm">
          <text:p text:style-name="P11"><text:span text:style-name="T10">15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9" draw:text-style-name="P4" draw:layer="layout" svg:width="22.351cm" svg:height="1.777cm" svg:x="1.524cm" svg:y="0.762cm">
          <text:p text:style-name="P3"><text:span text:style-name="T16">Dinâmica 3 — Linha do Tempo das ID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0" draw:text-style-name="P18" draw:layer="layout" svg:width="20.319cm" svg:height="8.127cm" svg:x="2.54cm" svg:y="3.556cm">
          <text:list text:style-name="L10">
            <text:list-item>
              <text:p text:style-name="P17"><text:span text:style-name="T14">Em duplas, organizem os eventos abaixo em ordem cronológica correta:</text:span></text:p>
            </text:list-item>
            <text:list-item>
              <text:p text:style-name="P17"><text:span text:style-name="T14">Eventos: </text:span><text:span text:style-name="T15">Oracle</text:span><text:span text:style-name="T14"> compra </text:span><text:span text:style-name="T15">Sun</text:span><text:span text:style-name="T14"> | </text:span><text:span text:style-name="T15">NetBeans</text:span><text:span text:style-name="T14"> criado em Praga | </text:span><text:span text:style-name="T15">Eclipse</text:span><text:span text:style-name="T14"> lançado pela </text:span><text:span text:style-name="T15">IBM</text:span><text:span text:style-name="T14"> | </text:span><text:span text:style-name="T15">Apache</text:span><text:span text:style-name="T14"> recebe </text:span><text:span text:style-name="T15">NetBeans</text:span><text:span text:style-name="T14"> | </text:span><text:span text:style-name="T15">Sun</text:span><text:span text:style-name="T14"> compra </text:span><text:span text:style-name="T15">NetBeans</text:span><text:span text:style-name="T14"> | </text:span><text:span text:style-name="T15">Visual Studio Community</text:span><text:span text:style-name="T14"> lançado.</text:span></text:p>
            </text:list-item>
            <text:list-item>
              <text:p text:style-name="P17"><text:span text:style-name="T14">Após ordenar, respondam: qual </text:span><text:span text:style-name="T15">IDE</text:span><text:span text:style-name="T14"> é mais antiga? Qual é a mais recente?</text:span></text:p>
            </text:list-item>
            <text:list-item>
              <text:p text:style-name="P17"><text:span text:style-name="T14">Tempo: 4 minut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8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2" draw:text-style-name="P12" draw:layer="layout" svg:width="2.539cm" svg:height="1.079cm" svg:x="21.59cm" svg:y="13.208cm">
          <text:p text:style-name="P11"><text:span text:style-name="T10">16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3" draw:text-style-name="P4" draw:layer="layout" svg:width="22.351cm" svg:height="1.777cm" svg:x="1.524cm" svg:y="0.762cm">
          <text:p text:style-name="P3"><text:span text:style-name="T17">Respostas — Dinâmica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4" draw:text-style-name="P18" draw:layer="layout" svg:width="21.335cm" svg:height="9.651cm" svg:x="2.032cm" svg:y="3.048cm">
          <text:list text:style-name="L10">
            <text:list-item>
              <text:p text:style-name="P17"><text:span text:style-name="T14">1996: </text:span><text:span text:style-name="T15">NetBeans</text:span><text:span text:style-name="T14"> criado em Praga;</text:span></text:p>
            </text:list-item>
            <text:list-item>
              <text:p text:style-name="P17"><text:span text:style-name="T14">2000: </text:span><text:span text:style-name="T15">Sun Microsystems</text:span><text:span text:style-name="T14"> compra o </text:span><text:span text:style-name="T15">NetBeans</text:span><text:span text:style-name="T14">;</text:span></text:p>
            </text:list-item>
            <text:list-item>
              <text:p text:style-name="P17"><text:span text:style-name="T14">2001: </text:span><text:span text:style-name="T15">Eclipse</text:span><text:span text:style-name="T14"> lançado pela </text:span><text:span text:style-name="T15">IBM</text:span><text:span text:style-name="T14">;</text:span></text:p>
            </text:list-item>
            <text:list-item>
              <text:p text:style-name="P17"><text:span text:style-name="T14">2010: </text:span><text:span text:style-name="T15">Oracle</text:span><text:span text:style-name="T14"> compra a </text:span><text:span text:style-name="T15">Sun</text:span><text:span text:style-name="T14"> (e assume </text:span><text:span text:style-name="T15">NetBeans</text:span><text:span text:style-name="T14">);</text:span></text:p>
            </text:list-item>
            <text:list-item>
              <text:p text:style-name="P17"><text:span text:style-name="T14">2014: </text:span><text:span text:style-name="T15">Visual Studio Community</text:span><text:span text:style-name="T14"> lançado pela </text:span><text:span text:style-name="T15">Microsoft</text:span><text:span text:style-name="T14">;</text:span></text:p>
            </text:list-item>
            <text:list-item>
              <text:p text:style-name="P17"><text:span text:style-name="T14">2016: </text:span><text:span text:style-name="T15">Oracle</text:span><text:span text:style-name="T14"> transfere </text:span><text:span text:style-name="T15">NetBeans</text:span><text:span text:style-name="T14"> para a </text:span><text:span text:style-name="T15">Apache Foundation</text:span><text:span text:style-name="T14">;</text:span></text:p>
            </text:list-item>
            <text:list-item>
              <text:p text:style-name="P17"><text:span text:style-name="T14">Mais antiga: </text:span><text:span text:style-name="T15">NetBeans</text:span><text:span text:style-name="T14"> (1996). Mais recente como '</text:span><text:span text:style-name="T15">community</text:span><text:span text:style-name="T14">': </text:span><text:span text:style-name="T15">Visual Studio Community</text:span><text:span text:style-name="T14"> (2014)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85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6" draw:text-style-name="P12" draw:layer="layout" svg:width="2.539cm" svg:height="1.079cm" svg:x="21.59cm" svg:y="13.208cm">
          <text:p text:style-name="P11"><text:span text:style-name="T10">17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0AC5B597.png" xlink:type="simple" xlink:show="embed" xlink:actuate="onLoad" draw:mime-type="image/png">
            <text:p/>
          </draw:image>
          <svg:desc>preencoded.png</svg:desc>
        </draw:frame>
        <draw:custom-shape draw:name="Text 2" draw:style-name="gr87" draw:text-style-name="P4" draw:layer="layout" svg:width="18.287cm" svg:height="1.777cm" svg:x="5.08cm" svg:y="4.064cm">
          <text:p text:style-name="P3"><text:span text:style-name="T11">4.4 </text:span><text:span text:style-name="T19">IDE Eclip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8" draw:text-style-name="P4" draw:layer="layout" svg:width="18.287cm" svg:height="1.523cm" svg:x="5.08cm" svg:y="6.096cm">
          <text:p text:style-name="P3"><text:span text:style-name="T12">Leve, poderosa e extensível via plug-i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89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0" draw:text-style-name="P12" draw:layer="layout" svg:width="2.539cm" svg:height="1.079cm" svg:x="21.59cm" svg:y="13.208cm">
          <text:p text:style-name="P11"><text:span text:style-name="T10">18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1" draw:text-style-name="P4" draw:layer="layout" svg:width="22.351cm" svg:height="2.031cm" svg:x="1.524cm" svg:y="0.127cm">
          <text:p text:style-name="P3"><text:span text:style-name="T13">Eclipse: características principa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2" draw:text-style-name="P18" draw:layer="layout" svg:width="21.335cm" svg:height="9.651cm" svg:x="2.032cm" svg:y="3.048cm">
          <text:list text:style-name="L10">
            <text:list-item>
              <text:p text:style-name="P17"><text:span text:style-name="T14">Desenvolvida originalmente pela </text:span><text:span text:style-name="T15">IBM</text:span><text:span text:style-name="T14">, lançada em 2001 — totalmente em </text:span><text:span text:style-name="T15">Java</text:span><text:span text:style-name="T14">;</text:span></text:p>
            </text:list-item>
            <text:list-item>
              <text:p text:style-name="P17"><text:span text:style-name="T15">Software</text:span><text:span text:style-name="T14"> livre e de código aberto — permite personalização e criação de </text:span><text:span text:style-name="T15">plug-ins</text:span><text:span text:style-name="T14"> próprios;</text:span></text:p>
            </text:list-item>
            <text:list-item>
              <text:p text:style-name="P17"><text:span text:style-name="T14">Suporta: </text:span><text:span text:style-name="T15">C</text:span><text:span text:style-name="T14">, </text:span><text:span text:style-name="T15">C++</text:span><text:span text:style-name="T14">, </text:span><text:span text:style-name="T15">Java</text:span><text:span text:style-name="T14">, </text:span><text:span text:style-name="T15">PHP</text:span><text:span text:style-name="T14">, </text:span><text:span text:style-name="T15">Python</text:span><text:span text:style-name="T14">, </text:span><text:span text:style-name="T15">Perl</text:span><text:span text:style-name="T14"> e muitas outras via </text:span><text:span text:style-name="T15">plug-ins</text:span><text:span text:style-name="T14">;</text:span></text:p>
            </text:list-item>
            <text:list-item>
              <text:p text:style-name="P17"><text:span text:style-name="T14">Interface amigável, leve e com baixo requisito de </text:span><text:span text:style-name="T15">hardware</text:span><text:span text:style-name="T14">;</text:span></text:p>
            </text:list-item>
            <text:list-item>
              <text:p text:style-name="P17"><text:span text:style-name="T15">Download</text:span><text:span text:style-name="T14"> gratuito em </text:span><text:span text:style-name="T21">eclipse.org</text:span><text:span text:style-name="T14"> — site rico em documentação e tutoriai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3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4" draw:text-style-name="P12" draw:layer="layout" svg:width="2.539cm" svg:height="1.079cm" svg:x="21.59cm" svg:y="13.208cm">
          <text:p text:style-name="P11"><text:span text:style-name="T10">19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custom-shape draw:name="Shape 0" draw:style-name="gr1" draw:text-style-name="P1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3" draw:layer="layout" svg:width="2.539cm" svg:height="2.539cm" svg:x="1.524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25" draw:text-style-name="P14" draw:layer="layout" svg:width="1.421cm" svg:height="1.421cm" svg:x="2.083cm" svg:y="5.131cm">
          <draw:image xlink:href="Pictures/10000001000001000000010089D12E7F.png" xlink:type="simple" xlink:show="embed" xlink:actuate="onLoad" draw:mime-type="image/png">
            <text:p/>
          </draw:image>
          <svg:desc>preencoded.png</svg:desc>
        </draw:frame>
        <draw:custom-shape draw:name="Text 2" draw:style-name="gr95" draw:text-style-name="P4" draw:layer="layout" svg:width="18.287cm" svg:height="1.777cm" svg:x="5.08cm" svg:y="4.064cm">
          <text:p text:style-name="P3"><text:span text:style-name="T11">4.5 </text:span><text:span text:style-name="T19">Visual Stud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6" draw:text-style-name="P4" draw:layer="layout" svg:width="18.287cm" svg:height="1.523cm" svg:x="5.08cm" svg:y="6.096cm">
          <text:p text:style-name="P3"><text:span text:style-name="T12">A IDE da Microsoft e o ecossistema .N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97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8" draw:text-style-name="P12" draw:layer="layout" svg:width="2.539cm" svg:height="1.079cm" svg:x="21.59cm" svg:y="13.208cm">
          <text:p text:style-name="P11"><text:span text:style-name="T10">20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0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9" draw:text-style-name="P4" draw:layer="layout" svg:width="22.351cm" svg:height="2.031cm" svg:x="1.524cm" svg:y="0.127cm">
          <text:p text:style-name="P3"><text:span text:style-name="T13">Visual Studio: características principa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0" draw:text-style-name="P18" draw:layer="layout" svg:width="21.335cm" svg:height="9.651cm" svg:x="2.032cm" svg:y="3.048cm">
          <text:list text:style-name="L10">
            <text:list-item>
              <text:p text:style-name="P17"><text:span text:style-name="T15">IDE</text:span><text:span text:style-name="T14"> proprietária da </text:span><text:span text:style-name="T15">Microsoft</text:span><text:span text:style-name="T14"> — versão </text:span><text:span text:style-name="T15">Community</text:span><text:span text:style-name="T14"> é gratuita para estudantes e </text:span><text:span text:style-name="T15">open source</text:span><text:span text:style-name="T14">;</text:span></text:p>
            </text:list-item>
            <text:list-item>
              <text:p text:style-name="P17"><text:span text:style-name="T14">Suporta: </text:span><text:span text:style-name="T15">Visual Basic</text:span><text:span text:style-name="T14">, </text:span><text:span text:style-name="T15">C</text:span><text:span text:style-name="T14">, </text:span><text:span text:style-name="T15">C++</text:span><text:span text:style-name="T14">, </text:span><text:span text:style-name="T15">C#</text:span><text:span text:style-name="T14"> e </text:span><text:span text:style-name="T15">F#</text:span><text:span text:style-name="T14"> com </text:span><text:span text:style-name="T15">.NET Framework</text:span><text:span text:style-name="T14">;</text:span></text:p>
            </text:list-item>
            <text:list-item>
              <text:p text:style-name="P17"><text:span text:style-name="T15">.NET Framework</text:span><text:span text:style-name="T14">: plataforma única para desenvolvimento e execução multiplataforma;</text:span></text:p>
            </text:list-item>
            <text:list-item>
              <text:p text:style-name="P17"><text:span text:style-name="T15">IDE</text:span><text:span text:style-name="T14"> muito completa, porém mais pesada — recomendado mínimo 4</text:span><text:span text:style-name="T15">GB</text:span><text:span text:style-name="T14"> de </text:span><text:span text:style-name="T15">RAM</text:span><text:span text:style-name="T14">;</text:span></text:p>
            </text:list-item>
            <text:list-item>
              <text:p text:style-name="P17"><text:span text:style-name="T14">Boas traduções em português — facilita para programadores iniciantes;</text:span></text:p>
            </text:list-item>
            <text:list-item>
              <text:p text:style-name="P17"><text:span text:style-name="T14">Depurador preciso e boas ferramentas de conexão com banco de dados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5" draw:style-name="gr101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12" draw:layer="layout" svg:width="2.539cm" svg:height="1.079cm" svg:x="21.59cm" svg:y="13.208cm">
          <text:p text:style-name="P11"><text:span text:style-name="T10">21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1" presentation:class="page"/>
          <draw:frame draw:name="Notes Placeholder 2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Shape 0" draw:style-name="gr6" draw:text-style-name="P5" draw:layer="layout" svg:width="25.399cm" svg:height="2.28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01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3" draw:text-style-name="P4" draw:layer="layout" svg:width="22.351cm" svg:height="2.031cm" svg:x="1.524cm" svg:y="0.127cm">
          <text:p text:style-name="P3"><text:span text:style-name="T13">Comparativo: NetBeans vs. Eclipse vs. Visual Stud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9" draw:text-style-name="P19" draw:layer="layout" svg:width="7.365cm" svg:height="9.397cm" svg:x="0.889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7.365cm" svg:height="0.151cm" svg:x="0.889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5" draw:text-style-name="P14" draw:layer="layout" svg:width="0.888cm" svg:height="0.888cm" svg:x="1.397cm" svg:y="3.429cm">
          <draw:image xlink:href="Pictures/100000010000010000000100A43C8061.png" xlink:type="simple" xlink:show="embed" xlink:actuate="onLoad" draw:mime-type="image/png">
            <text:p/>
          </draw:image>
          <svg:desc>preencoded.png</svg:desc>
        </draw:frame>
        <draw:custom-shape draw:name="Text 5" draw:style-name="gr104" draw:text-style-name="P4" draw:layer="layout" svg:width="5.079cm" svg:height="1.015cm" svg:x="2.54cm" svg:y="3.302cm">
          <text:p text:style-name="P3"><text:span text:style-name="T22">NetBe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5" draw:text-style-name="P23" draw:layer="layout" svg:width="7.365cm" svg:height="7.111cm" svg:x="0.889cm" svg:y="4.826cm">
          <text:list text:style-name="L10">
            <text:list-item>
              <text:p text:style-name="P22"><text:span text:style-name="T14">Foco: </text:span><text:span text:style-name="T15">Java;</text:span></text:p>
            </text:list-item>
            <text:list-item>
              <text:p text:style-name="P22"><text:span text:style-name="T14">Origem: Praga (1996);</text:span></text:p>
            </text:list-item>
            <text:list-item>
              <text:p text:style-name="P22"><text:span text:style-name="T14">Mantido: </text:span><text:span text:style-name="T15">Apache Foundation</text:span><text:span text:style-name="T14">;</text:span></text:p>
            </text:list-item>
            <text:list-item>
              <text:p text:style-name="P22"><text:span text:style-name="T14">Licença: livre / código aberto;</text:span></text:p>
            </text:list-item>
            <text:list-item>
              <text:p text:style-name="P22"><text:span text:style-name="T14">Peso: médio;</text:span></text:p>
            </text:list-item>
            <text:list-item>
              <text:p text:style-name="P22"><text:span text:style-name="T15">Plug-ins</text:span><text:span text:style-name="T14">: variados;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9" draw:text-style-name="P19" draw:layer="layout" svg:width="7.365cm" svg:height="9.397cm" svg:x="8.763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7.365cm" svg:height="0.151cm" svg:x="8.763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5" draw:text-style-name="P14" draw:layer="layout" svg:width="0.888cm" svg:height="0.888cm" svg:x="9.271cm" svg:y="3.429cm">
          <draw:image xlink:href="Pictures/1000000100000100000001000AC5B597.png" xlink:type="simple" xlink:show="embed" xlink:actuate="onLoad" draw:mime-type="image/png">
            <text:p/>
          </draw:image>
          <svg:desc>preencoded.png</svg:desc>
        </draw:frame>
        <draw:custom-shape draw:name="Text 9" draw:style-name="gr106" draw:text-style-name="P4" draw:layer="layout" svg:width="5.079cm" svg:height="1.015cm" svg:x="10.414cm" svg:y="3.302cm">
          <text:p text:style-name="P3"><text:span text:style-name="T22">Eclip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7" draw:text-style-name="P23" draw:layer="layout" svg:width="7cm" svg:height="7.111cm" svg:x="9cm" svg:y="4.826cm">
          <text:list text:style-name="L10">
            <text:list-item>
              <text:p text:style-name="P22"><text:span text:style-name="T14">Foco: </text:span><text:span text:style-name="T15">Java</text:span><text:span text:style-name="T14"> (+ multi-linguagem);</text:span></text:p>
            </text:list-item>
            <text:list-item>
              <text:p text:style-name="P22"><text:span text:style-name="T14">Origem: </text:span><text:span text:style-name="T15">IBM</text:span><text:span text:style-name="T14"> (2001);</text:span></text:p>
            </text:list-item>
            <text:list-item>
              <text:p text:style-name="P22"><text:span text:style-name="T14">Mantido: </text:span><text:span text:style-name="T15">Eclipse Foundation</text:span><text:span text:style-name="T14">;</text:span></text:p>
            </text:list-item>
            <text:list-item>
              <text:p text:style-name="P22"><text:span text:style-name="T14">Licença: livre / código aberto;</text:span></text:p>
            </text:list-item>
            <text:list-item>
              <text:p text:style-name="P22"><text:span text:style-name="T14">Peso: leve;</text:span></text:p>
            </text:list-item>
            <text:list-item>
              <text:p text:style-name="P22"><text:span text:style-name="T15">Plug-ins</text:span><text:span text:style-name="T14">: extensível ao máximo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9" draw:text-style-name="P19" draw:layer="layout" svg:width="7.365cm" svg:height="9.397cm" svg:x="16.637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" draw:text-style-name="P2" draw:layer="layout" svg:width="7.365cm" svg:height="0.151cm" svg:x="16.637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5" draw:text-style-name="P14" draw:layer="layout" svg:width="0.888cm" svg:height="0.888cm" svg:x="17.145cm" svg:y="3.429cm">
          <draw:image xlink:href="Pictures/10000001000001000000010089D12E7F.png" xlink:type="simple" xlink:show="embed" xlink:actuate="onLoad" draw:mime-type="image/png">
            <text:p/>
          </draw:image>
          <svg:desc>preencoded.png</svg:desc>
        </draw:frame>
        <draw:custom-shape draw:name="Text 13" draw:style-name="gr108" draw:text-style-name="P4" draw:layer="layout" svg:width="5.079cm" svg:height="1.015cm" svg:x="18.288cm" svg:y="3.302cm">
          <text:p text:style-name="P3"><text:span text:style-name="T23">Visual Stud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9" draw:text-style-name="P23" draw:layer="layout" svg:width="7.363cm" svg:height="7.111cm" svg:x="16.637cm" svg:y="4.826cm">
          <text:list text:style-name="L10">
            <text:list-item>
              <text:p text:style-name="P22"><text:span text:style-name="T14">Foco: </text:span><text:span text:style-name="T15">C#</text:span><text:span text:style-name="T14"> / </text:span><text:span text:style-name="T15">.NET</text:span><text:span text:style-name="T14"> / </text:span><text:span text:style-name="T15">C++</text:span><text:span text:style-name="T14">;</text:span></text:p>
            </text:list-item>
            <text:list-item>
              <text:p text:style-name="P22"><text:span text:style-name="T14">Origem: </text:span><text:span text:style-name="T15">Microsoft</text:span><text:span text:style-name="T14">;</text:span></text:p>
            </text:list-item>
            <text:list-item>
              <text:p text:style-name="P22"><text:span text:style-name="T14">Mantido: </text:span><text:span text:style-name="T15">Microsoft</text:span><text:span text:style-name="T14">;</text:span></text:p>
            </text:list-item>
            <text:list-item>
              <text:p text:style-name="P22"><text:span text:style-name="T14">Licença: proprietária (</text:span><text:span text:style-name="T15">Community</text:span><text:span text:style-name="T14"> grátis);</text:span></text:p>
            </text:list-item>
            <text:list-item>
              <text:p text:style-name="P22"><text:span text:style-name="T14">Peso: pesado (~4</text:span><text:span text:style-name="T15">GB</text:span><text:span text:style-name="T14"> </text:span><text:span text:style-name="T15">RAM</text:span><text:span text:style-name="T14">);</text:span></text:p>
            </text:list-item>
            <text:list-item>
              <text:p text:style-name="P22"><text:span text:style-name="T14">Destaque: depurador + portuguê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16" draw:style-name="gr110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1" draw:text-style-name="P12" draw:layer="layout" svg:width="2.539cm" svg:height="1.079cm" svg:x="21.59cm" svg:y="13.208cm">
          <text:p text:style-name="P11"><text:span text:style-name="T10">22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2" presentation:class="page"/>
          <draw:frame draw:name="Notes Placeholder 2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2" draw:text-style-name="P4" draw:layer="layout" svg:width="22.351cm" svg:height="1.777cm" svg:x="1.524cm" svg:y="0.762cm">
          <text:p text:style-name="P3"><text:span text:style-name="T16">Dinâmica 4 — Escolhendo a IDE cer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3" draw:text-style-name="P25" draw:layer="layout" svg:width="20.319cm" svg:height="8.127cm" svg:x="2.54cm" svg:y="3.556cm">
          <text:list text:style-name="L10">
            <text:list-item>
              <text:p text:style-name="P24"><text:span text:style-name="T14">Em grupos de 3–4, analisem os cenários abaixo e escolham a melhor </text:span><text:span text:style-name="T15">IDE</text:span><text:span text:style-name="T14"> para cada um:</text:span></text:p>
              <text:list>
                <text:list-item>
                  <text:p text:style-name="P24"><text:span text:style-name="T14">Cenário A: </text:span><text:span text:style-name="T15">Startup</text:span><text:span text:style-name="T14"> que desenvolve </text:span><text:span text:style-name="T15">apps</text:span><text:span text:style-name="T14"> </text:span><text:span text:style-name="T15">Android</text:span><text:span text:style-name="T14"> com equipe de 3 </text:span><text:span text:style-name="T15">devs</text:span><text:span text:style-name="T14"> iniciantes.</text:span></text:p>
                </text:list-item>
                <text:list-item>
                  <text:p text:style-name="P24"><text:span text:style-name="T14">Cenário B: Empresa financeira com sistema legado em </text:span><text:span text:style-name="T15">C#</text:span><text:span text:style-name="T14"> e equipe de 10 </text:span><text:span text:style-name="T15">devs</text:span><text:span text:style-name="T14">.</text:span></text:p>
                </text:list-item>
                <text:list-item>
                  <text:p text:style-name="P24"><text:span text:style-name="T14">Cenário C: Projeto acadêmico em </text:span><text:span text:style-name="T15">Java</text:span><text:span text:style-name="T14"> para disciplina de POO com orçamento zero.</text:span></text:p>
                </text:list-item>
                <text:list-item>
                  <text:p text:style-name="P24"><text:span text:style-name="T14">Justifiquem cada escolha considerando: linguagem, custo, peso, facilidade.</text:span></text:p>
                </text:list-item>
              </text:list>
            </text:list-item>
            <text:list-item>
              <text:p text:style-name="P24"><text:span text:style-name="T14">Tempo: 6 minutos. Apresentação: 2 minutos por grup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14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5" draw:text-style-name="P12" draw:layer="layout" svg:width="2.539cm" svg:height="1.079cm" svg:x="21.59cm" svg:y="13.208cm">
          <text:p text:style-name="P11"><text:span text:style-name="T10">23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3" presentation:class="page"/>
          <draw:frame draw:name="Notes Placeholder 2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6" draw:text-style-name="P4" draw:layer="layout" svg:width="22.351cm" svg:height="1.777cm" svg:x="1.524cm" svg:y="0.762cm">
          <text:p text:style-name="P3"><text:span text:style-name="T17">Respostas possíveis — Dinâmica 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7" draw:text-style-name="P18" draw:layer="layout" svg:width="21.335cm" svg:height="9.651cm" svg:x="2.032cm" svg:y="3.048cm">
          <text:list text:style-name="L10">
            <text:list-item>
              <text:p text:style-name="P17"><text:span text:style-name="T14">Cenário A (</text:span><text:span text:style-name="T15">Android</text:span><text:span text:style-name="T14">): </text:span><text:span text:style-name="T15">Android Studio</text:span><text:span text:style-name="T14"> (</text:span><text:span text:style-name="T15">IDE</text:span><text:span text:style-name="T14"> oficial) ou </text:span><text:span text:style-name="T15">Eclipse</text:span><text:span text:style-name="T14"> com </text:span><text:span text:style-name="T15">plug-in</text:span><text:span text:style-name="T14"> </text:span><text:span text:style-name="T15">ADT</text:span><text:span text:style-name="T14">. </text:span><text:span text:style-name="T15">NetBeans</text:span><text:span text:style-name="T14"> também funciona para </text:span><text:span text:style-name="T15">Java Android</text:span><text:span text:style-name="T14">;</text:span></text:p>
            </text:list-item>
            <text:list-item>
              <text:p text:style-name="P17"><text:span text:style-name="T14">Cenário B (</text:span><text:span text:style-name="T15">C#</text:span><text:span text:style-name="T14"> corporativo): </text:span><text:span text:style-name="T15">Visual Studio</text:span><text:span text:style-name="T14"> — suporte nativo a </text:span><text:span text:style-name="T15">C#</text:span><text:span text:style-name="T14">/</text:span><text:span text:style-name="T15">.NET</text:span><text:span text:style-name="T14">, depurador avançado, equipe pode usar a versão </text:span><text:span text:style-name="T15">Enterprise</text:span><text:span text:style-name="T14">;</text:span></text:p>
            </text:list-item>
            <text:list-item>
              <text:p text:style-name="P17"><text:span text:style-name="T14">Cenário C (POO acadêmico): </text:span><text:span text:style-name="T15">NetBeans</text:span><text:span text:style-name="T14"> ou </text:span><text:span text:style-name="T15">Eclipse</text:span><text:span text:style-name="T14"> — ambos gratuitos, leves, foco em Java, perfeitos para estudantes;</text:span></text:p>
            </text:list-item>
            <text:list-item>
              <text:p text:style-name="P17"><text:span text:style-name="T14">Não existe </text:span><text:span text:style-name="T15">IDE</text:span><text:span text:style-name="T14"> 'melhor' — existe a mais adequada para o contexto e necessidade do projeto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18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9" draw:text-style-name="P12" draw:layer="layout" svg:width="2.539cm" svg:height="1.079cm" svg:x="21.59cm" svg:y="13.208cm">
          <text:p text:style-name="P11"><text:span text:style-name="T10">24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4" presentation:class="page"/>
          <draw:frame draw:name="Notes Placeholder 2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5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0" draw:text-style-name="P4" draw:layer="layout" svg:width="22.351cm" svg:height="1.777cm" svg:x="1.524cm" svg:y="0.762cm">
          <text:p text:style-name="P3"><text:span text:style-name="T16">Dinâmica 5 — Do Requisito ao Ambi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9" draw:text-style-name="P19" draw:layer="layout" svg:width="22.3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151cm" svg:height="9.143cm" svg:x="1.52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1" draw:text-style-name="P18" draw:layer="layout" svg:width="20.319cm" svg:height="8.127cm" svg:x="2.54cm" svg:y="3.556cm">
          <text:list text:style-name="L10">
            <text:list-item>
              <text:p text:style-name="P17"><text:span text:style-name="T14">Individualmente, relembre tudo que vimos nas Aulas 1 a 4 e responda:</text:span></text:p>
            </text:list-item>
          </text:list>
          <text:list text:style-name="L12">
            <text:list-item>
              <text:list>
                <text:list-item>
                  <text:p text:style-name="P17"><text:span text:style-name="T14">Quais são os 4 princípios obrigatórios da OO?</text:span></text:p>
                </text:list-item>
                <text:list-item>
                  <text:p text:style-name="P17"><text:span text:style-name="T14">Cite 2 diferenças entre programação estruturada e OO.</text:span></text:p>
                </text:list-item>
                <text:list-item>
                  <text:p text:style-name="P17"><text:span text:style-name="T14">O que é um compilador e qual sua função?</text:span></text:p>
                </text:list-item>
                <text:list-item>
                  <text:p text:style-name="P17"><text:span text:style-name="T14">O que significa </text:span><text:span text:style-name="T15">IDE</text:span><text:span text:style-name="T14"> e qual o objetivo principal?</text:span></text:p>
                </text:list-item>
                <text:list-item>
                  <text:p text:style-name="P17"><text:span text:style-name="T14">Qual </text:span><text:span text:style-name="T15">IDE</text:span><text:span text:style-name="T14"> você escolheria para um projeto </text:span><text:span text:style-name="T15">Java</text:span><text:span text:style-name="T14"> e por quê?</text:span></text:p>
                </text:list-item>
              </text:list>
            </text:list-item>
          </text:list>
          <text:list text:style-name="L10">
            <text:list-item>
              <text:p text:style-name="P17"><text:span text:style-name="T14">Tempo: 5 minutos. Revisão coletiv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6" draw:style-name="gr122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3" draw:text-style-name="P12" draw:layer="layout" svg:width="2.539cm" svg:height="1.079cm" svg:x="21.59cm" svg:y="13.208cm">
          <text:p text:style-name="P11"><text:span text:style-name="T10">25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5" presentation:class="page"/>
          <draw:frame draw:name="Notes Placeholder 2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6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4" draw:text-style-name="P4" draw:layer="layout" svg:width="22.351cm" svg:height="1.777cm" svg:x="1.524cm" svg:y="0.762cm">
          <text:p text:style-name="P3"><text:span text:style-name="T17">Revisão rápida — Dinâmica 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5" draw:text-style-name="P18" draw:layer="layout" svg:width="21.335cm" svg:height="9.651cm" svg:x="2.032cm" svg:y="3.048cm">
          <text:list text:style-name="L12">
            <text:list-item>
              <text:p text:style-name="P17"><text:span text:style-name="T14">Abstração, Encapsulamento, Herança e Polimorfismo.</text:span></text:p>
            </text:list-item>
            <text:list-item>
              <text:p text:style-name="P17"><text:span text:style-name="T14">Estruturada: sequencial, funções. OO: objetos, troca de mensagens, classes.</text:span></text:p>
            </text:list-item>
            <text:list-item>
              <text:p text:style-name="P17"><text:span text:style-name="T14">Compilador: transforma código de alto nível em linguagem de máquina (executável).</text:span></text:p>
            </text:list-item>
            <text:list-item>
              <text:p text:style-name="P17"><text:span text:style-name="T15">IDE</text:span><text:span text:style-name="T14"> = </text:span><text:span text:style-name="T15">Integrated Development Environment</text:span><text:span text:style-name="T14"> — junta editor, compilador e ferramentas num só lugar.</text:span></text:p>
            </text:list-item>
            <text:list-item>
              <text:p text:style-name="P17"><text:span text:style-name="T14">5) Resposta aberta: </text:span><text:span text:style-name="T15">NetBeans</text:span><text:span text:style-name="T14"> (</text:span><text:span text:style-name="T15">Apache</text:span><text:span text:style-name="T14">, foco </text:span><text:span text:style-name="T15">Java</text:span><text:span text:style-name="T14">), </text:span><text:span text:style-name="T15">Eclipse</text:span><text:span text:style-name="T14"> (leve, extensível) ou outra justificada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" draw:text-style-name="P5" draw:layer="layout" svg:width="25.399cm" svg:height="1.079cm" svg:x="0cm" svg:y="13.208cm">
          <text:p/>
          <draw:enhanced-geometry draw:mirror-horizontal="false" draw:mirror-vertical="false" svg:viewBox="0 0 9144000 388620" draw:type="ooxml-non-primitive" draw:enhanced-path="M"/>
        </draw:custom-shape>
        <draw:custom-shape draw:name="Text 4" draw:style-name="gr126" draw:text-style-name="P4" draw:layer="layout" svg:width="15.239cm" svg:height="1.079cm" svg:x="1.27cm" svg:y="13.208cm">
          <text:p text:style-name="P3"><text:span text:style-name="T10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7" draw:text-style-name="P12" draw:layer="layout" svg:width="2.539cm" svg:height="1.079cm" svg:x="21.59cm" svg:y="13.208cm">
          <text:p text:style-name="P11"><text:span text:style-name="T10">26 / 2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6" presentation:class="page"/>
          <draw:frame draw:name="Notes Placeholder 2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7" draw:style-name="dp1" draw:master-page-name="DEFAULT">
        <draw:custom-shape draw:name="Shape 0" draw:style-name="gr2" draw:text-style-name="P2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9" draw:text-style-name="P19" draw:layer="layout" svg:width="21.335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0.151cm" svg:height="3.301cm" svg:x="2.032cm" svg:y="1.0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8" draw:text-style-name="P27" draw:layer="layout" svg:width="19.557cm" svg:height="2.793cm" svg:x="3.048cm" svg:y="1.27cm">
          <text:p text:style-name="P26"><text:span text:style-name="T24">"Uma linguagem OO deve oferecer suporte a encapsulamento, herança e polimorfismo. A abstração vem pela criação de classes e troca de mensagens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9" draw:text-style-name="P4" draw:layer="layout" svg:width="21.335cm" svg:height="1.269cm" svg:x="2.032cm" svg:y="4.08cm">
          <text:p text:style-name="P3"><text:span text:style-name="T25">Pontos-chave da aul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0" draw:text-style-name="P29" draw:layer="layout" svg:width="21.335cm" svg:height="5.587cm" svg:x="2.032cm" svg:y="5.304cm">
          <text:list text:style-name="L10">
            <text:list-item>
              <text:p text:style-name="P28"><text:span text:style-name="T14">Linguagem OO deve suportar os 4 princípios — a maioria hoje é multi-paradigma;</text:span></text:p>
            </text:list-item>
            <text:list-item>
              <text:p text:style-name="P28"><text:span text:style-name="T14">A linguagem </text:span><text:span text:style-name="T15">C</text:span><text:span text:style-name="T14"> (estruturada) inspirou a sintaxe de </text:span><text:span text:style-name="T15">Java</text:span><text:span text:style-name="T14">, </text:span><text:span text:style-name="T15">C#</text:span><text:span text:style-name="T14">, </text:span><text:span text:style-name="T15">C++</text:span><text:span text:style-name="T14">;</text:span></text:p>
            </text:list-item>
            <text:list-item>
              <text:p text:style-name="P28"><text:span text:style-name="T14">Compilador transforma código de alto nível em linguagem de máquina;</text:span></text:p>
            </text:list-item>
            <text:list-item>
              <text:p text:style-name="P28"><text:span text:style-name="T15">IDE</text:span><text:span text:style-name="T14"> integra editor, compilador e ferramentas para agilizar o desenvolvimento;</text:span></text:p>
            </text:list-item>
            <text:list-item>
              <text:p text:style-name="P28"><text:span text:style-name="T15">NetBeans</text:span><text:span text:style-name="T14">, </text:span><text:span text:style-name="T15">Eclipse</text:span><text:span text:style-name="T14"> e </text:span><text:span text:style-name="T15">Visual Studio</text:span><text:span text:style-name="T14"> são as </text:span><text:span text:style-name="T15">IDE</text:span><text:span text:style-name="T14">s mais populares para </text:span><text:span text:style-name="T15">Java</text:span><text:span text:style-name="T14"> e </text:span><text:span text:style-name="T15">C#</text:span><text:span text:style-name="T14">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5" draw:layer="layout" svg:width="25.399cm" svg:height="1.587cm" svg:x="0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1" draw:text-style-name="P4" draw:layer="layout" svg:width="12.699cm" svg:height="1.587cm" svg:x="2.032cm" svg:y="12.7cm">
          <text:p text:style-name="P3"><text:span text:style-name="T26">Obrigado! Até a próxima aul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2" draw:text-style-name="P12" draw:layer="layout" svg:width="10.159cm" svg:height="1.587cm" svg:x="13.97cm" svg:y="12.7cm">
          <text:p text:style-name="P11"><text:span text:style-name="T27">UNISA — Programação Orientada a Obje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7" presentation:class="page"/>
          <draw:frame draw:name="Notes Placeholder 2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M Roman Unslanted 10" svg:font-family="'LM Roman Unslanted 10'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rogramação Orientada a Objetos — Aula 4</dc:title>
    <dc:subject>PptxGenJS Presentation</dc:subject>
    <meta:initial-creator>UNISA</meta:initial-creator>
    <meta:editing-cycles>16</meta:editing-cycles>
    <meta:creation-date>2026-03-14T05:40:39</meta:creation-date>
    <dc:date>2026-05-14T02:48:58.071160053</dc:date>
    <meta:editing-duration>PT23M58S</meta:editing-duration>
    <meta:generator>LibreOffice/25.8.1.1$Linux_X86_64 LibreOffice_project/54047653041915e595ad4e45cccea684809c77b5</meta:generator>
    <meta:document-statistic meta:object-count="326"/>
    <meta:user-defined meta:name="AppVersion">16.0000</meta:user-defined>
    <meta:user-defined meta:name="Company">PptxGenJS</meta:user-defined>
    <meta:user-defined meta:name="Notes" meta:value-type="float">27</meta:user-defined>
    <meta:user-defined meta:name="PresentationFormat">On-screen Show (16:9)</meta:user-defined>
    <meta:user-defined meta:name="Slides" meta:value-type="float">27</meta:user-defined>
  </office:meta>
</office:document-meta>
</file>