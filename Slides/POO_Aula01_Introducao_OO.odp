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00000010004D5499C.png" manifest:media-type="image/png"/>
  <manifest:file-entry manifest:full-path="Pictures/100000010000010000000100309B811F.png" manifest:media-type="image/png"/>
  <manifest:file-entry manifest:full-path="Pictures/1000000100000100000001002D65918A.png" manifest:media-type="image/png"/>
  <manifest:file-entry manifest:full-path="Pictures/100000010000010000000100F5A393F9.png" manifest:media-type="image/png"/>
  <manifest:file-entry manifest:full-path="Pictures/1000000100000100000001006465D30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 style:font-family-generic="swiss" style:font-pitch="variable"/>
    <style:font-face style:name="Calibri1" svg:font-family="Calibri"/>
    <style:font-face style:name="Calibri2" svg:font-family="Calibri" style:font-family-generic="modern" style:font-pitch="fixed"/>
    <style:font-face style:name="DejaVu Sans" svg:font-family="'DejaVu Sans'" style:font-family-generic="system" style:font-pitch="variable"/>
    <style:font-face style:name="Georgia" svg:font-family="Georgia" style:font-family-generic="swiss" style:font-pitch="variable"/>
    <style:font-face style:name="Georgia1" svg:font-family="Georgia" style:font-family-generic="modern" style:font-pitch="fixed"/>
    <style:font-face style:name="LM Mono Caps 10" svg:font-family="'LM Mono Caps 10'" style:font-pitch="variable"/>
    <style:font-face style:name="LM Mono Prop 10" svg:font-family="'LM Mono Prop 10'" style:font-pitch="variable"/>
    <style:font-face style:name="LM Roman Unslanted 10" svg:font-family="'LM Roman Unslanted 10'" style:font-pitch="variable"/>
    <style:font-face style:name="LM Sans Quot 8" svg:font-family="'LM Sans Quot 8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buntu Sans Mono" svg:font-family="'Ubuntu Sans Mono'" style:font-adornments="Light" style:font-family-generic="swiss" style:font-pitch="fixed"/>
    <style:font-face style:name="Ubuntu Sans Mono1" svg:font-family="'Ubuntu Sans Mono'" style:font-family-generic="swiss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f1b2d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2ec4b6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" style:family="graphic" style:parent-style-name="standard">
      <style:graphic-properties draw:stroke="none" svg:stroke-width="0cm" draw:fill="solid" draw:fill-color="#d4a843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width="0cm" draw:fill="solid" draw:fill-color="#1a294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width="0cm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svg:stroke-width="0cm" draw:fill="solid" draw:fill-color="#243652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svg:stroke-width="0cm" draw:fill="solid" draw:fill-color="#162236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5cm" draw:shadow-offset-y="0.05cm" draw:shadow-color="#000000" draw:shadow-opacity="20%" loext:shadow-blur="0.141cm" loext:decorative="false"/>
    </style:style>
    <style:style style:name="gr41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942cm" fo:min-width="19.8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7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1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5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3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7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1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5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9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7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1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5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3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8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2ec4b6"/>
      <style:paragraph-properties fo:text-align="start"/>
      <style:text-properties fo:font-size="18pt"/>
    </style:style>
    <style:style style:name="P2" style:family="paragraph">
      <loext:graphic-properties draw:fill="solid" draw:fill-color="#d4a843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loext:graphic-properties draw:fill="solid" draw:fill-color="#1a2940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loext:graphic-properties draw:fill="solid" draw:fill-color="#243652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.282cm" fo:line-height="150%" fo:text-align="justify" fo:text-indent="0cm" style:punctuation-wrap="hanging" loext:tab-stop-distance="2.54cm" style:writing-mode="lr-tb">
        <style:tab-stops/>
      </style:paragraph-properties>
      <style:text-properties style:font-name="LM Sans Quot 8" fo:font-size="18pt" fo:hyphenate="false"/>
    </style:style>
    <style:style style:name="P16" style:family="paragraph">
      <loext:graphic-properties draw:fill="none"/>
      <style:paragraph-properties fo:margin-left="0cm" fo:margin-right="0cm" fo:margin-top="0cm" fo:margin-bottom="0.282cm" fo:line-height="150%" fo:text-align="justify" fo:text-indent="0cm" style:punctuation-wrap="hanging" loext:tab-stop-distance="2.54cm" style:writing-mode="lr-tb" style:font-independent-line-spacing="true">
        <style:tab-stops/>
      </style:paragraph-properties>
      <style:text-properties style:font-name="LM Sans Quot 8" fo:font-size="18pt" fo:hyphenate="false"/>
    </style:style>
    <style:style style:name="P17" style:family="paragraph">
      <loext:graphic-properties draw:fill="solid" draw:fill-color="#162236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cm" fo:margin-bottom="0.282cm" fo:line-height="150%" fo:text-align="start" fo:text-indent="0cm" style:punctuation-wrap="hanging" loext:tab-stop-distance="2.54cm" style:writing-mode="lr-tb">
        <style:tab-stops/>
      </style:paragraph-properties>
      <style:text-properties style:font-name="LM Sans Quot 8" fo:font-size="18pt" fo:hyphenate="false"/>
    </style:style>
    <style:style style:name="P19" style:family="paragraph">
      <loext:graphic-properties draw:fill="none"/>
      <style:paragraph-properties fo:margin-left="0cm" fo:margin-right="0cm" fo:margin-top="0cm" fo:margin-bottom="0.282cm" fo:line-height="150%" fo:text-align="start" fo:text-indent="0cm" style:punctuation-wrap="hanging" loext:tab-stop-distance="2.54cm" style:writing-mode="lr-tb" style:font-independent-line-spacing="true">
        <style:tab-stops/>
      </style:paragraph-properties>
      <style:text-properties style:font-name="LM Sans Quot 8" fo:font-size="18pt" fo:hyphenate="false"/>
    </style:style>
    <style:style style:name="P20" style:family="paragraph">
      <style:paragraph-properties fo:margin-left="0cm" fo:margin-right="0cm" fo:margin-top="0cm" fo:margin-bottom="0.282cm" fo:line-height="150%" fo:text-align="justify" fo:text-indent="0cm" style:punctuation-wrap="hanging" loext:tab-stop-distance="2.54cm" style:writing-mode="lr-tb">
        <style:tab-stops/>
      </style:paragraph-properties>
      <style:text-properties style:font-name="LM Sans Quot 8" fo:font-size="14pt" style:font-size-asian="14pt" style:font-size-complex="14pt" fo:hyphenate="false"/>
    </style:style>
    <style:style style:name="P21" style:family="paragraph">
      <loext:graphic-properties draw:fill="none"/>
      <style:paragraph-properties fo:margin-left="0cm" fo:margin-right="0cm" fo:margin-top="0cm" fo:margin-bottom="0.282cm" fo:line-height="150%" fo:text-align="justify" fo:text-indent="0cm" style:punctuation-wrap="hanging" loext:tab-stop-distance="2.54cm" style:writing-mode="lr-tb" style:font-independent-line-spacing="true">
        <style:tab-stops/>
      </style:paragraph-properties>
      <style:text-properties style:font-name="LM Sans Quot 8" fo:font-size="14pt" style:font-size-asian="14pt" style:font-size-complex="14pt"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LM Roman Unslanted 10" fo:font-size="18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LM Roman Unslanted 10" fo:font-size="18pt" fo:hyphenate="false"/>
    </style:style>
    <style:style style:name="P24" style:family="paragraph">
      <style:paragraph-properties fo:margin-left="0cm" fo:margin-right="0cm" fo:margin-top="0cm" fo:margin-bottom="0.212cm" fo:line-height="150%" fo:text-align="justify" fo:text-indent="0cm" style:punctuation-wrap="hanging" loext:tab-stop-distance="2.54cm" style:writing-mode="lr-tb">
        <style:tab-stops/>
      </style:paragraph-properties>
      <style:text-properties style:font-name="LM Sans Quot 8" fo:font-size="18pt" fo:hyphenate="false"/>
    </style:style>
    <style:style style:name="P25" style:family="paragraph">
      <loext:graphic-properties draw:fill="none"/>
      <style:paragraph-properties fo:margin-left="0cm" fo:margin-right="0cm" fo:margin-top="0cm" fo:margin-bottom="0.212cm" fo:line-height="150%" fo:text-align="justify" fo:text-indent="0cm" style:punctuation-wrap="hanging" loext:tab-stop-distance="2.54cm" style:writing-mode="lr-tb" style:font-independent-line-spacing="true">
        <style:tab-stops/>
      </style:paragraph-properties>
      <style:text-properties style:font-name="LM Sans Quot 8" fo:font-size="18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36pt" fo:letter-spacing="normal" fo:language="en" fo:country="US" fo:font-style="normal" style:text-underline-style="none" fo:font-weight="bold" fo:background-color="transparent" style:font-name-asian="Georgia1" style:font-size-asian="36pt" style:font-style-asian="normal" style:font-weight-asian="bold" style:font-name-complex="Georgia" style:font-size-complex="36pt" style:font-style-complex="normal" style:font-weight-complex="bold"/>
    </style:style>
    <style:style style:name="T2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Calibri2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3" style:family="text">
      <style:text-properties fo:font-variant="normal" fo:text-transform="none" fo:color="#d4a843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name-asian="Calibri2" style:font-size-asian="16pt" style:font-style-asian="normal" style:font-weight-asian="bold" style:font-name-complex="Calibri" style:font-size-complex="16pt" style:font-style-complex="normal" style:font-weight-complex="bold"/>
    </style:style>
    <style:style style:name="T4" style:family="text">
      <style:text-properties fo:font-variant="normal" fo:text-transform="none" fo:color="#a8b8c8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26pt" fo:letter-spacing="normal" fo:language="en" fo:country="US" fo:font-style="normal" style:text-underline-style="none" fo:font-weight="bold" fo:background-color="transparent" style:font-name-asian="Georgia1" style:font-size-asian="26pt" style:font-style-asian="normal" style:font-weight-asian="bold" style:font-name-complex="Georgia" style:font-size-complex="26pt" style:font-style-complex="normal" style:font-weight-complex="bold"/>
    </style:style>
    <style:style style:name="T7" style:family="text">
      <style:text-properties fo:font-variant="normal" fo:text-transform="none" fo:color="#0f1b2d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name-asian="Calibri2" style:font-size-asian="14pt" style:font-style-asian="normal" style:font-weight-asian="bold" style:font-name-complex="Calibri" style:font-size-complex="14pt" style:font-style-complex="normal" style:font-weight-complex="bold"/>
    </style:style>
    <style:style style:name="T8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name-asian="Calibri2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T9" style:family="text">
      <style:text-properties fo:font-variant="normal" fo:text-transform="none" fo:color="#d4a843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name-asian="Calibri2" style:font-size-asian="15pt" style:font-style-asian="normal" style:font-weight-asian="bold" style:font-name-complex="Calibri" style:font-size-complex="15pt" style:font-style-complex="normal" style:font-weight-complex="bold"/>
    </style:style>
    <style:style style:name="T10" style:family="text">
      <style:text-properties fo:font-variant="normal" fo:text-transform="none" fo:color="#8899aa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name-asian="Calibri2" style:font-size-asian="8pt" style:font-style-asian="normal" style:font-weight-asian="normal" style:font-name-complex="Calibri" style:font-size-complex="8pt" style:font-style-complex="normal" style:font-weight-complex="normal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32pt" fo:letter-spacing="normal" fo:language="en" fo:country="US" fo:font-style="normal" style:text-underline-style="none" fo:font-weight="bold" fo:background-color="transparent" style:font-name-asian="Georgia1" style:font-size-asian="32pt" style:font-style-asian="normal" style:font-weight-asian="bold" style:font-name-complex="Georgia" style:font-size-complex="32pt" style:font-style-complex="normal" style:font-weight-complex="bold"/>
    </style:style>
    <style:style style:name="T12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Calibri" fo:font-size="16pt" fo:letter-spacing="normal" fo:language="en" fo:country="US" fo:font-style="italic" style:text-underline-style="none" fo:font-weight="normal" fo:background-color="transparent" style:font-name-asian="Calibri2" style:font-size-asian="16pt" style:font-style-asian="italic" style:font-weight-asian="normal" style:font-name-complex="Calibri" style:font-size-complex="16pt" style:font-style-complex="italic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22pt" fo:letter-spacing="normal" fo:language="en" fo:country="US" fo:font-style="normal" style:text-underline-style="none" fo:font-weight="bold" fo:background-color="transparent" style:font-name-asian="Georgia1" style:font-size-asian="22pt" style:font-style-asian="normal" style:font-weight-asian="bold" style:font-name-complex="Georgia" style:font-size-complex="22pt" style:font-style-complex="normal" style:font-weight-complex="bold"/>
    </style:style>
    <style:style style:name="T14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Sans Quot 8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5" style:family="text">
      <style:text-properties fo:font-variant="normal" fo:text-transform="none" fo:color="#d4a843" loext:opacity="100%" style:text-outline="false" style:text-line-through-style="none" style:text-line-through-type="none" style:text-position="0% 100%" style:font-name="Georgia" fo:font-size="24pt" fo:letter-spacing="normal" fo:language="en" fo:country="US" fo:font-style="normal" style:text-underline-style="none" fo:font-weight="bold" fo:background-color="transparent" style:font-name-asian="Georgia1" style:font-size-asian="24pt" style:font-style-asian="normal" style:font-weight-asian="bold" style:font-name-complex="Georgia" style:font-size-complex="24pt" style:font-style-complex="normal" style:font-weight-complex="bold"/>
    </style:style>
    <style:style style:name="T16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Georgia" fo:font-size="24pt" fo:letter-spacing="normal" fo:language="en" fo:country="US" fo:font-style="normal" style:text-underline-style="none" fo:font-weight="bold" fo:background-color="transparent" style:font-name-asian="Georgia1" style:font-size-asian="24pt" style:font-style-asian="normal" style:font-weight-asian="bold" style:font-name-complex="Georgia" style:font-size-complex="24pt" style:font-style-complex="normal" style:font-weight-complex="bold"/>
    </style:style>
    <style:style style:name="T17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Sans Quot 8" fo:font-size="13pt" fo:letter-spacing="normal" fo:language="en" fo:country="US" fo:font-style="normal" style:text-underline-style="none" fo:font-weight="normal" fo:background-color="transparent" style:font-name-asian="Calibri2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18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Ubuntu Sans Mono1" fo:font-size="13pt" fo:letter-spacing="normal" fo:language="en" fo:country="US" fo:font-style="normal" style:text-underline-style="none" fo:font-weight="normal" fo:background-color="transparent" style:font-name-asian="Calibri2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19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Mono Prop 10" fo:font-size="13pt" fo:letter-spacing="normal" fo:language="en" fo:country="US" fo:font-style="normal" style:text-underline-style="none" fo:font-weight="normal" fo:background-color="transparent" style:font-name-asian="Calibri2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20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Mono Caps 10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21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Ubuntu Sans Mono1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22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Mono Prop 10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23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Sans Quot 8" fo:font-size="14pt" fo:letter-spacing="normal" fo:language="en" fo:country="US" fo:font-style="normal" style:text-underline-style="none" fo:font-weight="bold" fo:background-color="transparent" style:font-name-asian="Calibri2" style:font-size-asian="14pt" style:font-style-asian="normal" style:font-weight-asian="bold" style:font-name-complex="Calibri" style:font-size-complex="14pt" style:font-style-complex="normal" style:font-weight-complex="bold"/>
    </style:style>
    <style:style style:name="T24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Ubuntu Sans Mono1" fo:font-size="14pt" fo:letter-spacing="normal" fo:language="en" fo:country="US" fo:font-style="normal" style:text-underline-style="none" fo:font-weight="bold" fo:background-color="transparent" style:font-name-asian="Calibri2" style:font-size-asian="14pt" style:font-style-asian="normal" style:font-weight-asian="bold" style:font-name-complex="Calibri" style:font-size-complex="14pt" style:font-style-complex="normal" style:font-weight-complex="bold"/>
    </style:style>
    <style:style style:name="T25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Roman Unslanted 10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26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Sans Quot 8" fo:font-size="14pt" fo:letter-spacing="normal" fo:language="en" fo:country="US" fo:font-style="normal" fo:text-shadow="none" style:text-underline-style="none" fo:font-weight="bold" style:letter-kerning="true" fo:background-color="transparent" style:font-name-asian="Calibri2" style:font-size-asian="14pt" style:font-style-asian="normal" style:font-weight-asian="bold" style:font-name-complex="Calibri" style:font-size-complex="1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Sans Quot 8" fo:font-size="14pt" fo:letter-spacing="normal" fo:language="en" fo:country="US" fo:font-style="normal" fo:text-shadow="none" style:text-underline-style="none" fo:font-weight="normal" style:letter-kerning="true" fo:background-color="transparent" style:font-name-asian="Calibri2" style:font-size-asian="14pt" style:font-style-asian="normal" style:font-weight-asian="normal" style:font-name-complex="Calib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Mono Prop 10" fo:font-size="14pt" fo:letter-spacing="normal" fo:language="en" fo:country="US" fo:font-style="normal" fo:text-shadow="none" style:text-underline-style="none" fo:font-weight="normal" style:letter-kerning="true" fo:background-color="transparent" style:font-name-asian="Calibri2" style:font-size-asian="14pt" style:font-style-asian="normal" style:font-weight-asian="normal" style:font-name-complex="Calib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Sans Quot 8" fo:font-size="14pt" fo:letter-spacing="normal" fo:language="en" fo:country="US" fo:font-style="italic" style:text-underline-style="none" fo:font-weight="normal" fo:background-color="transparent" style:font-name-asian="Calibri2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T30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Ubuntu Sans Mono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31" style:family="text">
      <style:text-properties fo:font-variant="normal" fo:text-transform="none" fo:color="#d4a843" loext:opacity="100%" style:text-outline="false" style:text-line-through-style="none" style:text-line-through-type="none" style:text-position="0% 100%" style:font-name="LM Roman Unslanted 10" fo:font-size="14pt" fo:letter-spacing="normal" fo:language="en" fo:country="US" fo:font-style="italic" style:text-underline-style="none" fo:font-weight="normal" fo:background-color="transparent" style:font-name-asian="Georgia1" style:font-size-asian="14pt" style:font-style-asian="italic" style:font-weight-asian="normal" style:font-name-complex="Georgia" style:font-size-complex="14pt" style:font-style-complex="italic" style:font-weight-complex="normal"/>
    </style:style>
    <style:style style:name="T32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Georgia" fo:font-size="20pt" fo:letter-spacing="normal" fo:language="en" fo:country="US" fo:font-style="normal" style:text-underline-style="none" fo:font-weight="bold" fo:background-color="transparent" style:font-name-asian="Georgia1" style:font-size-asian="20pt" style:font-style-asian="normal" style:font-weight-asian="bold" style:font-name-complex="Georgia" style:font-size-complex="20pt" style:font-style-complex="normal" style:font-weight-complex="bold"/>
    </style:style>
    <style:style style:name="T33" style:family="text">
      <style:text-properties fo:font-variant="normal" fo:text-transform="none" fo:color="#d4a843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name-asian="Calibri2" style:font-size-asian="12pt" style:font-style-asian="normal" style:font-weight-asian="bold" style:font-name-complex="Calibri" style:font-size-complex="12pt" style:font-style-complex="normal" style:font-weight-complex="bold"/>
    </style:style>
    <style:style style:name="T34" style:family="text">
      <style:text-properties fo:font-variant="normal" fo:text-transform="none" fo:color="#8899aa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name-asian="Calibri2" style:font-size-asian="9pt" style:font-style-asian="normal" style:font-weight-asian="normal" style:font-name-complex="Calibri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ec4b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d4a8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a8b8c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f1b2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cbd5e1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8899a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953cm"/>
        <style:text-properties fo:font-family="OpenSymbol" fo:color="#cbd5e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Shape 0" draw:style-name="gr1" draw:text-style-name="P1" draw:layer="layout" svg:width="0.304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" draw:text-style-name="P2" draw:layer="layout" svg:width="25.399cm" svg:height="0.101cm" svg:x="0cm" svg:y="9.65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" draw:text-style-name="P4" draw:layer="layout" svg:width="21.589cm" svg:height="2.539cm" svg:x="2.032cm" svg:y="2.54cm">
          <text:p text:style-name="P3"><text:span text:style-name="T1">Programação Orientada a </text:span><text:span text:style-name="T1">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4" draw:text-style-name="P4" draw:layer="layout" svg:width="21.589cm" svg:height="1.523cm" svg:x="2.032cm" svg:y="5.334cm">
          <text:p text:style-name="P3"><text:span text:style-name="T2">C</text:span><text:span text:style-name="T2">a</text:span><text:span text:style-name="T2">pí</text:span><text:span text:style-name="T2">tu</text:span><text:span text:style-name="T2">lo </text:span><text:span text:style-name="T2">1 </text:span><text:span text:style-name="T2">—</text:span><text:span text:style-name="T2"> </text:span><text:span text:style-name="T2">In</text:span><text:span text:style-name="T2">tr</text:span><text:span text:style-name="T2">o</text:span><text:span text:style-name="T2">d</text:span><text:span text:style-name="T2">u</text:span><text:span text:style-name="T2">çã</text:span><text:span text:style-name="T2">o </text:span><text:span text:style-name="T2">à </text:span><text:span text:style-name="T2">O</text:span><text:span text:style-name="T2">ri</text:span><text:span text:style-name="T2">e</text:span><text:span text:style-name="T2">nt</text:span><text:span text:style-name="T2">aç</text:span><text:span text:style-name="T2">ã</text:span><text:span text:style-name="T2">o </text:span><text:span text:style-name="T2">a </text:span><text:span text:style-name="T2">O</text:span><text:span text:style-name="T2">bj</text:span><text:span text:style-name="T2">et</text:span><text:span text:style-name="T2">o</text:span><text:span text:style-name="T2">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" draw:text-style-name="P4" draw:layer="layout" svg:width="21.589cm" svg:height="1.269cm" svg:x="2.032cm" svg:y="7.239cm">
          <text:p text:style-name="P3"><text:span text:style-name="T3">Aula 0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" draw:text-style-name="P5" draw:layer="layout" svg:width="25.399cm" svg:height="1.587cm" svg:x="0cm" svg:y="12.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" draw:text-style-name="P4" draw:layer="layout" svg:width="21.589cm" svg:height="1.587cm" svg:x="2.032cm" svg:y="12.7cm">
          <text:p text:style-name="P3"><text:span text:style-name="T4">Universidade Santa Amaro — UNIS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" presentation:class="page"/>
          <draw:frame draw:name="Notes Placeholder 2" presentation:style-name="pr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2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9" draw:text-style-name="P4" draw:layer="layout" svg:width="22.351cm" svg:height="2.031cm" svg:x="1.524cm" svg:y="0.127cm">
          <text:p text:style-name="P3"><text:span text:style-name="T6">O que veremos hoje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" draw:text-style-name="P1" draw:layer="layout" svg:width="1.066cm" svg:height="1.066cm" svg:x="2.032cm" svg:y="3.048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4" draw:style-name="gr10" draw:text-style-name="P10" draw:layer="layout" svg:width="1.066cm" svg:height="1.066cm" svg:x="2.032cm" svg:y="3.048cm">
          <text:p text:style-name="P9"><text:span text:style-name="T7">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1" draw:text-style-name="P4" draw:layer="layout" svg:width="19.811cm" svg:height="1.066cm" svg:x="3.683cm" svg:y="3.048cm">
          <text:p text:style-name="P3"><text:span text:style-name="T8">Conceitos introdutórios da Orientação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" draw:text-style-name="P1" draw:layer="layout" svg:width="1.066cm" svg:height="1.066cm" svg:x="2.032cm" svg:y="4.623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7" draw:style-name="gr12" draw:text-style-name="P10" draw:layer="layout" svg:width="1.066cm" svg:height="1.066cm" svg:x="2.032cm" svg:y="4.623cm">
          <text:p text:style-name="P9"><text:span text:style-name="T7">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3" draw:text-style-name="P4" draw:layer="layout" svg:width="19.811cm" svg:height="1.066cm" svg:x="3.683cm" svg:y="4.623cm">
          <text:p text:style-name="P3"><text:span text:style-name="T8">Definição de Orientação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" draw:text-style-name="P1" draw:layer="layout" svg:width="1.066cm" svg:height="1.066cm" svg:x="2.032cm" svg:y="6.198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14" draw:text-style-name="P10" draw:layer="layout" svg:width="1.066cm" svg:height="1.066cm" svg:x="2.032cm" svg:y="6.198cm">
          <text:p text:style-name="P9"><text:span text:style-name="T7">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5" draw:text-style-name="P4" draw:layer="layout" svg:width="19.811cm" svg:height="1.066cm" svg:x="3.683cm" svg:y="6.198cm">
          <text:p text:style-name="P3"><text:span text:style-name="T8">Classes: superclasses, subclasses, abstratas e concret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" draw:text-style-name="P1" draw:layer="layout" svg:width="1.066cm" svg:height="1.066cm" svg:x="2.032cm" svg:y="7.77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3" draw:style-name="gr16" draw:text-style-name="P10" draw:layer="layout" svg:width="1.066cm" svg:height="1.066cm" svg:x="2.032cm" svg:y="7.772cm">
          <text:p text:style-name="P9"><text:span text:style-name="T7">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7" draw:text-style-name="P4" draw:layer="layout" svg:width="19.811cm" svg:height="1.066cm" svg:x="3.683cm" svg:y="7.772cm">
          <text:p text:style-name="P3"><text:span text:style-name="T8">Objetos: instâncias, atributos e métod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" draw:text-style-name="P1" draw:layer="layout" svg:width="1.066cm" svg:height="1.066cm" svg:x="2.032cm" svg:y="9.347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6" draw:style-name="gr18" draw:text-style-name="P10" draw:layer="layout" svg:width="1.066cm" svg:height="1.066cm" svg:x="2.032cm" svg:y="9.347cm">
          <text:p text:style-name="P9"><text:span text:style-name="T7">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9" draw:text-style-name="P4" draw:layer="layout" svg:width="19.811cm" svg:height="1.066cm" svg:x="3.683cm" svg:y="9.347cm">
          <text:p text:style-name="P3"><text:span text:style-name="T8">Mensagens e troca de informações entre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2" draw:text-style-name="P2" draw:layer="layout" svg:width="1.066cm" svg:height="1.066cm" svg:x="2.032cm" svg:y="10.92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9" draw:style-name="gr20" draw:text-style-name="P10" draw:layer="layout" svg:width="1.066cm" svg:height="1.066cm" svg:x="2.032cm" svg:y="10.922cm">
          <text:p text:style-name="P9"><text:span text:style-name="T7">6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21" draw:text-style-name="P4" draw:layer="layout" svg:width="19.811cm" svg:height="1.066cm" svg:x="3.683cm" svg:y="10.922cm">
          <text:p text:style-name="P3"><text:span text:style-name="T9">Dinâmicas &amp; Atividades prátic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22" draw:text-style-name="P11" draw:layer="layout" svg:width="2.539cm" svg:height="2.539cm" svg:x="2.54cm" svg:y="2.5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23" draw:style-name="gr23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24" draw:text-style-name="P13" draw:layer="layout" svg:width="2.539cm" svg:height="1.079cm" svg:x="21.59cm" svg:y="13.208cm">
          <text:p text:style-name="P12"><text:span text:style-name="T10">2 / 2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" presentation:class="page"/>
          <draw:frame draw:name="Notes Placeholder 2" presentation:style-name="pr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3" draw:style-name="dp1" draw:master-page-name="DEFAULT">
        <draw:custom-shape draw:name="Shape 0" draw:style-name="gr1" draw:text-style-name="P1" draw:layer="layout" svg:width="0.202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5" draw:text-style-name="P14" draw:layer="layout" svg:width="2.539cm" svg:height="2.539cm" svg:x="1.524cm" svg:y="4.57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26" draw:text-style-name="P11" draw:layer="layout" svg:width="1.421cm" svg:height="1.421cm" svg:x="2.083cm" svg:y="5.131cm">
          <draw:image xlink:href="Pictures/1000000100000100000001006465D30D.png" xlink:type="simple" xlink:show="embed" xlink:actuate="onLoad" draw:mime-type="image/png">
            <text:p/>
          </draw:image>
          <svg:desc>preencoded.png</svg:desc>
        </draw:frame>
        <draw:custom-shape draw:name="Text 2" draw:style-name="gr27" draw:text-style-name="P4" draw:layer="layout" svg:width="18.287cm" svg:height="1.777cm" svg:x="5.08cm" svg:y="4.064cm">
          <text:p text:style-name="P3"><text:span text:style-name="T11">1.1 Conceitos Introdutóri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8" draw:text-style-name="P4" draw:layer="layout" svg:width="18.287cm" svg:height="1.523cm" svg:x="5.08cm" svg:y="6.096cm">
          <text:p text:style-name="P3"><text:span text:style-name="T12">Origens e evolução do paradigma de O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22" draw:text-style-name="P11" draw:layer="layout" svg:width="2.539cm" svg:height="2.539cm" svg:x="2.54cm" svg:y="2.5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6" draw:style-name="gr29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0" draw:text-style-name="P13" draw:layer="layout" svg:width="2.539cm" svg:height="1.079cm" svg:x="21.59cm" svg:y="13.208cm">
          <text:p text:style-name="P12"><text:span text:style-name="T10">3 / 2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3" presentation:class="page"/>
          <draw:frame draw:name="Notes Placeholder 2" presentation:style-name="pr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4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1" draw:text-style-name="P4" draw:layer="layout" svg:width="22.351cm" svg:height="2.031cm" svg:x="1.524cm" svg:y="0.127cm">
          <text:p text:style-name="P3"><text:span text:style-name="T13">O começo: décadas de 1950–196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2" draw:text-style-name="P16" draw:layer="layout" svg:width="21.335cm" svg:height="9.651cm" svg:x="2.032cm" svg:y="3.048cm">
          <text:list text:style-name="L10">
            <text:list-item>
              <text:p text:style-name="P15"><text:span text:style-name="T14">Nas décadas de 1950 e 1960, operar e programar computadores exigia formação especializada em computação;</text:span></text:p>
            </text:list-item>
            <text:list-item>
              <text:p text:style-name="P15"><text:span text:style-name="T14">Programação inicial baseava-se em código binário e endereçamento direto de memória;</text:span></text:p>
            </text:list-item>
            <text:list-item>
              <text:p text:style-name="P15"><text:span text:style-name="T14">Com a evolução, surgiram linguagens de alto nível, mais próximas da comunicação humana;</text:span></text:p>
            </text:list-item>
            <text:list-item>
              <text:p text:style-name="P15"><text:span text:style-name="T14">Computadores ficaram menores, mais baratos e acessíveis a públicos diversificados;</text:span></text:p>
            </text:list-item>
            <text:list-item>
              <text:p text:style-name="P15"><text:span text:style-name="T14">Os paradigmas de programação passaram a buscar maior semelhança com o mundo real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22" draw:text-style-name="P11" draw:layer="layout" svg:width="2.539cm" svg:height="2.539cm" svg:x="2.54cm" svg:y="2.5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6" draw:style-name="gr33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4" draw:text-style-name="P13" draw:layer="layout" svg:width="2.539cm" svg:height="1.079cm" svg:x="21.59cm" svg:y="13.208cm">
          <text:p text:style-name="P12"><text:span text:style-name="T10">4 / 2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4" presentation:class="page"/>
          <draw:frame draw:name="Notes Placeholder 2" presentation:style-name="pr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5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5" draw:text-style-name="P4" draw:layer="layout" svg:width="22.351cm" svg:height="2.031cm" svg:x="1.524cm" svg:y="0.127cm">
          <text:p text:style-name="P3"><text:span text:style-name="T13">Por que surge a Orientação a Objetos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6" draw:text-style-name="P16" draw:layer="layout" svg:width="21.335cm" svg:height="9.651cm" svg:x="2.032cm" svg:y="3.048cm">
          <text:list text:style-name="L10">
            <text:list-item>
              <text:p text:style-name="P15"><text:span text:style-name="T14">Necessidade corporativa: programação deve atender processos de negócio reais;</text:span></text:p>
            </text:list-item>
            <text:list-item>
              <text:p text:style-name="P15"><text:span text:style-name="T14">Objetivo principal: modelar problemas usando abstração de objetos do mundo real;</text:span></text:p>
            </text:list-item>
            <text:list-item>
              <text:p text:style-name="P15"><text:span text:style-name="T14">Identificar características (atributos) e funcionalidades (métodos) reais de cada entidade;</text:span></text:p>
            </text:list-item>
            <text:list-item>
              <text:p text:style-name="P15"><text:span text:style-name="T14">Facilitar a compreensão dos programadores sobre o processo de negócio, não apenas requisitos técnicos;</text:span></text:p>
            </text:list-item>
            <text:list-item>
              <text:p text:style-name="P15"><text:span text:style-name="T14">Resultado: metodologias mais rápidas, dinâmicas e compreensíveis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22" draw:text-style-name="P11" draw:layer="layout" svg:width="2.539cm" svg:height="2.539cm" svg:x="2.54cm" svg:y="2.5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6" draw:style-name="gr37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8" draw:text-style-name="P13" draw:layer="layout" svg:width="2.539cm" svg:height="1.079cm" svg:x="21.59cm" svg:y="13.208cm">
          <text:p text:style-name="P12"><text:span text:style-name="T10">5 / 2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5" presentation:class="page"/>
          <draw:frame draw:name="Notes Placeholder 2" presentation:style-name="pr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6" draw:style-name="dp1" draw:master-page-name="DEFAULT">
        <draw:custom-shape draw:name="Shape 0" draw:style-name="gr2" draw:text-style-name="P2" draw:layer="layout" svg:width="25.399cm" svg:height="0.151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9" draw:text-style-name="P4" draw:layer="layout" svg:width="22.351cm" svg:height="1.777cm" svg:x="1.524cm" svg:y="0.762cm">
          <text:p text:style-name="P3"><text:span text:style-name="T15">Dinâmica 1 — Antes vs. Depois da O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40" draw:text-style-name="P17" draw:layer="layout" svg:width="22.351cm" svg:height="9.143cm" svg:x="1.524cm" svg:y="3.04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" draw:text-style-name="P1" draw:layer="layout" svg:width="0.151cm" svg:height="9.143cm" svg:x="1.524cm" svg:y="3.04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1" draw:text-style-name="P16" draw:layer="layout" svg:width="20.319cm" svg:height="9.191cm" svg:x="2.54cm" svg:y="3cm">
          <text:list text:style-name="L10">
            <text:list-item>
              <text:p text:style-name="P15"><text:span text:style-name="T14">Em duplas, discutam o cenário abaixo (5 minutos):</text:span></text:p>
              <text:list>
                <text:list-item>
                  <text:p text:style-name="P15"><text:span text:style-name="T14">Imagine que vocês são programadores nos anos 1960. O chefe pede um sistema para controlar estoque de uma loja;</text:span></text:p>
                </text:list-item>
                <text:list-item>
                  <text:p text:style-name="P15"><text:span text:style-name="T14">Como seria modelar esse problema em código binário/sequencial?</text:span></text:p>
                </text:list-item>
              </text:list>
            </text:list-item>
            <text:list-item>
              <text:p text:style-name="P15"><text:span text:style-name="T14">Agora, pensem no mesmo problema com orientação a objetos: quais 'objetos' da loja vocês usariam?</text:span></text:p>
              <text:list>
                <text:list-item>
                  <text:p text:style-name="P15"><text:span text:style-name="T14">Listem pelo menos 3 objetos e 2 características de cada um;</text:span></text:p>
                </text:list-item>
                <text:list-item>
                  <text:p text:style-name="P15"><text:span text:style-name="T14">Compartilhem as respostas com a turma!</text:span></text:p>
                </text:list-item>
              </text:list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2" draw:text-style-name="P11" draw:layer="layout" svg:width="2.539cm" svg:height="2.539cm" svg:x="2.54cm" svg:y="2.5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7" draw:style-name="gr42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3" draw:text-style-name="P13" draw:layer="layout" svg:width="2.539cm" svg:height="1.079cm" svg:x="21.59cm" svg:y="13.208cm">
          <text:p text:style-name="P12"><text:span text:style-name="T10">6 / 2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6" presentation:class="page"/>
          <draw:frame draw:name="Notes Placeholder 2" presentation:style-name="pr7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7" draw:style-name="dp1" draw:master-page-name="DEFAULT"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4" draw:text-style-name="P4" draw:layer="layout" svg:width="22.351cm" svg:height="1.777cm" svg:x="1.524cm" svg:y="0.762cm">
          <text:p text:style-name="P3"><text:span text:style-name="T16">Respostas possíveis — Dinâmica 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5" draw:text-style-name="P19" draw:layer="layout" svg:width="21.335cm" svg:height="9.651cm" svg:x="2.032cm" svg:y="2.249cm">
          <text:list text:style-name="L10">
            <text:list-item>
              <text:p text:style-name="P18"><text:span text:style-name="T17">Objetos típicos:</text:span></text:p>
              <text:list>
                <text:list-item>
                  <text:p text:style-name="P18"><text:span text:style-name="T18">Produto</text:span><text:span text:style-name="T17"> (</text:span><text:span text:style-name="T19">nome</text:span><text:span text:style-name="T17">, </text:span><text:span text:style-name="T19">preço</text:span><text:span text:style-name="T17">, </text:span><text:span text:style-name="T19">quantidade</text:span><text:span text:style-name="T17">);</text:span></text:p>
                </text:list-item>
                <text:list-item>
                  <text:p text:style-name="P18"><text:span text:style-name="T18">Cliente</text:span><text:span text:style-name="T17"> (</text:span><text:span text:style-name="T19">nome</text:span><text:span text:style-name="T17">, </text:span><text:span text:style-name="T19">CPF</text:span><text:span text:style-name="T17">);</text:span></text:p>
                </text:list-item>
                <text:list-item>
                  <text:p text:style-name="P18"><text:span text:style-name="T18">Venda</text:span><text:span text:style-name="T17"> (</text:span><text:span text:style-name="T19">data</text:span><text:span text:style-name="T17">, </text:span><text:span text:style-name="T19">valor total</text:span><text:span text:style-name="T17">);</text:span></text:p>
                </text:list-item>
                <text:list-item>
                  <text:p text:style-name="P18"><text:span text:style-name="T18">Funcionário</text:span><text:span text:style-name="T17"> (</text:span><text:span text:style-name="T19">nome</text:span><text:span text:style-name="T17">, </text:span><text:span text:style-name="T19">cargo</text:span><text:span text:style-name="T17">);</text:span></text:p>
                </text:list-item>
              </text:list>
            </text:list-item>
            <text:list-item>
              <text:p text:style-name="P18"><text:span text:style-name="T17">No modelo sequencial: tudo seria tratado como variáveis soltas, sem </text:span><text:span text:style-name="T17">agrupamento lógico;</text:span></text:p>
            </text:list-item>
            <text:list-item>
              <text:p text:style-name="P18"><text:span text:style-name="T17">Na OO: cada entidade é uma classe com seus atributos organizados — muito </text:span><text:span text:style-name="T17">mais próximo da realidade da loja;</text:span></text:p>
            </text:list-item>
            <text:list-item>
              <text:p text:style-name="P18"><text:span text:style-name="T17">Vantagem visível: ao explicar o sistema para o dono da loja, os termos são os </text:span><text:span text:style-name="T17">mesmos do cotidiano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2" draw:text-style-name="P11" draw:layer="layout" svg:width="2.539cm" svg:height="2.539cm" svg:x="2.54cm" svg:y="2.5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46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7" draw:text-style-name="P13" draw:layer="layout" svg:width="2.539cm" svg:height="1.079cm" svg:x="21.59cm" svg:y="13.208cm">
          <text:p text:style-name="P12"><text:span text:style-name="T10">7 / 2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7" presentation:class="page"/>
          <draw:frame draw:name="Notes Placeholder 2" presentation:style-name="pr8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8" draw:style-name="dp1" draw:master-page-name="DEFAULT">
        <draw:custom-shape draw:name="Shape 0" draw:style-name="gr1" draw:text-style-name="P1" draw:layer="layout" svg:width="0.202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5" draw:text-style-name="P14" draw:layer="layout" svg:width="2.539cm" svg:height="2.539cm" svg:x="1.524cm" svg:y="4.57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26" draw:text-style-name="P11" draw:layer="layout" svg:width="1.421cm" svg:height="1.421cm" svg:x="2.083cm" svg:y="5.131cm">
          <draw:image xlink:href="Pictures/100000010000010000000100F5A393F9.png" xlink:type="simple" xlink:show="embed" xlink:actuate="onLoad" draw:mime-type="image/png">
            <text:p/>
          </draw:image>
          <svg:desc>preencoded.png</svg:desc>
        </draw:frame>
        <draw:custom-shape draw:name="Text 2" draw:style-name="gr48" draw:text-style-name="P4" draw:layer="layout" svg:width="18.287cm" svg:height="1.777cm" svg:x="5.08cm" svg:y="4.064cm">
          <text:p text:style-name="P3"><text:span text:style-name="T11">1.2 Definição de O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49" draw:text-style-name="P4" draw:layer="layout" svg:width="18.287cm" svg:height="1.523cm" svg:x="5.08cm" svg:y="6.096cm">
          <text:p text:style-name="P3"><text:span text:style-name="T12">Paradigma baseado na troca de mensagens entre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22" draw:text-style-name="P11" draw:layer="layout" svg:width="2.539cm" svg:height="2.539cm" svg:x="2.54cm" svg:y="2.5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6" draw:style-name="gr50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51" draw:text-style-name="P13" draw:layer="layout" svg:width="2.539cm" svg:height="1.079cm" svg:x="21.59cm" svg:y="13.208cm">
          <text:p text:style-name="P12"><text:span text:style-name="T10">8 / 2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8" presentation:class="page"/>
          <draw:frame draw:name="Notes Placeholder 2" presentation:style-name="pr9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9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52" draw:text-style-name="P4" draw:layer="layout" svg:width="22.351cm" svg:height="2.031cm" svg:x="1.524cm" svg:y="0.127cm">
          <text:p text:style-name="P3"><text:span text:style-name="T13">O que é Orientação a Objetos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53" draw:text-style-name="P16" draw:layer="layout" svg:width="21.335cm" svg:height="9.651cm" svg:x="2.032cm" svg:y="3.048cm">
          <text:list text:style-name="L10">
            <text:list-item>
              <text:p text:style-name="P15"><text:span text:style-name="T14">Paradigma de análise, projeto e programação de softwares baseado em troca de mensagens entre objetos;</text:span></text:p>
            </text:list-item>
            <text:list-item>
              <text:p text:style-name="P15"><text:span text:style-name="T14">Ideia central: abstrair computacionalmente os elementos relevantes do cenário real;</text:span></text:p>
            </text:list-item>
            <text:list-item>
              <text:p text:style-name="P15"><text:span text:style-name="T14">Cada elemento possui características principais (atributos) e ações pertinentes (métodos);</text:span></text:p>
            </text:list-item>
            <text:list-item>
              <text:p text:style-name="P15"><text:span text:style-name="T14">Exemplo: numa oficina mecânica, temos clientes, carros, ferramentas, mecânicos — todos representáveis como classes;</text:span></text:p>
            </text:list-item>
            <text:list-item>
              <text:p text:style-name="P15"><text:span text:style-name="T14">Cada carro é um 'objeto' diferente, mantendo semelhança forte com a realidade observada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22" draw:text-style-name="P11" draw:layer="layout" svg:width="2.539cm" svg:height="2.539cm" svg:x="2.54cm" svg:y="2.5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6" draw:style-name="gr54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55" draw:text-style-name="P13" draw:layer="layout" svg:width="2.539cm" svg:height="1.079cm" svg:x="21.59cm" svg:y="13.208cm">
          <text:p text:style-name="P12"><text:span text:style-name="T10">9 / 2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9" presentation:class="page"/>
          <draw:frame draw:name="Notes Placeholder 2" presentation:style-name="pr10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0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56" draw:text-style-name="P4" draw:layer="layout" svg:width="22.351cm" svg:height="2.031cm" svg:x="1.524cm" svg:y="0.127cm">
          <text:p text:style-name="P3"><text:span text:style-name="T13">Vantagens do paradigma O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57" draw:text-style-name="P16" draw:layer="layout" svg:width="21.335cm" svg:height="9.651cm" svg:x="2.032cm" svg:y="3.048cm">
          <text:list text:style-name="L10">
            <text:list-item>
              <text:p text:style-name="P15"><text:span text:style-name="T14">Desenvolvimento mais ágil, seguro e preciso;</text:span></text:p>
            </text:list-item>
            <text:list-item>
              <text:p text:style-name="P15"><text:span text:style-name="T14">Facilita o diálogo entre analista e usuário final — termos do cotidiano, sem jargões de TI;</text:span></text:p>
            </text:list-item>
            <text:list-item>
              <text:p text:style-name="P15"><text:span text:style-name="T14">Programadores podem se especializar em classes específicas, sem necessidade de ver o sistema inteiro;</text:span></text:p>
            </text:list-item>
            <text:list-item>
              <text:p text:style-name="P15"><text:span text:style-name="T14">Maior segurança: não é necessário expor todas as regras de negócio a todos os programadores;</text:span></text:p>
            </text:list-item>
            <text:list-item>
              <text:p text:style-name="P15"><text:span text:style-name="T14">Programador se aproxima do negócio da empresa e compreende melhor o fluxo real da informação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22" draw:text-style-name="P11" draw:layer="layout" svg:width="2.539cm" svg:height="2.539cm" svg:x="2.54cm" svg:y="2.5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6" draw:style-name="gr58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59" draw:text-style-name="P13" draw:layer="layout" svg:width="2.539cm" svg:height="1.079cm" svg:x="21.59cm" svg:y="13.208cm">
          <text:p text:style-name="P12"><text:span text:style-name="T10">10 / 2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0" presentation:class="page"/>
          <draw:frame draw:name="Notes Placeholder 2" presentation:style-name="pr1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1" draw:style-name="dp1" draw:master-page-name="DEFAULT">
        <draw:custom-shape draw:name="Shape 0" draw:style-name="gr2" draw:text-style-name="P2" draw:layer="layout" svg:width="25.399cm" svg:height="0.151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60" draw:text-style-name="P4" draw:layer="layout" svg:width="22.351cm" svg:height="1.777cm" svg:x="1.524cm" svg:y="0.762cm">
          <text:p text:style-name="P3"><text:span text:style-name="T15">Dinâmica 2 — Mapeando uma Empresa Re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40" draw:text-style-name="P17" draw:layer="layout" svg:width="22.351cm" svg:height="9.143cm" svg:x="1.524cm" svg:y="3.04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" draw:text-style-name="P1" draw:layer="layout" svg:width="0.151cm" svg:height="9.143cm" svg:x="1.524cm" svg:y="3.04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1" draw:text-style-name="P16" draw:layer="layout" svg:width="20.319cm" svg:height="8.127cm" svg:x="2.54cm" svg:y="3.556cm">
          <text:list text:style-name="L10">
            <text:list-item>
              <text:p text:style-name="P15"><text:span text:style-name="T14">Em grupos de 3–4, escolham uma empresa fictícia (ex.: hospital, escola, restaurante);</text:span></text:p>
            </text:list-item>
            <text:list-item>
              <text:p text:style-name="P15"><text:span text:style-name="T14">Identifiquem pelo menos 5 'objetos' presentes no dia a dia dessa empresa;</text:span></text:p>
            </text:list-item>
            <text:list-item>
              <text:p text:style-name="P15"><text:span text:style-name="T14">Para cada objeto, definam: 2 características (atributos) e 1 ação (método);</text:span></text:p>
            </text:list-item>
            <text:list-item>
              <text:p text:style-name="P15"><text:span text:style-name="T14">Exemplo: Hospital → Médico (nome, CRM) → atenderPaciente();</text:span></text:p>
            </text:list-item>
            <text:list-item>
              <text:p text:style-name="P15"><text:span text:style-name="T14">Tempo: 7 minutos. Depois, cada grupo apresenta em 2 minutos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2" draw:text-style-name="P11" draw:layer="layout" svg:width="2.539cm" svg:height="2.539cm" svg:x="2.54cm" svg:y="2.5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7" draw:style-name="gr62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63" draw:text-style-name="P13" draw:layer="layout" svg:width="2.539cm" svg:height="1.079cm" svg:x="21.59cm" svg:y="13.208cm">
          <text:p text:style-name="P12"><text:span text:style-name="T10">11 / 2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1" presentation:class="page"/>
          <draw:frame draw:name="Notes Placeholder 2" presentation:style-name="pr12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2" draw:style-name="dp1" draw:master-page-name="DEFAULT"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64" draw:text-style-name="P4" draw:layer="layout" svg:width="22.351cm" svg:height="1.777cm" svg:x="1.524cm" svg:y="0.762cm">
          <text:p text:style-name="P3"><text:span text:style-name="T16">Exemplos de respostas — Dinâmica 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65" draw:text-style-name="P16" draw:layer="layout" svg:width="21.335cm" svg:height="9.651cm" svg:x="2.032cm" svg:y="1.948cm">
          <text:list text:style-name="L10">
            <text:list-item>
              <text:p text:style-name="P15"><text:span text:style-name="T20">Restaurante</text:span><text:span text:style-name="T14">:</text:span></text:p>
              <text:list>
                <text:list-item>
                  <text:p text:style-name="P15"><text:span text:style-name="T21">Garçom</text:span><text:span text:style-name="T14"> (</text:span><text:span text:style-name="T22">nome</text:span><text:span text:style-name="T14">, </text:span><text:span text:style-name="T22">seção</text:span><text:span text:style-name="T14">) → </text:span><text:span text:style-name="T22">anotarPedido()</text:span><text:span text:style-name="T14">;</text:span></text:p>
                </text:list-item>
                <text:list-item>
                  <text:p text:style-name="P15"><text:span text:style-name="T21">Prato</text:span><text:span text:style-name="T14"> (</text:span><text:span text:style-name="T22">nome</text:span><text:span text:style-name="T14">, </text:span><text:span text:style-name="T22">preço</text:span><text:span text:style-name="T14">) → </text:span><text:span text:style-name="T22">calcularTempo()</text:span><text:span text:style-name="T14">;</text:span></text:p>
                </text:list-item>
                <text:list-item>
                  <text:p text:style-name="P15"><text:span text:style-name="T21">Mesa</text:span><text:span text:style-name="T14"> (</text:span><text:span text:style-name="T22">número</text:span><text:span text:style-name="T14">, </text:span><text:span text:style-name="T22">capacidade</text:span><text:span text:style-name="T14">) → </text:span><text:span text:style-name="T22">reservar()</text:span><text:span text:style-name="T14">.</text:span></text:p>
                </text:list-item>
              </text:list>
            </text:list-item>
            <text:list-item>
              <text:p text:style-name="P15"><text:span text:style-name="T20">Escola</text:span><text:span text:style-name="T14">:</text:span></text:p>
              <text:list>
                <text:list-item>
                  <text:p text:style-name="P15"><text:span text:style-name="T21">Aluno</text:span><text:span text:style-name="T14"> (</text:span><text:span text:style-name="T22">matrícula</text:span><text:span text:style-name="T14">, </text:span><text:span text:style-name="T22">nome</text:span><text:span text:style-name="T14">) → </text:span><text:span text:style-name="T22">realizarProva()</text:span><text:span text:style-name="T14">;</text:span></text:p>
                </text:list-item>
                <text:list-item>
                  <text:p text:style-name="P15"><text:span text:style-name="T21">Professor</text:span><text:span text:style-name="T14"> (</text:span><text:span text:style-name="T22">disciplina</text:span><text:span text:style-name="T14">, </text:span><text:span text:style-name="T22">salário</text:span><text:span text:style-name="T14">) → </text:span><text:span text:style-name="T22">ministrarAula()</text:span><text:span text:style-name="T14">;</text:span></text:p>
                </text:list-item>
                <text:list-item>
                  <text:p text:style-name="P15"><text:span text:style-name="T21">Turma</text:span><text:span text:style-name="T14"> (</text:span><text:span text:style-name="T22">código</text:span><text:span text:style-name="T14">, </text:span><text:span text:style-name="T22">horário</text:span><text:span text:style-name="T14">) → </text:span><text:span text:style-name="T22">fecharNotas()</text:span><text:span text:style-name="T14">.</text:span></text:p>
                </text:list-item>
              </text:list>
            </text:list-item>
            <text:list-item>
              <text:p text:style-name="P15"><text:span text:style-name="T14">O importante é notar como cada entidade tem identidade, características e comportamentos próprios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2" draw:text-style-name="P11" draw:layer="layout" svg:width="2.539cm" svg:height="2.539cm" svg:x="2.54cm" svg:y="2.5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66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67" draw:text-style-name="P13" draw:layer="layout" svg:width="2.539cm" svg:height="1.079cm" svg:x="21.59cm" svg:y="13.208cm">
          <text:p text:style-name="P12"><text:span text:style-name="T10">12 / 2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2" presentation:class="page"/>
          <draw:frame draw:name="Notes Placeholder 2" presentation:style-name="pr1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3" draw:style-name="dp1" draw:master-page-name="DEFAULT">
        <draw:custom-shape draw:name="Shape 0" draw:style-name="gr1" draw:text-style-name="P1" draw:layer="layout" svg:width="0.202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5" draw:text-style-name="P14" draw:layer="layout" svg:width="2.539cm" svg:height="2.539cm" svg:x="1.524cm" svg:y="4.57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26" draw:text-style-name="P11" draw:layer="layout" svg:width="1.421cm" svg:height="1.421cm" svg:x="2.083cm" svg:y="5.131cm">
          <draw:image xlink:href="Pictures/1000000100000100000001002D65918A.png" xlink:type="simple" xlink:show="embed" xlink:actuate="onLoad" draw:mime-type="image/png">
            <text:p/>
          </draw:image>
          <svg:desc>preencoded.png</svg:desc>
        </draw:frame>
        <draw:custom-shape draw:name="Text 2" draw:style-name="gr68" draw:text-style-name="P4" draw:layer="layout" svg:width="18.287cm" svg:height="1.777cm" svg:x="5.08cm" svg:y="4.064cm">
          <text:p text:style-name="P3"><text:span text:style-name="T11">1.3 Class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69" draw:text-style-name="P4" draw:layer="layout" svg:width="18.287cm" svg:height="1.523cm" svg:x="5.08cm" svg:y="6.096cm">
          <text:p text:style-name="P3"><text:span text:style-name="T12">A estrutura que organiza e agrupa objetos similar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22" draw:text-style-name="P11" draw:layer="layout" svg:width="2.539cm" svg:height="2.539cm" svg:x="2.54cm" svg:y="2.5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6" draw:style-name="gr70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71" draw:text-style-name="P13" draw:layer="layout" svg:width="2.539cm" svg:height="1.079cm" svg:x="21.59cm" svg:y="13.208cm">
          <text:p text:style-name="P12"><text:span text:style-name="T10">13 / 2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3" presentation:class="page"/>
          <draw:frame draw:name="Notes Placeholder 2" presentation:style-name="pr1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4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72" draw:text-style-name="P4" draw:layer="layout" svg:width="22.351cm" svg:height="2.031cm" svg:x="1.524cm" svg:y="0.127cm">
          <text:p text:style-name="P3"><text:span text:style-name="T13">O que é uma Classe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73" draw:text-style-name="P16" draw:layer="layout" svg:width="21.335cm" svg:height="9.651cm" svg:x="2.032cm" svg:y="3.048cm">
          <text:list text:style-name="L10">
            <text:list-item>
              <text:p text:style-name="P15"><text:span text:style-name="T14">Estrutura que organiza e agrupa objetos com características parecidas e funções similares;</text:span></text:p>
            </text:list-item>
            <text:list-item>
              <text:p text:style-name="P15"><text:span text:style-name="T14">Funciona como um molde: todos os objetos instanciados seguem o mesmo padrão;</text:span></text:p>
            </text:list-item>
            <text:list-item>
              <text:p text:style-name="P15"><text:span text:style-name="T14">Cada objeto tem suas particularidades — valores diferentes nos mesmos atributos;</text:span></text:p>
            </text:list-item>
            <text:list-item>
              <text:p text:style-name="P15"><text:span text:style-name="T14">Exemplo: Classe '</text:span><text:span text:style-name="T22">Carro</text:span><text:span text:style-name="T14">' com propriedades ano, modelo e cor. Cada carro tem valores diferentes;</text:span></text:p>
            </text:list-item>
            <text:list-item>
              <text:p text:style-name="P15"><text:span text:style-name="T14">Classe '</text:span><text:span text:style-name="T22">Pessoa</text:span><text:span text:style-name="T14">' teria propriedades completamente diferentes: motorista, nascimento, nacionalidade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22" draw:text-style-name="P11" draw:layer="layout" svg:width="2.539cm" svg:height="2.539cm" svg:x="2.54cm" svg:y="2.5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6" draw:style-name="gr74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75" draw:text-style-name="P13" draw:layer="layout" svg:width="2.539cm" svg:height="1.079cm" svg:x="21.59cm" svg:y="13.208cm">
          <text:p text:style-name="P12"><text:span text:style-name="T10">14 / 2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4" presentation:class="page"/>
          <draw:frame draw:name="Notes Placeholder 2" presentation:style-name="pr1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5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76" draw:text-style-name="P4" draw:layer="layout" svg:width="22.351cm" svg:height="2.031cm" svg:x="1.524cm" svg:y="0.127cm">
          <text:p text:style-name="P3"><text:span text:style-name="T13">Superclasses e Subclass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77" draw:text-style-name="P16" draw:layer="layout" svg:width="21.335cm" svg:height="9.651cm" svg:x="2.032cm" svg:y="3.048cm">
          <text:list text:style-name="L10">
            <text:list-item>
              <text:p text:style-name="P15"><text:span text:style-name="T14">Superclasses podem originar outras classes, passando propriedades e métodos — conceito de herança;</text:span></text:p>
            </text:list-item>
            <text:list-item>
              <text:p text:style-name="P15"><text:span text:style-name="T14">As novas classes geradas são chamadas subclasses e herdam tudo da 'classe pai';</text:span></text:p>
            </text:list-item>
            <text:list-item>
              <text:p text:style-name="P15"><text:span text:style-name="T14">Subclasses podem ter alterações e propriedades adicionais em relação à superclasse;</text:span></text:p>
            </text:list-item>
            <text:list-item>
              <text:p text:style-name="P15"><text:span text:style-name="T14">Exemplo: Superclasse '</text:span><text:span text:style-name="T22">Carro</text:span><text:span text:style-name="T14">' → Subclasse '</text:span><text:span text:style-name="T22">Pick-up</text:span><text:span text:style-name="T14">' herda ano, modelo, cor e adiciona '</text:span><text:span text:style-name="T22">caçamba</text:span><text:span text:style-name="T14">';</text:span></text:p>
            </text:list-item>
            <text:list-item>
              <text:p text:style-name="P15"><text:span text:style-name="T14">Herança permite reutilização de código e organização hierárquica do sistema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22" draw:text-style-name="P11" draw:layer="layout" svg:width="2.539cm" svg:height="2.539cm" svg:x="2.54cm" svg:y="2.5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6" draw:style-name="gr78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79" draw:text-style-name="P13" draw:layer="layout" svg:width="2.539cm" svg:height="1.079cm" svg:x="21.59cm" svg:y="13.208cm">
          <text:p text:style-name="P12"><text:span text:style-name="T10">15 / 2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5" presentation:class="page"/>
          <draw:frame draw:name="Notes Placeholder 2" presentation:style-name="pr1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6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80" draw:text-style-name="P4" draw:layer="layout" svg:width="22.351cm" svg:height="2.031cm" svg:x="1.524cm" svg:y="0.127cm">
          <text:p text:style-name="P3"><text:span text:style-name="T13">Classes Abstratas vs. Concret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81" draw:text-style-name="P19" draw:layer="layout" svg:width="21.335cm" svg:height="9.651cm" svg:x="2.032cm" svg:y="3.048cm">
          <text:list text:style-name="L10">
            <text:list-item>
              <text:p text:style-name="P18"><text:span text:style-name="T14">Classes Concretas: classes tradicionais das quais instanciamos objetos diretamente;</text:span></text:p>
            </text:list-item>
            <text:list-item>
              <text:p text:style-name="P18"><text:span text:style-name="T14">Classes Abstratas: não podemos instanciar objetos a partir delas diretamente;</text:span></text:p>
            </text:list-item>
            <text:list-item>
              <text:p text:style-name="P18"><text:span text:style-name="T14">Servem como estrutura de referência para derivar outras classes (concretas ou abstratas);</text:span></text:p>
            </text:list-item>
            <text:list-item>
              <text:p text:style-name="P18"><text:span text:style-name="T14">Possibilitam herança de características por novas classes que então instanciam objetos;</text:span></text:p>
            </text:list-item>
            <text:list-item>
              <text:p text:style-name="P18"><text:span text:style-name="T14">Resumo: classes abstratas são superclasses que nunca terão objetos instanciados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22" draw:text-style-name="P11" draw:layer="layout" svg:width="2.539cm" svg:height="2.539cm" svg:x="2.54cm" svg:y="2.5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6" draw:style-name="gr82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83" draw:text-style-name="P13" draw:layer="layout" svg:width="2.539cm" svg:height="1.079cm" svg:x="21.59cm" svg:y="13.208cm">
          <text:p text:style-name="P12"><text:span text:style-name="T10">16 / 2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6" presentation:class="page"/>
          <draw:frame draw:name="Notes Placeholder 2" presentation:style-name="pr17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7" draw:style-name="dp1" draw:master-page-name="DEFAULT">
        <draw:custom-shape draw:name="Shape 0" draw:style-name="gr2" draw:text-style-name="P2" draw:layer="layout" svg:width="25.399cm" svg:height="0.151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84" draw:text-style-name="P4" draw:layer="layout" svg:width="22.351cm" svg:height="1.777cm" svg:x="1.524cm" svg:y="0.762cm">
          <text:p text:style-name="P3"><text:span text:style-name="T15">Dinâmica 3 — Criando uma Hierarquia de Class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40" draw:text-style-name="P17" draw:layer="layout" svg:width="22.351cm" svg:height="9.143cm" svg:x="1.524cm" svg:y="3.04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" draw:text-style-name="P1" draw:layer="layout" svg:width="0.151cm" svg:height="9.143cm" svg:x="1.524cm" svg:y="3.04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85" draw:text-style-name="P19" draw:layer="layout" svg:width="20.319cm" svg:height="8.127cm" svg:x="2.54cm" svg:y="3.556cm">
          <text:list text:style-name="L10">
            <text:list-item>
              <text:p text:style-name="P18"><text:span text:style-name="T14">Em duplas, criem uma hierarquia de classes para um e-commerce:</text:span></text:p>
              <text:list>
                <text:list-item>
                  <text:p text:style-name="P18"><text:span text:style-name="T14">Definam 1 superclasse abstrata com pelo menos 3 atributos;</text:span></text:p>
                </text:list-item>
                <text:list-item>
                  <text:p text:style-name="P18"><text:span text:style-name="T14">Criem 2 subclasses concretas que herdem da superclasse e adicionem atributos próprios;</text:span></text:p>
                </text:list-item>
                <text:list-item>
                  <text:p text:style-name="P18"><text:span text:style-name="T14">Exemplo de partida: Superclasse 'Produto' → Subclasses: ? (…);</text:span></text:p>
                </text:list-item>
                <text:list-item>
                  <text:p text:style-name="P18"><text:span text:style-name="T14">Desenhem a hierarquia no papel e apresentem em 2 minutos.</text:span></text:p>
                </text:list-item>
              </text:list>
            </text:list-item>
            <text:list-item>
              <text:p text:style-name="P18"><text:span text:style-name="T14">Tempo: 6 minutos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2" draw:text-style-name="P11" draw:layer="layout" svg:width="2.539cm" svg:height="2.539cm" svg:x="2.54cm" svg:y="2.5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7" draw:style-name="gr86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87" draw:text-style-name="P13" draw:layer="layout" svg:width="2.539cm" svg:height="1.079cm" svg:x="21.59cm" svg:y="13.208cm">
          <text:p text:style-name="P12"><text:span text:style-name="T10">17 / 2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7" presentation:class="page"/>
          <draw:frame draw:name="Notes Placeholder 2" presentation:style-name="pr18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8" draw:style-name="dp1" draw:master-page-name="DEFAULT"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88" draw:text-style-name="P4" draw:layer="layout" svg:width="22.351cm" svg:height="1.777cm" svg:x="1.524cm" svg:y="0.762cm">
          <text:p text:style-name="P3"><text:span text:style-name="T16">Exemplo de resposta — Dinâmica 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89" draw:text-style-name="P21" draw:layer="layout" svg:width="21.335cm" svg:height="9.651cm" svg:x="2.032cm" svg:y="3.349cm">
          <text:list text:style-name="L10">
            <text:list-item>
              <text:p text:style-name="P20"><text:span text:style-name="T23">Superclasse abstrata '</text:span><text:span text:style-name="T24">Produto</text:span><text:span text:style-name="T23">'</text:span><text:span text:style-name="T14">: </text:span><text:span text:style-name="T22">nome</text:span><text:span text:style-name="T14"> (caractere), </text:span><text:span text:style-name="T22">preço</text:span><text:span text:style-name="T14"> (real), </text:span><text:span text:style-name="T22">peso</text:span><text:span text:style-name="T14"> (real);</text:span></text:p>
            </text:list-item>
            <text:list-item>
              <text:p text:style-name="P20"><text:span text:style-name="T23">Subclasse '</text:span><text:span text:style-name="T24">Eletrônico</text:span><text:span text:style-name="T14">': herda tudo de </text:span><text:span text:style-name="T21">Produto</text:span><text:span text:style-name="T14"> + </text:span><text:span text:style-name="T22">voltagem</text:span><text:span text:style-name="T14"> (inteiro) + </text:span><text:span text:style-name="T22">garantiaMeses</text:span><text:span text:style-name="T14"> (inteiro);</text:span></text:p>
            </text:list-item>
            <text:list-item>
              <text:p text:style-name="P20"><text:span text:style-name="T23">Subclasse '</text:span><text:span text:style-name="T24">Vestuário</text:span><text:span text:style-name="T23">'</text:span><text:span text:style-name="T14">: herda tudo de </text:span><text:span text:style-name="T21">Produto</text:span><text:span text:style-name="T14"> + </text:span><text:span text:style-name="T22">tamanho</text:span><text:span text:style-name="T14"> (caractere) + </text:span><text:span text:style-name="T22">cor</text:span><text:span text:style-name="T14"> (caractere);</text:span></text:p>
            </text:list-item>
            <text:list-item>
              <text:p text:style-name="P20"><text:span text:style-name="T14">'</text:span><text:span text:style-name="T21">Produto</text:span><text:span text:style-name="T14">' é abstrata porque não instanciamos um '</text:span><text:span text:style-name="T25">produto genérico</text:span><text:span text:style-name="T14">' — sempre é algo específico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2" draw:text-style-name="P11" draw:layer="layout" svg:width="2.539cm" svg:height="2.539cm" svg:x="2.54cm" svg:y="2.5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90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91" draw:text-style-name="P13" draw:layer="layout" svg:width="2.539cm" svg:height="1.079cm" svg:x="21.59cm" svg:y="13.208cm">
          <text:p text:style-name="P12"><text:span text:style-name="T10">18 / 2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8" presentation:class="page"/>
          <draw:frame draw:name="Notes Placeholder 2" presentation:style-name="pr19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9" draw:style-name="dp1" draw:master-page-name="DEFAULT">
        <draw:custom-shape draw:name="Shape 0" draw:style-name="gr1" draw:text-style-name="P1" draw:layer="layout" svg:width="0.202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5" draw:text-style-name="P14" draw:layer="layout" svg:width="2.539cm" svg:height="2.539cm" svg:x="1.524cm" svg:y="4.57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26" draw:text-style-name="P11" draw:layer="layout" svg:width="1.421cm" svg:height="1.421cm" svg:x="2.083cm" svg:y="5.131cm">
          <draw:image xlink:href="Pictures/100000010000010000000100309B811F.png" xlink:type="simple" xlink:show="embed" xlink:actuate="onLoad" draw:mime-type="image/png">
            <text:p/>
          </draw:image>
          <svg:desc>preencoded.png</svg:desc>
        </draw:frame>
        <draw:custom-shape draw:name="Text 2" draw:style-name="gr92" draw:text-style-name="P4" draw:layer="layout" svg:width="18.287cm" svg:height="1.777cm" svg:x="5.08cm" svg:y="4.064cm">
          <text:p text:style-name="P3"><text:span text:style-name="T11">1.4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93" draw:text-style-name="P4" draw:layer="layout" svg:width="18.287cm" svg:height="1.523cm" svg:x="5.08cm" svg:y="6.096cm">
          <text:p text:style-name="P3"><text:span text:style-name="T12">Instâncias de classes com atributos e métod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22" draw:text-style-name="P11" draw:layer="layout" svg:width="2.539cm" svg:height="2.539cm" svg:x="2.54cm" svg:y="2.5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6" draw:style-name="gr94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95" draw:text-style-name="P13" draw:layer="layout" svg:width="2.539cm" svg:height="1.079cm" svg:x="21.59cm" svg:y="13.208cm">
          <text:p text:style-name="P12"><text:span text:style-name="T10">19 / 2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9" presentation:class="page"/>
          <draw:frame draw:name="Notes Placeholder 2" presentation:style-name="pr20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20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96" draw:text-style-name="P4" draw:layer="layout" svg:width="22.351cm" svg:height="2.031cm" svg:x="1.524cm" svg:y="0.127cm">
          <text:p text:style-name="P3"><text:span text:style-name="T13">Atributos e Métodos de um Objet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97" draw:text-style-name="P19" draw:layer="layout" svg:width="21.335cm" svg:height="9.651cm" svg:x="2.032cm" svg:y="3.048cm">
          <text:list text:style-name="L10">
            <text:list-item>
              <text:p text:style-name="P18"><text:span text:style-name="T14">Objetos são o resultado da instanciação de uma classe — são o '</text:span><text:span text:style-name="T25">produto feito no molde</text:span><text:span text:style-name="T14">';</text:span></text:p>
            </text:list-item>
            <text:list-item>
              <text:p text:style-name="P18"><text:span text:style-name="T26">Atributos</text:span><text:span text:style-name="T27">: propriedades que definem o estado do objeto (ex.: </text:span><text:span text:style-name="T28">ano=2015</text:span><text:span text:style-name="T27">, </text:span><text:span text:style-name="T28">cor='Amarelo</text:span><text:span text:style-name="T22">'</text:span><text:span text:style-name="T14">);</text:span></text:p>
            </text:list-item>
            <text:list-item>
              <text:p text:style-name="P18"><text:span text:style-name="T23">Métodos</text:span><text:span text:style-name="T14">: ações que o objeto pode realizar (ex.: </text:span><text:span text:style-name="T22">ligar()</text:span><text:span text:style-name="T14">, </text:span><text:span text:style-name="T22">acelerar()</text:span><text:span text:style-name="T14">, </text:span><text:span text:style-name="T22">frear()</text:span><text:span text:style-name="T14">);</text:span></text:p>
            </text:list-item>
            <text:list-item>
              <text:p text:style-name="P18"><text:span text:style-name="T23">Método Construtor</text:span><text:span text:style-name="T14">: inicializa os atributos e aloca espaço em memória. Tem o mesmo nome da classe;</text:span></text:p>
            </text:list-item>
            <text:list-item>
              <text:p text:style-name="P18"><text:span text:style-name="T23">Método Destrutor</text:span><text:span text:style-name="T14">: apaga o objeto da memória quando não é mais necessário. Linguagens modernas usam </text:span><text:span text:style-name="T29">garbage collector</text:span><text:span text:style-name="T14">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22" draw:text-style-name="P11" draw:layer="layout" svg:width="2.539cm" svg:height="2.539cm" svg:x="2.54cm" svg:y="2.5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6" draw:style-name="gr98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99" draw:text-style-name="P13" draw:layer="layout" svg:width="2.539cm" svg:height="1.079cm" svg:x="21.59cm" svg:y="13.208cm">
          <text:p text:style-name="P12"><text:span text:style-name="T10">20 / 2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0" presentation:class="page"/>
          <draw:frame draw:name="Notes Placeholder 2" presentation:style-name="pr2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21" draw:style-name="dp1" draw:master-page-name="DEFAULT">
        <draw:custom-shape draw:name="Shape 0" draw:style-name="gr2" draw:text-style-name="P2" draw:layer="layout" svg:width="25.399cm" svg:height="0.151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00" draw:text-style-name="P4" draw:layer="layout" svg:width="22.351cm" svg:height="1.777cm" svg:x="1.524cm" svg:y="0.762cm">
          <text:p text:style-name="P3"><text:span text:style-name="T15">Dinâmica 4 — Instanciando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40" draw:text-style-name="P17" draw:layer="layout" svg:width="22.351cm" svg:height="9.143cm" svg:x="1.524cm" svg:y="3.04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" draw:text-style-name="P1" draw:layer="layout" svg:width="0.151cm" svg:height="9.143cm" svg:x="1.524cm" svg:y="3.04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01" draw:text-style-name="P16" draw:layer="layout" svg:width="20.319cm" svg:height="8.127cm" svg:x="2.54cm" svg:y="3.256cm">
          <text:list text:style-name="L10">
            <text:list-item>
              <text:p text:style-name="P15"><text:span text:style-name="T14">Individualmente, usando a classe '</text:span><text:span text:style-name="T30">Carro</text:span><text:span text:style-name="T14">' (</text:span><text:span text:style-name="T22">ano</text:span><text:span text:style-name="T14">, </text:span><text:span text:style-name="T22">modelo</text:span><text:span text:style-name="T14">, </text:span><text:span text:style-name="T22">cor</text:span><text:span text:style-name="T14">, </text:span><text:span text:style-name="T22">ligar()</text:span><text:span text:style-name="T14">, </text:span><text:span text:style-name="T22">acelerar()</text:span><text:span text:style-name="T14">, </text:span><text:span text:style-name="T22">frear()</text:span><text:span text:style-name="T14">):</text:span></text:p>
              <text:list>
                <text:list-item>
                  <text:p text:style-name="P15"><text:span text:style-name="T14">Instancie 2 objetos com valores diferentes para cada atributo;</text:span></text:p>
                </text:list-item>
                <text:list-item>
                  <text:p text:style-name="P15"><text:span text:style-name="T14">Descreva uma sequência de 3 chamadas de métodos para cada objeto;</text:span></text:p>
                </text:list-item>
                <text:list-item>
                  <text:p text:style-name="P15"><text:span text:style-name="T14">Exemplo: </text:span><text:span text:style-name="T22">meuCarro.ligar()</text:span><text:span text:style-name="T14"> → </text:span><text:span text:style-name="T22">meuCarro.acelerar()</text:span><text:span text:style-name="T14"> → </text:span><text:span text:style-name="T22">meuCarro.frear()</text:span><text:span text:style-name="T14">;</text:span></text:p>
                </text:list-item>
                <text:list-item>
                  <text:p text:style-name="P15"><text:span text:style-name="T14">Pergunta-bônus: o que o método construtor faz ao criar o objeto '</text:span><text:span text:style-name="T22">meuCarro</text:span><text:span text:style-name="T14">'?</text:span></text:p>
                </text:list-item>
              </text:list>
            </text:list-item>
            <text:list-item>
              <text:p text:style-name="P15"><text:span text:style-name="T14">Tempo: 4 minutos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2" draw:text-style-name="P11" draw:layer="layout" svg:width="2.539cm" svg:height="2.539cm" svg:x="2.54cm" svg:y="2.5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7" draw:style-name="gr102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03" draw:text-style-name="P13" draw:layer="layout" svg:width="2.539cm" svg:height="1.079cm" svg:x="21.59cm" svg:y="13.208cm">
          <text:p text:style-name="P12"><text:span text:style-name="T10">21 / 2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1" presentation:class="page"/>
          <draw:frame draw:name="Notes Placeholder 2" presentation:style-name="pr22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22" draw:style-name="dp1" draw:master-page-name="DEFAULT"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04" draw:text-style-name="P4" draw:layer="layout" svg:width="22.351cm" svg:height="1.777cm" svg:x="1.524cm" svg:y="0.762cm">
          <text:p text:style-name="P3"><text:span text:style-name="T16">Respostas possíveis — Dinâmica 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05" draw:text-style-name="P19" draw:layer="layout" svg:width="21.335cm" svg:height="9.651cm" svg:x="2.032cm" svg:y="3.048cm">
          <text:list text:style-name="L10">
            <text:list-item>
              <text:p text:style-name="P18"><text:span text:style-name="T14">Objeto 1 — </text:span><text:span text:style-name="T21">fusca</text:span><text:span text:style-name="T14">: </text:span><text:span text:style-name="T22">ano=1972</text:span><text:span text:style-name="T14">, </text:span><text:span text:style-name="T22">modelo='Fusca'</text:span><text:span text:style-name="T14">, </text:span><text:span text:style-name="T22">cor='Azul'</text:span><text:span text:style-name="T14">. </text:span><text:span text:style-name="T22">fusca.ligar()</text:span><text:span text:style-name="T14"> → </text:span><text:span text:style-name="T22">fusca.acelerar()</text:span><text:span text:style-name="T14"> → </text:span><text:span text:style-name="T22">fusca.frear()</text:span><text:span text:style-name="T14">;</text:span></text:p>
            </text:list-item>
            <text:list-item>
              <text:p text:style-name="P18"><text:span text:style-name="T14">Objeto 2 — </text:span><text:span text:style-name="T21">civic</text:span><text:span text:style-name="T14">: </text:span><text:span text:style-name="T22">ano=2024</text:span><text:span text:style-name="T14">, </text:span><text:span text:style-name="T22">modelo='Civic'</text:span><text:span text:style-name="T14">, </text:span><text:span text:style-name="T22">cor='Preto'</text:span><text:span text:style-name="T14">. </text:span><text:span text:style-name="T22">civic.ligar()</text:span><text:span text:style-name="T14"> → </text:span><text:span text:style-name="T22">civic.acelerar()</text:span><text:span text:style-name="T14"> → </text:span><text:span text:style-name="T22">civic.frear()</text:span><text:span text:style-name="T14">;</text:span></text:p>
            </text:list-item>
            <text:list-item>
              <text:p text:style-name="P18"><text:span text:style-name="T14">Método construtor </text:span><text:span text:style-name="T22">Carro()</text:span><text:span text:style-name="T14">: aloca memória e define valores iniciais dos atributos </text:span><text:span text:style-name="T22">ano</text:span><text:span text:style-name="T14">, </text:span><text:span text:style-name="T22">modelo</text:span><text:span text:style-name="T14"> e </text:span><text:span text:style-name="T22">cor</text:span><text:span text:style-name="T14">;</text:span></text:p>
            </text:list-item>
            <text:list-item>
              <text:p text:style-name="P18"><text:span text:style-name="T14">Ambos compartilham a mesma estrutura (classe), mas têm estados (valores) diferentes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2" draw:text-style-name="P11" draw:layer="layout" svg:width="2.539cm" svg:height="2.539cm" svg:x="2.54cm" svg:y="2.5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106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07" draw:text-style-name="P13" draw:layer="layout" svg:width="2.539cm" svg:height="1.079cm" svg:x="21.59cm" svg:y="13.208cm">
          <text:p text:style-name="P12"><text:span text:style-name="T10">22 / 2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2" presentation:class="page"/>
          <draw:frame draw:name="Notes Placeholder 2" presentation:style-name="pr2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23" draw:style-name="dp1" draw:master-page-name="DEFAULT">
        <draw:custom-shape draw:name="Shape 0" draw:style-name="gr1" draw:text-style-name="P1" draw:layer="layout" svg:width="0.202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5" draw:text-style-name="P14" draw:layer="layout" svg:width="2.539cm" svg:height="2.539cm" svg:x="1.524cm" svg:y="4.57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26" draw:text-style-name="P11" draw:layer="layout" svg:width="1.421cm" svg:height="1.421cm" svg:x="2.083cm" svg:y="5.131cm">
          <draw:image xlink:href="Pictures/10000001000001000000010004D5499C.png" xlink:type="simple" xlink:show="embed" xlink:actuate="onLoad" draw:mime-type="image/png">
            <text:p/>
          </draw:image>
          <svg:desc>preencoded.png</svg:desc>
        </draw:frame>
        <draw:custom-shape draw:name="Text 2" draw:style-name="gr108" draw:text-style-name="P4" draw:layer="layout" svg:width="18.287cm" svg:height="1.777cm" svg:x="5.08cm" svg:y="4.064cm">
          <text:p text:style-name="P3"><text:span text:style-name="T11">1.5 Mensagen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09" draw:text-style-name="P4" draw:layer="layout" svg:width="18.287cm" svg:height="1.523cm" svg:x="5.08cm" svg:y="6.096cm">
          <text:p text:style-name="P3"><text:span text:style-name="T12">Comunicação e troca de dados entre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22" draw:text-style-name="P11" draw:layer="layout" svg:width="2.539cm" svg:height="2.539cm" svg:x="2.54cm" svg:y="2.5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6" draw:style-name="gr110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11" draw:text-style-name="P13" draw:layer="layout" svg:width="2.539cm" svg:height="1.079cm" svg:x="21.59cm" svg:y="13.208cm">
          <text:p text:style-name="P12"><text:span text:style-name="T10">23 / 2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3" presentation:class="page"/>
          <draw:frame draw:name="Notes Placeholder 2" presentation:style-name="pr2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24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12" draw:text-style-name="P4" draw:layer="layout" svg:width="22.351cm" svg:height="2.031cm" svg:x="1.524cm" svg:y="0.127cm">
          <text:p text:style-name="P3"><text:span text:style-name="T13">Como objetos se comunicam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13" draw:text-style-name="P16" draw:layer="layout" svg:width="21.335cm" svg:height="9.651cm" svg:x="2.032cm" svg:y="3.048cm">
          <text:list text:style-name="L10">
            <text:list-item>
              <text:p text:style-name="P15"><text:span text:style-name="T14">Mensagens são requisições enviadas de um objeto a outro para executar ações;</text:span></text:p>
            </text:list-item>
            <text:list-item>
              <text:p text:style-name="P15"><text:span text:style-name="T14">A operação realizada depende dos métodos e atributos da classe do objeto receptor;</text:span></text:p>
            </text:list-item>
            <text:list-item>
              <text:p text:style-name="P15"><text:span text:style-name="T14">Mensagens podem ser simples solicitações ou conter parâmetros e valores;</text:span></text:p>
            </text:list-item>
            <text:list-item>
              <text:p text:style-name="P15"><text:span text:style-name="T14">Métodos do receptor podem retornar informações ao objeto solicitante ou apenas executar operações;</text:span></text:p>
            </text:list-item>
            <text:list-item>
              <text:p text:style-name="P15"><text:span text:style-name="T14">A troca de mensagens é o motor do paradigma OO — processos simulam interações reais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22" draw:text-style-name="P11" draw:layer="layout" svg:width="2.539cm" svg:height="2.539cm" svg:x="2.54cm" svg:y="2.5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6" draw:style-name="gr114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15" draw:text-style-name="P13" draw:layer="layout" svg:width="2.539cm" svg:height="1.079cm" svg:x="21.59cm" svg:y="13.208cm">
          <text:p text:style-name="P12"><text:span text:style-name="T10">24 / 2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4" presentation:class="page"/>
          <draw:frame draw:name="Notes Placeholder 2" presentation:style-name="pr2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25" draw:style-name="dp1" draw:master-page-name="DEFAULT">
        <draw:custom-shape draw:name="Shape 0" draw:style-name="gr2" draw:text-style-name="P2" draw:layer="layout" svg:width="25.399cm" svg:height="0.151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40" draw:text-style-name="P17" draw:layer="layout" svg:width="21.335cm" svg:height="3.301cm" svg:x="2.032cm" svg:y="1.01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2" draw:text-style-name="P2" draw:layer="layout" svg:width="0.151cm" svg:height="3.301cm" svg:x="2.032cm" svg:y="1.01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16" draw:text-style-name="P23" draw:layer="layout" svg:width="19.557cm" svg:height="2.793cm" svg:x="3.048cm" svg:y="1.27cm">
          <text:p text:style-name="P22"><text:span text:style-name="T31">"O principal objetivo do paradigma de OO é modelar problemas com a abstração de objetos do mundo real."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17" draw:text-style-name="P4" draw:layer="layout" svg:width="21.335cm" svg:height="1.269cm" svg:x="2.032cm" svg:y="5.08cm">
          <text:p text:style-name="P3"><text:span text:style-name="T32">Pontos-chave da aul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18" draw:text-style-name="P25" draw:layer="layout" svg:width="21.335cm" svg:height="5.587cm" svg:x="2.032cm" svg:y="6.604cm">
          <text:list text:style-name="L10">
            <text:list-item>
              <text:p text:style-name="P24"><text:span text:style-name="T17">OO modela o mundo real com classes, objetos, atributos e métodos;</text:span></text:p>
            </text:list-item>
            <text:list-item>
              <text:p text:style-name="P24"><text:span text:style-name="T17">Classes são moldes; objetos são instâncias com valores específicos;</text:span></text:p>
            </text:list-item>
            <text:list-item>
              <text:p text:style-name="P24"><text:span text:style-name="T17">Herança (superclasses/subclasses) permite reutilização e organização;</text:span></text:p>
            </text:list-item>
            <text:list-item>
              <text:p text:style-name="P24"><text:span text:style-name="T17">Classes abstratas servem de referência e nunca são instanciadas;</text:span></text:p>
            </text:list-item>
            <text:list-item>
              <text:p text:style-name="P24"><text:span text:style-name="T17">A comunicação entre objetos acontece por troca de mensagens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6" draw:text-style-name="P5" draw:layer="layout" svg:width="25.399cm" svg:height="1.587cm" svg:x="0cm" svg:y="12.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19" draw:text-style-name="P4" draw:layer="layout" svg:width="12.699cm" svg:height="1.587cm" svg:x="2.032cm" svg:y="12.7cm">
          <text:p text:style-name="P3"><text:span text:style-name="T33">Obrigado! Até a próxima aul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20" draw:text-style-name="P13" draw:layer="layout" svg:width="10.159cm" svg:height="1.587cm" svg:x="13.97cm" svg:y="12.7cm">
          <text:p text:style-name="P12"><text:span text:style-name="T34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5" presentation:class="page"/>
          <draw:frame draw:name="Notes Placeholder 2" presentation:style-name="pr2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 style:font-family-generic="swiss" style:font-pitch="variable"/>
    <style:font-face style:name="Calibri1" svg:font-family="Calibri"/>
    <style:font-face style:name="Calibri2" svg:font-family="Calibri" style:font-family-generic="modern" style:font-pitch="fixed"/>
    <style:font-face style:name="DejaVu Sans" svg:font-family="'DejaVu Sans'" style:font-family-generic="system" style:font-pitch="variable"/>
    <style:font-face style:name="Georgia" svg:font-family="Georgia" style:font-family-generic="swiss" style:font-pitch="variable"/>
    <style:font-face style:name="Georgia1" svg:font-family="Georgia" style:font-family-generic="modern" style:font-pitch="fixed"/>
    <style:font-face style:name="LM Mono Caps 10" svg:font-family="'LM Mono Caps 10'" style:font-pitch="variable"/>
    <style:font-face style:name="LM Mono Prop 10" svg:font-family="'LM Mono Prop 10'" style:font-pitch="variable"/>
    <style:font-face style:name="LM Roman Unslanted 10" svg:font-family="'LM Roman Unslanted 10'" style:font-pitch="variable"/>
    <style:font-face style:name="LM Sans Quot 8" svg:font-family="'LM Sans Quot 8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buntu Sans Mono" svg:font-family="'Ubuntu Sans Mono'" style:font-adornments="Light" style:font-family-generic="swiss" style:font-pitch="fixed"/>
    <style:font-face style:name="Ubuntu Sans Mono1" svg:font-family="'Ubuntu Sans Mono'" style:font-family-generic="swiss" style:font-pitch="fixed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Programação Orientada a Objetos — Aula 1</dc:title>
    <dc:subject>PptxGenJS Presentation</dc:subject>
    <meta:initial-creator>UNISA</meta:initial-creator>
    <meta:editing-cycles>20</meta:editing-cycles>
    <meta:creation-date>2026-03-08T06:23:33</meta:creation-date>
    <dc:date>2026-05-14T01:06:17.937308373</dc:date>
    <meta:editing-duration>PT36M37S</meta:editing-duration>
    <meta:generator>LibreOffice/25.8.1.1$Linux_X86_64 LibreOffice_project/54047653041915e595ad4e45cccea684809c77b5</meta:generator>
    <meta:document-statistic meta:object-count="315"/>
    <meta:user-defined meta:name="AppVersion">16.0000</meta:user-defined>
    <meta:user-defined meta:name="Company">PptxGenJS</meta:user-defined>
    <meta:user-defined meta:name="Notes" meta:value-type="float">25</meta:user-defined>
    <meta:user-defined meta:name="PresentationFormat">On-screen Show (16:9)</meta:user-defined>
    <meta:user-defined meta:name="Slides" meta:value-type="float">25</meta:user-defined>
  </office:meta>
</office:document-meta>
</file>