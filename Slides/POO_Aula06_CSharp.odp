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E4775A66.png" manifest:media-type="image/png"/>
  <manifest:file-entry manifest:full-path="Pictures/100000010000010000000100190CABFB.png" manifest:media-type="image/png"/>
  <manifest:file-entry manifest:full-path="Pictures/100000010000010000000100D70A47D9.png" manifest:media-type="image/png"/>
  <manifest:file-entry manifest:full-path="Pictures/1000000100000100000001000BF40CBB.png" manifest:media-type="image/png"/>
  <manifest:file-entry manifest:full-path="Pictures/100000010000010000000100EDF2D8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 Gyre Cursor" svg:font-family="'TeX Gyre Cursor'" style:font-pitch="variable"/>
    <style:font-face style:name="Tlwg Mono" svg:font-family="'Tlwg Mono'" style:font-pitch="fixed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0d152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solid" draw:fill-color="#162236" draw:textarea-vertical-align="top" draw:auto-grow-height="false" fo:min-height="11.003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6" style:family="graphic" style:parent-style-name="standard">
      <style:graphic-properties draw:stroke="none" svg:stroke-width="0cm" draw:fill="solid" draw:fill-color="#2ec4b6" draw:textarea-vertical-align="top" draw:auto-grow-height="false" fo:min-height="11.003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03cm" fo:min-width="16.461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000000" fo:min-height="2.25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10.969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8.7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0.696cm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solid" draw:fill-color="#0d1520" draw:textarea-vertical-align="top" draw:auto-grow-height="false" fo:min-height="9.457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6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7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9.001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10.218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82" style:family="graphic" style:parent-style-name="objectwithoutfill">
      <style:graphic-properties draw:fill="none" draw:textarea-vertical-align="middle" loext:decorative="false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>
      <style:graphic-properties draw:stroke="none" svg:stroke-width="0cm" draw:fill="solid" draw:fill-color="#0d1520" draw:textarea-vertical-align="top" draw:auto-grow-height="false" fo:min-height="8.957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9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878cm" fo:min-width="21.376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13.501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>
      <style:graphic-properties draw:stroke="none" draw:fill="none" fo:min-height="0.526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justify" fo:min-height="2.25cm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878cm" fo:min-width="20.461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02cm" fo:min-width="9.836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>
      <style:graphic-properties draw:stroke="none" draw:fill="none" fo:min-height="5.901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justify" fo:min-height="3.785cm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243652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7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8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Sans Quot 8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solid" draw:fill-color="#0d1520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athJax_Typewriter" fo:hyphenate="false"/>
    </style:style>
    <style:style style:name="P21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MathJax_Typewriter" fo:font-size="18pt" fo:hyphenate="false"/>
    </style:style>
    <style:style style:name="P22" style:family="paragraph">
      <loext:graphic-properties draw:fill="solid" draw:fill-color="#162236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.282cm" fo:line-height="100%" fo:text-align="justify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Sans Quot 8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Sans Quot 8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solid" draw:fill-color="#000000"/>
    </style:style>
    <style:style style:name="P26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7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8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29" style:family="paragraph">
      <style:paragraph-properties fo:line-height="150%"/>
    </style:style>
    <style:style style:name="P30" style:family="paragraph">
      <loext:graphic-properties draw:fill="none"/>
      <style:paragraph-properties fo:line-height="150%"/>
    </style:style>
    <style:style style:name="P31" style:family="paragraph">
      <loext:graphic-properties draw:fill="none"/>
    </style:style>
    <style:style style:name="P32" style:family="paragraph">
      <style:paragraph-properties fo:margin-left="0cm" fo:margin-right="0cm" fo:margin-top="0cm" fo:margin-bottom="0.282cm" style:line-height-at-least="0.1cm" fo:text-align="justify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Mono Prop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none"/>
      <style:paragraph-properties fo:margin-left="0cm" fo:margin-right="0cm" fo:margin-top="0cm" fo:margin-bottom="0.282cm" style:line-height-at-least="0.1cm" fo:text-align="justify" fo:text-indent="0cm" style:punctuation-wrap="hanging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M Mono Prop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style:text-properties style:font-name="LM Sans Quot 8"/>
    </style:style>
    <style:style style:name="P35" style:family="paragraph">
      <loext:graphic-properties draw:fill="none"/>
      <style:text-properties style:font-name="LM Sans Quot 8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Prop 10" fo:hyphenate="false"/>
    </style:style>
    <style:style style:name="P38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Mono Prop 10" fo:font-size="18pt" fo:hyphenate="false"/>
    </style:style>
    <style:style style:name="P39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style:font-name="MathJax_Typewriter" fo:hyphenate="false"/>
    </style:style>
    <style:style style:name="P40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MathJax_Typewriter" fo:font-size="18pt" fo:hyphenate="false"/>
    </style:style>
    <style:style style:name="P41" style:family="paragraph">
      <style:paragraph-properties fo:text-align="justify"/>
      <style:text-properties style:font-name="LM Sans Quot 8"/>
    </style:style>
    <style:style style:name="P42" style:family="paragraph">
      <loext:graphic-properties draw:fill="none"/>
      <style:paragraph-properties fo:text-align="justify"/>
      <style:text-properties style:font-name="LM Sans Quot 8"/>
    </style:style>
    <style:style style:name="P43" style:family="paragraph">
      <style:paragraph-properties fo:margin-left="0cm" fo:margin-right="0cm" fo:margin-top="0cm" fo:margin-bottom="0.282cm" fo:line-height="10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44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45" style:family="paragraph">
      <style:text-properties style:font-name="MathJax_Typewriter"/>
    </style:style>
    <style:style style:name="P46" style:family="paragraph">
      <style:paragraph-properties fo:margin-left="0cm" fo:margin-right="0cm" fo:margin-top="0cm" fo:margin-bottom="0cm" fo:line-height="150%" fo:text-align="justify" fo:text-indent="0cm"/>
      <style:text-properties style:font-name="MathJax_Typewriter"/>
    </style:style>
    <style:style style:name="P47" style:family="paragraph">
      <loext:graphic-properties draw:fill="none"/>
      <style:text-properties style:font-name="MathJax_Typewriter"/>
    </style:style>
    <style:style style:name="P48" style:family="paragraph">
      <style:paragraph-properties fo:line-height="150%" fo:text-align="justify"/>
      <style:text-properties style:font-name="LM Sans Quot 8"/>
    </style:style>
    <style:style style:name="P49" style:family="paragraph">
      <loext:graphic-properties draw:fill="none"/>
      <style:paragraph-properties fo:line-height="150%" fo:text-align="justify"/>
      <style:text-properties style:font-name="LM Sans Quot 8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tyle="italic" style:font-style-asian="italic" style:font-style-complex="italic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font-style="italic" style:font-style-asian="italic" style:font-style-complex="italic" fo:hyphenate="false"/>
    </style:style>
    <style:style style:name="P52" style:family="paragraph">
      <style:paragraph-properties fo:margin-left="0cm" fo:margin-right="0cm" fo:margin-top="0cm" fo:margin-bottom="0.176cm" fo:line-height="10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53" style:family="paragraph">
      <loext:graphic-properties draw:fill="none"/>
      <style:paragraph-properties fo:margin-left="0cm" fo:margin-right="0cm" fo:margin-top="0cm" fo:margin-bottom="0.176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54" style:family="paragraph">
      <style:paragraph-properties fo:margin-left="0cm" fo:margin-right="0cm" fo:margin-top="0cm" fo:margin-bottom="0cm" fo:line-height="15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50%" fo:text-align="justify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5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5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Calibri3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4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3" style:font-size-asian="16pt" style:font-style-asian="normal" style:font-weight-asian="bold" style:font-name-complex="Calibri1" style:font-size-complex="16pt" style:font-style-complex="normal" style:font-weight-complex="bold"/>
    </style:style>
    <style:style style:name="T5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8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normal" fo:background-color="transparent" style:font-name-asian="Calibri3" style:font-size-asian="15pt" style:font-style-asian="italic" style:font-weight-asian="normal" style:font-name-complex="Calibri1" style:font-size-complex="15pt" style:font-style-complex="italic" style:font-weight-complex="normal"/>
    </style:style>
    <style:style style:name="T1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2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3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bold" fo:background-color="transparent" style:font-name-asian="Calibri3" style:font-size-asian="15pt" style:font-style-asian="italic" style:font-weight-asian="bold" style:font-name-complex="Calibri1" style:font-size-complex="15pt" style:font-style-complex="italic" style:font-weight-complex="bold"/>
    </style:style>
    <style:style style:name="T14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5pt" fo:letter-spacing="normal" fo:language="en" fo:country="US" fo:font-style="italic" style:text-underline-style="none" fo:font-weight="bold" fo:background-color="transparent" style:font-name-asian="Calibri3" style:font-size-asian="15pt" style:font-style-asian="italic" style:font-weight-asian="bold" style:font-name-complex="Calibri1" style:font-size-complex="15pt" style:font-style-complex="italic" style:font-weight-complex="bold"/>
    </style:style>
    <style:style style:name="T15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italic" style:text-underline-style="none" fo:font-weight="bold" fo:background-color="transparent" style:font-name-asian="Georgia1" style:font-size-asian="32pt" style:font-style-asian="italic" style:font-weight-asian="bold" style:font-name-complex="Georgia" style:font-size-complex="32pt" style:font-style-complex="italic" style:font-weight-complex="bold"/>
    </style:style>
    <style:style style:name="T1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name-asian="Calibri3" style:font-size-asian="16pt" style:font-style-asian="italic" style:font-weight-asian="normal" style:font-name-complex="Calibri1" style:font-size-complex="16pt" style:font-style-complex="italic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2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3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2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Tlwg Mono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2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 Gyre Cursor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26" style:family="text">
      <style:text-properties fo:font-variant="normal" fo:text-transform="none" fo:color="#8be9fd" loext:opacity="100%" style:text-outline="false" style:text-line-through-style="none" style:text-line-through-type="none" style:text-position="0% 100%" style:font-name="MathJax_Typewriter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thJax_Typewriter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MathJax_Typewriter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29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30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3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italic" style:text-underline-style="none" fo:font-weight="bold" fo:background-color="transparent" style:font-name-asian="Georgia1" style:font-size-asian="24pt" style:font-style-asian="italic" style:font-weight-asian="bold" style:font-name-complex="Georgia" style:font-size-complex="24pt" style:font-style-complex="italic" style:font-weight-complex="bold"/>
    </style:style>
    <style:style style:name="T3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3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buntu Sans Mono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38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LM Roman Unslanted 10" fo:font-size="12pt" fo:letter-spacing="normal" fo:language="en" fo:country="US" fo:font-style="italic" style:text-underline-style="none" fo:font-weight="bold" fo:background-color="transparent" style:font-name-asian="Calibri3" style:font-size-asian="12pt" style:font-style-asian="italic" style:font-weight-asian="bold" style:font-name-complex="Calibri1" style:font-size-complex="12pt" style:font-style-complex="italic" style:font-weight-complex="bold"/>
    </style:style>
    <style:style style:name="T3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Ubuntu Sans Mono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0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4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italic" fo:text-shadow="none" style:text-underline-style="none" fo:font-weight="normal" style:letter-kerning="true" fo:background-color="transparent" style:font-name-asian="Calibri2" style:font-size-asian="13pt" style:font-style-asian="italic" style:font-weight-asian="normal" style:font-name-complex="Calibri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solid" style:text-underline-width="auto" style:text-underline-color="font-color" fo:font-weight="normal" fo:background-color="transparent" style:font-name-asian="Calibri3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46" style:family="text">
      <style:text-properties fo:font-variant="normal" fo:text-transform="none" fo:color="#8be9fd" loext:opacity="100%" style:text-outline="false" style:text-line-through-style="none" style:text-line-through-type="none" style:text-position="0% 100%" style:font-name="LM Mono Prop 10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Mono Prop 10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Tlwg Mono" fo:font-size="12pt" fo:letter-spacing="normal" fo:language="en" fo:country="US" fo:font-style="italic" style:text-underline-style="none" fo:font-weight="bold" fo:background-color="transparent" style:font-name-asian="Calibri3" style:font-size-asian="12pt" style:font-style-asian="italic" style:font-weight-asian="bold" style:font-name-complex="Calibri1" style:font-size-complex="12pt" style:font-style-complex="italic" style:font-weight-complex="bold"/>
    </style:style>
    <style:style style:name="T49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Ubuntu Sans Mono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lwg Mono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5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fo:text-shadow="none" style:text-underline-style="none" fo:font-weight="normal" style:letter-kerning="true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54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MathJax_Typewriter" fo:font-size="12pt" fo:letter-spacing="normal" fo:language="en" fo:country="US" fo:font-style="italic" style:text-underline-style="none" fo:font-weight="bold" fo:background-color="transparent" style:font-name-asian="Calibri3" style:font-size-asian="12pt" style:font-style-asian="italic" style:font-weight-asian="bold" style:font-name-complex="Calibri1" style:font-size-complex="12pt" style:font-style-complex="italic" style:font-weight-complex="bold"/>
    </style:style>
    <style:style style:name="T5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6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7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Roman Unslanted 10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5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16pt" fo:letter-spacing="normal" fo:language="en" fo:country="US" fo:font-style="italic" style:text-underline-style="none" fo:font-weight="bold" fo:background-color="transparent" style:font-name-asian="Georgia1" style:font-size-asian="16pt" style:font-style-asian="italic" style:font-weight-asian="bold" style:font-name-complex="Georgia" style:font-size-complex="16pt" style:font-style-complex="italic" style:font-weight-complex="bold"/>
    </style:style>
    <style:style style:name="T60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16pt" fo:letter-spacing="normal" fo:language="en" fo:country="US" fo:font-style="italic" style:text-underline-style="none" fo:font-weight="bold" fo:background-color="transparent" style:font-name-asian="Georgia1" style:font-size-asian="16pt" style:font-style-asian="italic" style:font-weight-asian="bold" style:font-name-complex="Georgia" style:font-size-complex="16pt" style:font-style-complex="italic" style:font-weight-complex="bold"/>
    </style:style>
    <style:style style:name="T61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normal" fo:background-color="transparent" style:font-name-asian="Georgia1" style:font-size-asian="14pt" style:font-style-asian="italic" style:font-weight-asian="normal" style:font-name-complex="Georgia" style:font-size-complex="14pt" style:font-style-complex="italic" style:font-weight-complex="normal"/>
    </style:style>
    <style:style style:name="T6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6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6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6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Tlwg Mono" fo:font-size="13pt" fo:letter-spacing="normal" fo:language="en" fo:country="US" fo:font-style="normal" style:text-underline-style="none" fo:font-weight="bold" fo:background-color="transparent" style:font-name-asian="Calibri3" style:font-size-asian="13pt" style:font-style-asian="normal" style:font-weight-asian="bold" style:font-name-complex="Calibri1" style:font-size-complex="13pt" style:font-style-complex="normal" style:font-weight-complex="bold"/>
    </style:style>
    <style:style style:name="T66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1" style:font-size-complex="12pt" style:font-style-complex="normal" style:font-weight-complex="bold"/>
    </style:style>
    <style:style style:name="T67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be9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apítulo 6 — Linguagem de Programação </text:span><text:span text:style-name="T3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4">Aula 0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5">Universidade Santa Amaro — UNI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7">O que veremos hoj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9">C#</text:span><text:span text:style-name="T10">: origem, </text:span><text:span text:style-name="T9">.NET</text:span><text:span text:style-name="T10"> </text:span><text:span text:style-name="T9">Framework</text:span><text:span text:style-name="T10"> e </text:span><text:span text:style-name="T9">Visual Stud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8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10">Criação de classes: </text:span><text:span text:style-name="T11">namespace</text:span><text:span text:style-name="T10">, </text:span><text:span text:style-name="T11">using</text:span><text:span text:style-name="T10">, </text:span><text:span text:style-name="T11">M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11"><text:span text:style-name="T10">Métodos em </text:span><text:span text:style-name="T9">C#</text:span><text:span text:style-name="T10">: </text:span><text:span text:style-name="T11">void</text:span><text:span text:style-name="T10">, retorno, </text:span><text:span text:style-name="T9">getters</text:span><text:span text:style-name="T10">/</text:span><text:span text:style-name="T9">set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8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10">Modificadores de acesso (encapsulament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8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10">Construtores múltiplos (polimorfism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8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12">Herança com ':' + Comparativo </text:span><text:span text:style-name="T13">Java</text:span><text:span text:style-name="T12"> </text:span><text:span text:style-name="T14">vs</text:span><text:span text:style-name="T12">. </text:span><text:span text:style-name="T13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2" draw:style-name="gr22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3" draw:text-style-name="P13" draw:layer="layout" svg:width="2.539cm" svg:height="1.079cm" svg:x="21.59cm" svg:y="13.208cm">
          <text:p text:style-name="P12"><text:span text:style-name="T15">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4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5" draw:layer="layout" svg:width="1.421cm" svg:height="1.421cm" svg:x="2.083cm" svg:y="5.131cm">
          <draw:image xlink:href="Pictures/100000010000010000000100EDF2D8C2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4" draw:layer="layout" svg:width="18.287cm" svg:height="1.777cm" svg:x="5.08cm" svg:y="4.064cm">
          <text:p text:style-name="P3"><text:span text:style-name="T16">6.1 Linguagem </text:span><text:span text:style-name="T17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4" draw:layer="layout" svg:width="18.287cm" svg:height="1.523cm" svg:x="5.08cm" svg:y="6.096cm">
          <text:p text:style-name="P3"><text:span text:style-name="T18">Microsoft, .NET e alta produtivida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28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" draw:text-style-name="P13" draw:layer="layout" svg:width="2.539cm" svg:height="1.079cm" svg:x="21.59cm" svg:y="13.208cm">
          <text:p text:style-name="P12"><text:span text:style-name="T15">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2.351cm" svg:height="2.031cm" svg:x="1.524cm" svg:y="0.127cm">
          <text:p text:style-name="P3"><text:span text:style-name="T19">Origem e características do </text:span><text:span text:style-name="T20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17" draw:layer="layout" svg:width="21.335cm" svg:height="9.651cm" svg:x="2.032cm" svg:y="3.048cm">
          <text:list text:style-name="L10">
            <text:list-item>
              <text:p text:style-name="P16"><text:span text:style-name="T21">Pronuncia-se '</text:span><text:span text:style-name="T22">C sharp</text:span><text:span text:style-name="T21">' — desenvolvida pela </text:span><text:span text:style-name="T22">Microsoft</text:span><text:span text:style-name="T21"> em 2000.</text:span></text:p>
            </text:list-item>
            <text:list-item>
              <text:p text:style-name="P16"><text:span text:style-name="T21">Criada para utilização do conceito </text:span><text:span text:style-name="T22">.NET</text:span><text:span text:style-name="T21">: </text:span><text:span text:style-name="T22">frameworks</text:span><text:span text:style-name="T21"> com funções pré-implementadas.</text:span></text:p>
            </text:list-item>
            <text:list-item>
              <text:p text:style-name="P16"><text:span text:style-name="T21">Foco em OO e agilidade na produção do resultado final — fácil aprendizagem e alta produtividade.</text:span></text:p>
            </text:list-item>
            <text:list-item>
              <text:p text:style-name="P16"><text:span text:style-name="T21">Todas as bibliotecas do </text:span><text:span text:style-name="T22">.NET Framework</text:span><text:span text:style-name="T21"> foram escritas em </text:span><text:span text:style-name="T22">C#</text:span><text:span text:style-name="T21"> pelo alto desempenho.</text:span></text:p>
            </text:list-item>
            <text:list-item>
              <text:p text:style-name="P16"><text:span text:style-name="T21">Sintaxe baseada em </text:span><text:span text:style-name="T22">C</text:span><text:span text:style-name="T21"> — familiar para quem já conhece </text:span><text:span text:style-name="T22">Java</text:span><text:span text:style-name="T21">, </text:span><text:span text:style-name="T22">C++</text:span><text:span text:style-name="T21"> ou </text:span><text:span text:style-name="T22">C</text:span><text:span text:style-name="T21">.</text:span></text:p>
            </text:list-item>
            <text:list-item>
              <text:p text:style-name="P16"><text:span text:style-name="T22">IDE</text:span><text:span text:style-name="T21"> principal: </text:span><text:span text:style-name="T22">Visual Studio</text:span><text:span text:style-name="T21"> (</text:span><text:span text:style-name="T22">Microsoft</text:span><text:span text:style-name="T21">) — integração nativa e complet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2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13" draw:layer="layout" svg:width="2.539cm" svg:height="1.079cm" svg:x="21.59cm" svg:y="13.208cm">
          <text:p text:style-name="P12"><text:span text:style-name="T15">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4" draw:layer="layout" svg:width="22.351cm" svg:height="2.031cm" svg:x="1.524cm" svg:y="0.127cm">
          <text:p text:style-name="P3"><text:span text:style-name="T19">Estrutura básica de um projeto </text:span><text:span text:style-name="T20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" draw:text-style-name="P17" draw:layer="layout" svg:width="21.335cm" svg:height="9.651cm" svg:x="2cm" svg:y="2.5cm">
          <text:list text:style-name="L10">
            <text:list-item>
              <text:p text:style-name="P18"><text:span text:style-name="T21">Ao criar um projeto no </text:span><text:span text:style-name="T22">Visual Studio</text:span><text:span text:style-name="T21">, a classe principal </text:span><text:span text:style-name="T23">Program.cs</text:span><text:span text:style-name="T21"> é gerada com o método </text:span><text:span text:style-name="T24">Main</text:span><text:span text:style-name="T21">.</text:span></text:p>
            </text:list-item>
            <text:list-item>
              <text:p text:style-name="P18"><text:span text:style-name="T24">Main</text:span><text:span text:style-name="T21"> é o ponto de entrada — primeira coisa executada ao iniciar o programa.</text:span></text:p>
            </text:list-item>
            <text:list-item>
              <text:p text:style-name="P18"><text:span text:style-name="T21">'</text:span><text:span text:style-name="T24">namespace</text:span><text:span text:style-name="T21">': organiza classes em pacotes lógicos (equivalente ao '</text:span><text:span text:style-name="T24">package</text:span><text:span text:style-name="T21">' do </text:span><text:span text:style-name="T22">Java</text:span><text:span text:style-name="T21">).</text:span></text:p>
            </text:list-item>
            <text:list-item>
              <text:p text:style-name="P18"><text:span text:style-name="T21">'</text:span><text:span text:style-name="T24">using</text:span><text:span text:style-name="T21">': declara bibliotecas utilizadas pela classe (ex.: </text:span><text:span text:style-name="T24">using System</text:span><text:span text:style-name="T21">; para </text:span><text:span text:style-name="T24">Console.WriteLine</text:span><text:span text:style-name="T21">).</text:span></text:p>
            </text:list-item>
            <text:list-item>
              <text:p text:style-name="P18"><text:span text:style-name="T21">Nova classe: botão direito no pacote → Adicionar → Novo Item → Classe.</text:span></text:p>
            </text:list-item>
            <text:list-item>
              <text:p text:style-name="P18"><text:span text:style-name="T24">Console.WriteLine("texto")</text:span><text:span text:style-name="T21"> = equivalente ao </text:span><text:span text:style-name="T24">System.out.println("texto")</text:span><text:span text:style-name="T21"> do </text:span><text:span text:style-name="T22">Java</text:span><text:span text:style-name="T21">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6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" draw:text-style-name="P13" draw:layer="layout" svg:width="2.539cm" svg:height="1.079cm" svg:x="21.59cm" svg:y="13.208cm">
          <text:p text:style-name="P12"><text:span text:style-name="T15">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" draw:text-style-name="P4" draw:layer="layout" svg:width="22.351cm" svg:height="2.031cm" svg:x="1.524cm" svg:y="0.127cm">
          <text:p text:style-name="P3"><text:span text:style-name="T25">Hello World</text:span><text:span text:style-name="T19"> em </text:span><text:span text:style-name="T20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9" draw:text-style-name="P19" draw:layer="layout" svg:width="22.351cm" svg:height="8.127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0" draw:text-style-name="P21" draw:layer="layout" svg:width="20.827cm" svg:height="7.111cm" svg:x="2.286cm" svg:y="3.302cm">
          <text:p text:style-name="P20"><text:span text:style-name="T26">using System;</text:span></text:p>
          <text:p text:style-name="P20"><text:span text:style-name="T27"/></text:p>
          <text:p text:style-name="P20"><text:span text:style-name="T26">namespace ConsoleApp1</text:span></text:p>
          <text:p text:style-name="P20"><text:span text:style-name="T26">{</text:span></text:p>
          <text:p text:style-name="P20"><text:span text:style-name="T26"><text:s text:c="4"/>class Program</text:span></text:p>
          <text:p text:style-name="P20"><text:span text:style-name="T26"><text:s text:c="4"/>{</text:span></text:p>
          <text:p text:style-name="P20"><text:span text:style-name="T26"><text:s text:c="8"/>static void Main(string[] args)</text:span></text:p>
          <text:p text:style-name="P20"><text:span text:style-name="T26"><text:s text:c="8"/>{</text:span></text:p>
          <text:p text:style-name="P20"><text:span text:style-name="T26"><text:s text:c="12"/>Console.WriteLine("Hello World!");</text:span></text:p>
          <text:p text:style-name="P20"><text:span text:style-name="T26"><text:s text:c="8"/>}</text:span></text:p>
          <text:p text:style-name="P20"><text:span text:style-name="T26"><text:s text:c="4"/>}</text:span></text:p>
          <text:p text:style-name="P20"><text:span text:style-name="T26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4" draw:layer="layout" svg:width="22.351cm" svg:height="1.269cm" svg:x="1.524cm" svg:y="11.303cm">
          <text:p text:style-name="P3"><text:span text:style-name="T28">using</text:span><text:span text:style-name="T29"> = importar biblioteca | </text:span><text:span text:style-name="T28">namespace</text:span><text:span text:style-name="T29"> = pacote | </text:span><text:span text:style-name="T28">Main</text:span><text:span text:style-name="T29"> = ponto de entr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42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3" draw:text-style-name="P13" draw:layer="layout" svg:width="2.539cm" svg:height="1.079cm" svg:x="21.59cm" svg:y="13.208cm">
          <text:p text:style-name="P12"><text:span text:style-name="T15">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4" draw:layer="layout" svg:width="22.351cm" svg:height="1.777cm" svg:x="1.524cm" svg:y="0.762cm">
          <text:p text:style-name="P3"><text:span text:style-name="T30">Dinâmica 1 — De Java para </text:span><text:span text:style-name="T31">C#</text:span><text:span text:style-name="T30">: Traduzin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5" draw:text-style-name="P22" draw:layer="layout" svg:width="22.351cm" svg:height="11.252cm" svg:x="1.524cm" svg:y="2.2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6" draw:text-style-name="P1" draw:layer="layout" svg:width="0.151cm" svg:height="11.252cm" svg:x="1.524cm" svg:y="2.2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7" draw:text-style-name="P24" draw:layer="layout" svg:width="16.96cm" svg:height="11.252cm" svg:x="2.54cm" svg:y="2.248cm">
          <text:list text:style-name="L10">
            <text:list-item>
              <text:p text:style-name="P18"><text:span text:style-name="T21">Em duplas, 'traduzam' o seguinte código </text:span><text:span text:style-name="T22">Java</text:span><text:span text:style-name="T21"> para </text:span><text:span text:style-name="T22">C#</text:span><text:span text:style-name="T21">:</text:span></text:p>
              <text:list>
                <text:list-item>
                  <text:p text:style-name="P23"><text:span text:style-name="T21">Java: package item1;</text:span></text:p>
                  <text:list>
                    <text:list-item>
                      <text:p text:style-name="P23"><text:span text:style-name="T24">public class Carro {</text:span></text:p>
                      <text:list>
                        <text:list-header>
                          <text:p text:style-name="P23"><text:span text:style-name="T24">public String modelo;</text:span></text:p>
                          <text:p text:style-name="P23"><text:span text:style-name="T24">public void ligar() {</text:span></text:p>
                          <text:list>
                            <text:list-header>
                              <text:p text:style-name="P23"><text:span text:style-name="T24">System.out.println("Ligou!");</text:span></text:p>
                            </text:list-header>
                          </text:list>
                          <text:p text:style-name="P23"><text:span text:style-name="T24">}</text:span></text:p>
                        </text:list-header>
                      </text:list>
                      <text:p text:style-name="P23"><text:span text:style-name="T24">}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21">Dicas:</text:span></text:p>
              <text:list>
                <text:list-item>
                  <text:p text:style-name="P23"><text:span text:style-name="T24">package</text:span><text:span text:style-name="T21"> → </text:span><text:span text:style-name="T24">namespace</text:span><text:span text:style-name="T21">;</text:span></text:p>
                </text:list-item>
                <text:list-item>
                  <text:p text:style-name="P23"><text:span text:style-name="T24">System.out.println</text:span><text:span text:style-name="T21"> → </text:span><text:span text:style-name="T24">Console.WriteLine</text:span><text:span text:style-name="T21">;</text:span></text:p>
                </text:list-item>
                <text:list-item>
                  <text:p text:style-name="P23"><text:span text:style-name="T24">import</text:span><text:span text:style-name="T21"> → </text:span><text:span text:style-name="T24">using</text:span></text:p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48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9" draw:text-style-name="P13" draw:layer="layout" svg:width="2.539cm" svg:height="1.079cm" svg:x="21.59cm" svg:y="13.208cm">
          <text:p text:style-name="P12"><text:span text:style-name="T15">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5" draw:layer="layout" svg:width="9.177cm" svg:height="2.5cm" svg:x="14.698cm" svg:y="11cm">
          <draw:text-box>
            <text:list text:style-name="L1">
              <text:list-item>
                <text:p><text:span text:style-name="T32">Identifiquem as semelhanças e diferenças de sintaxe.</text:span></text:p>
              </text:list-item>
              <text:list-item>
                <text:p><text:span text:style-name="T32">Tempo: 5 minutos.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1" draw:text-style-name="P4" draw:layer="layout" svg:width="22.351cm" svg:height="1.777cm" svg:x="1.524cm" svg:y="0.762cm">
          <text:p text:style-name="P3"><text:span text:style-name="T33">Resposta — Dinâmica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" draw:text-style-name="P28" draw:layer="layout" svg:width="11.468cm" svg:height="9.651cm" svg:x="1.232cm" svg:y="2.048cm">
          <text:list text:style-name="L10">
            <text:list-item>
              <text:p text:style-name="P26"><text:span text:style-name="T22">C#</text:span><text:span text:style-name="T21">:</text:span></text:p>
              <text:list>
                <text:list-item>
                  <text:p text:style-name="P27"><text:span text:style-name="T24">using System;</text:span></text:p>
                  <text:p text:style-name="P27"><text:span text:style-name="T24">namespace Item1 {</text:span></text:p>
                  <text:list>
                    <text:list-header>
                      <text:p text:style-name="P27"><text:span text:style-name="T24">class Carro {</text:span></text:p>
                      <text:list>
                        <text:list-header>
                          <text:p text:style-name="P27"><text:span text:style-name="T24">public string modelo;</text:span></text:p>
                          <text:p text:style-name="P27"><text:span text:style-name="T24">public void ligar() {</text:span></text:p>
                          <text:list>
                            <text:list-header>
                              <text:p text:style-name="P27"><text:span text:style-name="T24">Console.WriteLine("Ligou!");</text:span></text:p>
                            </text:list-header>
                          </text:list>
                          <text:p text:style-name="P27"><text:span text:style-name="T24">}</text:span></text:p>
                        </text:list-header>
                      </text:list>
                      <text:p text:style-name="P27"><text:span text:style-name="T24">}</text:span></text:p>
                    </text:list-header>
                  </text:list>
                  <text:p text:style-name="P27"><text:span text:style-name="T24">}</text:span></text:p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53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" draw:text-style-name="P13" draw:layer="layout" svg:width="2.539cm" svg:height="1.079cm" svg:x="21.59cm" svg:y="13.208cm">
          <text:p text:style-name="P12"><text:span text:style-name="T15">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0" draw:layer="layout" svg:width="12cm" svg:height="10.661cm" svg:x="12.5cm" svg:y="1.339cm">
          <draw:text-box>
            <text:list text:style-name="L1">
              <text:list-item>
                <text:p text:style-name="P29"><text:span text:style-name="T34">Semelhanças:</text:span></text:p>
                <text:list>
                  <text:list-item>
                    <text:p text:style-name="P29"><text:span text:style-name="T35">{ }</text:span><text:span text:style-name="T34"> para escopo,</text:span></text:p>
                  </text:list-item>
                  <text:list-item>
                    <text:p text:style-name="P29"><text:span text:style-name="T35">public</text:span><text:span text:style-name="T34">/</text:span><text:span text:style-name="T35">void</text:span><text:span text:style-name="T34">,</text:span></text:p>
                  </text:list-item>
                  <text:list-item>
                    <text:p text:style-name="P29"><text:span text:style-name="T34">nomes de classe com maiúscula,</text:span></text:p>
                  </text:list-item>
                  <text:list-item>
                    <text:p text:style-name="P29"><text:span text:style-name="T34">ponto-e-vírgula.</text:span></text:p>
                  </text:list-item>
                </text:list>
              </text:list-item>
              <text:list-item>
                <text:p text:style-name="P29"><text:span text:style-name="T34">Diferenças:</text:span></text:p>
                <text:list>
                  <text:list-item>
                    <text:p text:style-name="P29"><text:span text:style-name="T35">package</text:span><text:span text:style-name="T34">→</text:span><text:span text:style-name="T35">namespace</text:span><text:span text:style-name="T34">,</text:span></text:p>
                  </text:list-item>
                  <text:list-item>
                    <text:p text:style-name="P29"><text:span text:style-name="T35">import</text:span><text:span text:style-name="T34">→</text:span><text:span text:style-name="T35">using</text:span><text:span text:style-name="T34">, </text:span></text:p>
                  </text:list-item>
                  <text:list-item>
                    <text:p text:style-name="P29"><text:span text:style-name="T35">System.out.println</text:span><text:span text:style-name="T34">→</text:span><text:span text:style-name="T35">Console.WriteLine</text:span><text:span text:style-name="T34">, </text:span></text:p>
                  </text:list-item>
                  <text:list-item>
                    <text:p text:style-name="P29"><text:span text:style-name="T35">String</text:span><text:span text:style-name="T34">→</text:span><text:span text:style-name="T35">string</text:span><text:span text:style-name="T34"> (minúsculo).</text:span></text:p>
                  </text:list-item>
                </text:list>
              </text:list-item>
            </text:list>
          </draw:text-box>
        </draw:frame>
        <draw:frame draw:style-name="gr56" draw:text-style-name="P31" draw:layer="layout" svg:width="21.628cm" svg:height="0.946cm" svg:x="1.5cm" svg:y="12.054cm">
          <draw:text-box>
            <text:p><text:span text:style-name="T34">A migração entre </text:span><text:span text:style-name="T36">Java</text:span><text:span text:style-name="T34"> e </text:span><text:span text:style-name="T36">C#</text:span><text:span text:style-name="T34"> é muito natural graças à base sintática comum do </text:span><text:span text:style-name="T36">C</text:span><text:span text:style-name="T34">.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4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5" draw:layer="layout" svg:width="1.421cm" svg:height="1.421cm" svg:x="2.083cm" svg:y="5.131cm">
          <draw:image xlink:href="Pictures/1000000100000100000001000BF40CBB.png" xlink:type="simple" xlink:show="embed" xlink:actuate="onLoad" draw:mime-type="image/png">
            <text:p/>
          </draw:image>
          <svg:desc>preencoded.png</svg:desc>
        </draw:frame>
        <draw:custom-shape draw:name="Text 2" draw:style-name="gr57" draw:text-style-name="P4" draw:layer="layout" svg:width="18.287cm" svg:height="1.777cm" svg:x="5.08cm" svg:y="4.064cm">
          <text:p text:style-name="P3"><text:span text:style-name="T16">6.2 Métodos em </text:span><text:span text:style-name="T17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8" draw:text-style-name="P4" draw:layer="layout" svg:width="18.287cm" svg:height="1.523cm" svg:x="5.08cm" svg:y="6.096cm">
          <text:p text:style-name="P3"><text:span text:style-name="T18">void, retorno e o padrão getter/set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9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0" draw:text-style-name="P13" draw:layer="layout" svg:width="2.539cm" svg:height="1.079cm" svg:x="21.59cm" svg:y="13.208cm">
          <text:p text:style-name="P12"><text:span text:style-name="T15">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1" draw:text-style-name="P4" draw:layer="layout" svg:width="22.351cm" svg:height="2.031cm" svg:x="1.524cm" svg:y="0.127cm">
          <text:p text:style-name="P3"><text:span text:style-name="T19">Criando métodos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2" draw:text-style-name="P17" draw:layer="layout" svg:width="21.335cm" svg:height="9.651cm" svg:x="2.032cm" svg:y="3.048cm">
          <text:list text:style-name="L10">
            <text:list-item>
              <text:p text:style-name="P16"><text:span text:style-name="T21">Métodos void: sem retorno — executam ações (ex.: </text:span><text:span text:style-name="T24">public void ligar() { ... }</text:span><text:span text:style-name="T21">).</text:span></text:p>
            </text:list-item>
            <text:list-item>
              <text:p text:style-name="P16"><text:span text:style-name="T21">Métodos com retorno: declaram tipo antes do nome + </text:span><text:span text:style-name="T23">return</text:span><text:span text:style-name="T21"> (ex.: </text:span><text:span text:style-name="T24">public int calcularAno(int ano) { ... }</text:span><text:span text:style-name="T21">).</text:span></text:p>
            </text:list-item>
            <text:list-item>
              <text:p text:style-name="P16"><text:span text:style-name="T21">Sintaxe muito semelhante ao </text:span><text:span text:style-name="T22">Java</text:span><text:span text:style-name="T21"> — facilita migração entre as linguagens.</text:span></text:p>
            </text:list-item>
            <text:list-item>
              <text:p text:style-name="P16"><text:span text:style-name="T21">Métodos trocam mensagens entre objetos, cada um realizando sua tarefa específica.</text:span></text:p>
            </text:list-item>
            <text:list-item>
              <text:p text:style-name="P16"><text:span text:style-name="T21">Boas práticas: nomes de métodos descritivos, com verbos (ligar, calcular, exibir)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63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4" draw:text-style-name="P13" draw:layer="layout" svg:width="2.539cm" svg:height="1.079cm" svg:x="21.59cm" svg:y="13.208cm">
          <text:p text:style-name="P12"><text:span text:style-name="T15">10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4" draw:layer="layout" svg:width="22.351cm" svg:height="2.031cm" svg:x="1.524cm" svg:y="0.127cm">
          <text:p text:style-name="P3"><text:span text:style-name="T19">Classe </text:span><text:span text:style-name="T37">Carro</text:span><text:span text:style-name="T19"> em </text:span><text:span text:style-name="T20">C#</text:span><text:span text:style-name="T19"> com méto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6" draw:text-style-name="P19" draw:layer="layout" svg:width="22.351cm" svg:height="9.706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7" draw:text-style-name="P21" draw:layer="layout" svg:width="20.827cm" svg:height="7.111cm" svg:x="2.286cm" svg:y="3.302cm">
          <text:p text:style-name="P20"><text:span text:style-name="T26">class Carro</text:span></text:p>
          <text:p text:style-name="P20"><text:span text:style-name="T26">{</text:span></text:p>
          <text:p text:style-name="P20"><text:span text:style-name="T26"><text:s text:c="4"/>public float motor;</text:span></text:p>
          <text:p text:style-name="P20"><text:span text:style-name="T26"><text:s text:c="4"/>public string modelo;</text:span></text:p>
          <text:p text:style-name="P20"><text:span text:style-name="T26"><text:s text:c="4"/>public int ano;</text:span></text:p>
          <text:p text:style-name="P20"><text:span text:style-name="T27"/></text:p>
          <text:p text:style-name="P20"><text:span text:style-name="T26"><text:s text:c="4"/>public void ligar() <text:s/>// Sem retorno</text:span></text:p>
          <text:p text:style-name="P20"><text:span text:style-name="T26"><text:s text:c="4"/>{</text:span></text:p>
          <text:p text:style-name="P20"><text:span text:style-name="T26"><text:s text:c="8"/>Console.WriteLine("Carro Ligou!");</text:span></text:p>
          <text:p text:style-name="P20"><text:span text:style-name="T26"><text:s text:c="4"/>}</text:span></text:p>
          <text:p text:style-name="P20"><text:span text:style-name="T27"/></text:p>
          <text:p text:style-name="P20"><text:span text:style-name="T26"><text:s text:c="4"/>public int calcularAno(int ano) <text:s/>// Com retorno</text:span></text:p>
          <text:p text:style-name="P20"><text:span text:style-name="T26"><text:s text:c="4"/>{</text:span></text:p>
          <text:p text:style-name="P20"><text:span text:style-name="T26"><text:s text:c="8"/>return ano - this.ano;</text:span></text:p>
          <text:p text:style-name="P20"><text:span text:style-name="T26"><text:s text:c="4"/>}</text:span></text:p>
          <text:p text:style-name="P20"><text:span text:style-name="T26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4" draw:layer="layout" svg:width="22.351cm" svg:height="1.269cm" svg:x="1.524cm" svg:y="12.203cm">
          <text:p text:style-name="P3"><text:span text:style-name="T29">Praticamente idêntico ao Java — a diferença é </text:span><text:span text:style-name="T28">Console.WriteLine</text:span><text:span text:style-name="T29"> </text:span><text:span text:style-name="T38">vs</text:span><text:span text:style-name="T29"> </text:span><text:span text:style-name="T28">System.out.printl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69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0" draw:text-style-name="P13" draw:layer="layout" svg:width="2.539cm" svg:height="1.079cm" svg:x="21.59cm" svg:y="13.208cm">
          <text:p text:style-name="P12"><text:span text:style-name="T15">11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1" draw:text-style-name="P4" draw:layer="layout" svg:width="22.351cm" svg:height="1.777cm" svg:x="1.524cm" svg:y="0.762cm">
          <text:p text:style-name="P3"><text:span text:style-name="T30">Dinâmica 2 — Criando Classe Completa em </text:span><text:span text:style-name="T31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2" draw:text-style-name="P22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3" draw:text-style-name="P17" draw:layer="layout" svg:width="20.319cm" svg:height="8.127cm" svg:x="2.54cm" svg:y="3.556cm">
          <text:list text:style-name="L10">
            <text:list-item>
              <text:p text:style-name="P16"><text:span text:style-name="T21">Individualmente, crie a classe '</text:span><text:span text:style-name="T39">Produto</text:span><text:span text:style-name="T21">' em </text:span><text:span text:style-name="T22">C#</text:span><text:span text:style-name="T21"> com:</text:span></text:p>
            </text:list-item>
            <text:list-item>
              <text:p text:style-name="P16"><text:span text:style-name="T21">Atributos: </text:span><text:span text:style-name="T40">private string nome</text:span><text:span text:style-name="T21">; </text:span><text:span text:style-name="T40">private float preco</text:span><text:span text:style-name="T21">; </text:span><text:span text:style-name="T40">private int estoque</text:span><text:span text:style-name="T21">;</text:span></text:p>
            </text:list-item>
            <text:list-item>
              <text:p text:style-name="P16"><text:span text:style-name="T22">Getters</text:span><text:span text:style-name="T21"> e </text:span><text:span text:style-name="T22">Setters</text:span><text:span text:style-name="T21"> para cada atributo (</text:span><text:span text:style-name="T40">public string getNome()</text:span><text:span text:style-name="T21"> / </text:span><text:span text:style-name="T40">public void setNome(string nome)</text:span><text:span text:style-name="T21">).</text:span></text:p>
            </text:list-item>
            <text:list-item>
              <text:p text:style-name="P16"><text:span text:style-name="T21">Método </text:span><text:span text:style-name="T24">void</text:span><text:span text:style-name="T21">: </text:span><text:span text:style-name="T40">exibirInfo()</text:span><text:span text:style-name="T21"> → imprime </text:span><text:span text:style-name="T40">nome</text:span><text:span text:style-name="T21">, </text:span><text:span text:style-name="T40">preço</text:span><text:span text:style-name="T21"> e </text:span><text:span text:style-name="T40">estoque</text:span><text:span text:style-name="T21">.</text:span></text:p>
            </text:list-item>
            <text:list-item>
              <text:p text:style-name="P16"><text:span text:style-name="T21">Método com retorno: </text:span><text:span text:style-name="T40">calcularValorTotal()</text:span><text:span text:style-name="T21"> → retorna </text:span><text:span text:style-name="T40">preco * estoque</text:span><text:span text:style-name="T21">.</text:span></text:p>
            </text:list-item>
            <text:list-item>
              <text:p text:style-name="P16"><text:span text:style-name="T21">Tempo: 7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74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5" draw:text-style-name="P13" draw:layer="layout" svg:width="2.539cm" svg:height="1.079cm" svg:x="21.59cm" svg:y="13.208cm">
          <text:p text:style-name="P12"><text:span text:style-name="T15">1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6" draw:text-style-name="P4" draw:layer="layout" svg:width="22.351cm" svg:height="1.777cm" svg:x="1.524cm" svg:y="0.762cm">
          <text:p text:style-name="P3"><text:span text:style-name="T33">Exemplo de resposta — Dinâmic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7" draw:text-style-name="P33" draw:layer="layout" svg:width="9.5cm" svg:height="9.651cm" svg:x="-0.6cm" svg:y="2.349cm">
          <text:list text:style-name="L10">
            <text:list-header>
              <text:p text:style-name="P32"><text:span text:style-name="T41">class Produto {</text:span></text:p>
              <text:list>
                <text:list-header>
                  <text:p text:style-name="P32"><text:span text:style-name="T41">private string nome;</text:span></text:p>
                  <text:p text:style-name="P32"><text:span text:style-name="T41">private float preco;</text:span></text:p>
                  <text:p text:style-name="P32"><text:span text:style-name="T41">private int estoque;</text:span></text:p>
                  <text:p text:style-name="P32"><text:span text:style-name="T41"/></text:p>
                  <text:p text:style-name="P32"><text:span text:style-name="T41">public string getNome() {</text:span></text:p>
                  <text:list>
                    <text:list-header>
                      <text:p text:style-name="P32"><text:span text:style-name="T41">return nome;</text:span></text:p>
                    </text:list-header>
                  </text:list>
                  <text:p text:style-name="P32"><text:span text:style-name="T41">}</text:span></text:p>
                  <text:p text:style-name="P32"><text:span text:style-name="T41">public void setNome(string nome) {</text:span></text:p>
                  <text:list>
                    <text:list-header>
                      <text:p text:style-name="P32"><text:span text:style-name="T41">this.nome = nome;</text:span></text:p>
                    </text:list-header>
                  </text:list>
                  <text:p text:style-name="P32"><text:span text:style-name="T41">}</text:span></text:p>
                </text:list-header>
              </text:list>
            </text:list-header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78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9" draw:text-style-name="P13" draw:layer="layout" svg:width="2.539cm" svg:height="1.079cm" svg:x="21.59cm" svg:y="13.208cm">
          <text:p text:style-name="P12"><text:span text:style-name="T15">1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31" draw:layer="layout" svg:width="18cm" svg:height="10.468cm" svg:x="7.9cm" svg:y="2.349cm">
          <draw:text-box>
            <text:list text:style-name="L1">
              <text:list-item>
                <text:list>
                  <text:list-header>
                    <text:p><text:span text:style-name="T42">public float getPreco() {</text:span></text:p>
                    <text:list>
                      <text:list-header>
                        <text:p><text:span text:style-name="T42">return preco;</text:span></text:p>
                      </text:list-header>
                    </text:list>
                    <text:p><text:span text:style-name="T42">}</text:span></text:p>
                  </text:list-header>
                </text:list>
                <text:p><text:span text:style-name="T42"/></text:p>
                <text:list>
                  <text:list-header>
                    <text:p><text:span text:style-name="T42">public void setPreco(float preco) {</text:span></text:p>
                    <text:list>
                      <text:list-header>
                        <text:p><text:span text:style-name="T42">this.preco = preco;</text:span></text:p>
                      </text:list-header>
                    </text:list>
                    <text:p><text:span text:style-name="T42">}</text:span></text:p>
                  </text:list-header>
                </text:list>
                <text:p><text:span text:style-name="T42"/></text:p>
                <text:list>
                  <text:list-header>
                    <text:p><text:span text:style-name="T42">public void exibirInfo() {</text:span></text:p>
                    <text:list>
                      <text:list-header>
                        <text:p><text:span text:style-name="T42">Console.WriteLine(nome + " - R$" + preco + " - Estoque: " + estoque);</text:span></text:p>
                      </text:list-header>
                    </text:list>
                    <text:p><text:span text:style-name="T42">}</text:span></text:p>
                  </text:list-header>
                </text:list>
                <text:p><text:span text:style-name="T42"/></text:p>
                <text:list>
                  <text:list-header>
                    <text:p><text:span text:style-name="T42">public float calcularValorTotal() {</text:span></text:p>
                    <text:list>
                      <text:list-header>
                        <text:p><text:span text:style-name="T42">return this.preco * this.estoque;</text:span></text:p>
                      </text:list-header>
                    </text:list>
                    <text:p><text:span text:style-name="T42">}</text:span></text:p>
                  </text:list-header>
                </text:list>
                <text:p><text:span text:style-name="T42">}</text:span></text:p>
              </text:list-item>
            </text:list>
          </draw:text-box>
        </draw:frame>
        <draw:frame draw:style-name="gr81" draw:text-style-name="P35" draw:layer="layout" svg:width="23.022cm" svg:height="1.529cm" svg:x="1.478cm" svg:y="12.355cm">
          <draw:text-box>
            <text:p text:style-name="P34"><text:span text:style-name="T43">Getters</text:span><text:span text:style-name="T44">/</text:span><text:span text:style-name="T43">setters</text:span><text:span text:style-name="T44"> públicos controlam o acesso aos atributos privados = encapsulamento!</text:span></text:p>
          </draw:text-box>
        </draw:frame>
        <draw:line draw:style-name="gr82" draw:text-style-name="P36" draw:layer="layout" svg:x1="8.6cm" svg:y1="2.539cm" svg:x2="8.6cm" svg:y2="12.355cm">
          <text:p/>
        </draw:lin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4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5" draw:layer="layout" svg:width="1.421cm" svg:height="1.421cm" svg:x="2.083cm" svg:y="5.131cm">
          <draw:image xlink:href="Pictures/100000010000010000000100D70A47D9.png" xlink:type="simple" xlink:show="embed" xlink:actuate="onLoad" draw:mime-type="image/png">
            <text:p/>
          </draw:image>
          <svg:desc>preencoded.png</svg:desc>
        </draw:frame>
        <draw:custom-shape draw:name="Text 2" draw:style-name="gr83" draw:text-style-name="P4" draw:layer="layout" svg:width="18.287cm" svg:height="1.777cm" svg:x="5.08cm" svg:y="4.064cm">
          <text:p text:style-name="P3"><text:span text:style-name="T16">6.3 Modificadores de Aces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4" draw:text-style-name="P4" draw:layer="layout" svg:width="18.287cm" svg:height="1.523cm" svg:x="5.08cm" svg:y="6.096cm">
          <text:p text:style-name="P3"><text:span text:style-name="T18">Encapsulamento em C#: private, public e getters/set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5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6" draw:text-style-name="P13" draw:layer="layout" svg:width="2.539cm" svg:height="1.079cm" svg:x="21.59cm" svg:y="13.208cm">
          <text:p text:style-name="P12"><text:span text:style-name="T15">1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7" draw:text-style-name="P4" draw:layer="layout" svg:width="22.351cm" svg:height="2.031cm" svg:x="1.524cm" svg:y="0.127cm">
          <text:p text:style-name="P3"><text:span text:style-name="T19">Encapsulamento com modificadores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17" draw:layer="layout" svg:width="21.335cm" svg:height="9.651cm" svg:x="2.032cm" svg:y="2.148cm">
          <text:list text:style-name="L10">
            <text:list-item>
              <text:p text:style-name="P16"><text:span text:style-name="T21">Mesmo conceito do </text:span><text:span text:style-name="T22">Java</text:span><text:span text:style-name="T21">: </text:span><text:span text:style-name="T23">public</text:span><text:span text:style-name="T21">, </text:span><text:span text:style-name="T23">private</text:span><text:span text:style-name="T21">, </text:span><text:span text:style-name="T23">protected</text:span><text:span text:style-name="T21"> e </text:span><text:span text:style-name="T22">internal</text:span><text:span text:style-name="T21"> (equivalente ao </text:span><text:span text:style-name="T45">default</text:span><text:span text:style-name="T21">).</text:span></text:p>
            </text:list-item>
            <text:list-item>
              <text:p text:style-name="P16"><text:span text:style-name="T21">Atributos </text:span><text:span text:style-name="T23">private</text:span><text:span text:style-name="T21"> + </text:span><text:span text:style-name="T22">getters</text:span><text:span text:style-name="T21">/</text:span><text:span text:style-name="T22">setters</text:span><text:span text:style-name="T21"> </text:span><text:span text:style-name="T23">public</text:span><text:span text:style-name="T21"> = padrão de encapsulamento em </text:span><text:span text:style-name="T22">C#</text:span><text:span text:style-name="T21">.</text:span></text:p>
            </text:list-item>
            <text:list-item>
              <text:p text:style-name="P16"><text:span text:style-name="T24">get</text:span><text:span text:style-name="T21">: permite ler o valor de um atributo privado de fora da classe.</text:span></text:p>
            </text:list-item>
            <text:list-item>
              <text:p text:style-name="P16"><text:span text:style-name="T24">set</text:span><text:span text:style-name="T21">: permite gravar um valor num atributo privado, controlando a entrada de dados.</text:span></text:p>
            </text:list-item>
            <text:list-item>
              <text:p text:style-name="P16"><text:span text:style-name="T21">Resultado: outras classes acessam apenas o necessário, detalhes internos ficam protegidos.</text:span></text:p>
            </text:list-item>
            <text:list-item>
              <text:p text:style-name="P16"><text:span text:style-name="T22">C#</text:span><text:span text:style-name="T21"> também oferece Properties (</text:span><text:span text:style-name="T24">get</text:span><text:span text:style-name="T21">; </text:span><text:span text:style-name="T24">set</text:span><text:span text:style-name="T21">;) como atalho sintátic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9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13" draw:layer="layout" svg:width="2.539cm" svg:height="1.079cm" svg:x="21.59cm" svg:y="13.208cm">
          <text:p text:style-name="P12"><text:span text:style-name="T15">1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4" draw:layer="layout" svg:width="22.351cm" svg:height="2.031cm" svg:x="1.524cm" svg:y="0.127cm">
          <text:p text:style-name="P3"><text:span text:style-name="T19">Classe Pessoa com encapsulamento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2" draw:text-style-name="P19" draw:layer="layout" svg:width="22.351cm" svg:height="9.206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3" draw:text-style-name="P38" draw:layer="layout" svg:width="20.827cm" svg:height="7.111cm" svg:x="2.286cm" svg:y="3.302cm">
          <text:p text:style-name="P37"><text:span text:style-name="T46">class Pessoa</text:span></text:p>
          <text:p text:style-name="P37"><text:span text:style-name="T46">{</text:span></text:p>
          <text:p text:style-name="P37"><text:span text:style-name="T46"><text:s text:c="4"/>private string nome;</text:span></text:p>
          <text:p text:style-name="P37"><text:span text:style-name="T46"><text:s text:c="4"/>private int idade;</text:span></text:p>
          <text:p text:style-name="P37"><text:span text:style-name="T46"><text:s text:c="4"/>private long cpf;</text:span></text:p>
          <text:p text:style-name="P37"><text:span text:style-name="T47"/></text:p>
          <text:p text:style-name="P37"><text:span text:style-name="T46"><text:s text:c="4"/>public void setNome(string nome) { this.nome = nome; }</text:span></text:p>
          <text:p text:style-name="P37"><text:span text:style-name="T46"><text:s text:c="4"/>public string getNome() { return nome; }</text:span></text:p>
          <text:p text:style-name="P37"><text:span text:style-name="T47"/></text:p>
          <text:p text:style-name="P37"><text:span text:style-name="T46"><text:s text:c="4"/>public void setIdade(int idade) { this.idade = idade; }</text:span></text:p>
          <text:p text:style-name="P37"><text:span text:style-name="T46"><text:s text:c="4"/>public int getIdade() { return idade; }</text:span></text:p>
          <text:p text:style-name="P37"><text:span text:style-name="T47"/></text:p>
          <text:p text:style-name="P37"><text:span text:style-name="T46"><text:s text:c="4"/>public void exibirDados() {</text:span></text:p>
          <text:p text:style-name="P37"><text:span text:style-name="T46"><text:s text:c="8"/>Console.WriteLine(nome + " - " + idade + " - " + cpf);</text:span></text:p>
          <text:p text:style-name="P37"><text:span text:style-name="T46"><text:s text:c="4"/>}</text:span></text:p>
          <text:p text:style-name="P37"><text:span text:style-name="T46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4" draw:text-style-name="P4" draw:layer="layout" svg:width="22.351cm" svg:height="1.269cm" svg:x="1.524cm" svg:y="11.803cm">
          <text:p text:style-name="P3"><text:span text:style-name="T29">Atributos </text:span><text:span text:style-name="T48">private</text:span><text:span text:style-name="T29"> + métodos </text:span><text:span text:style-name="T28">get</text:span><text:span text:style-name="T29">/</text:span><text:span text:style-name="T28">set</text:span><text:span text:style-name="T29"> </text:span><text:span text:style-name="T48">public</text:span><text:span text:style-name="T29"> = encapsulamento cláss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95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6" draw:text-style-name="P13" draw:layer="layout" svg:width="2.539cm" svg:height="1.079cm" svg:x="21.59cm" svg:y="13.208cm">
          <text:p text:style-name="P12"><text:span text:style-name="T15">1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7" draw:text-style-name="P4" draw:layer="layout" svg:width="22.351cm" svg:height="1.777cm" svg:x="1.524cm" svg:y="0.762cm">
          <text:p text:style-name="P3"><text:span text:style-name="T30">Dinâmica 3 — Público ou Privado em </text:span><text:span text:style-name="T31">C#</text:span><text:span text:style-name="T30">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2" draw:text-style-name="P22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8" draw:text-style-name="P17" draw:layer="layout" svg:width="20.319cm" svg:height="8.127cm" svg:x="2.54cm" svg:y="3.056cm">
          <text:list text:style-name="L10">
            <text:list-item>
              <text:p text:style-name="P16"><text:span text:style-name="T21">Em duplas, para a classe '</text:span><text:span text:style-name="T39">ContaCorrente</text:span><text:span text:style-name="T21">', classifiquem cada membro:</text:span></text:p>
            </text:list-item>
            <text:list-item>
              <text:p text:style-name="P16"><text:span text:style-name="T21">Atributos: </text:span><text:span text:style-name="T24">saldo</text:span><text:span text:style-name="T21">, </text:span><text:span text:style-name="T24">titular</text:span><text:span text:style-name="T21">, </text:span><text:span text:style-name="T24">agencia</text:span><text:span text:style-name="T21">, </text:span><text:span text:style-name="T24">senha</text:span><text:span text:style-name="T21">, </text:span><text:span text:style-name="T24">limiteEspecial</text:span><text:span text:style-name="T21">.</text:span></text:p>
            </text:list-item>
            <text:list-item>
              <text:p text:style-name="P16"><text:span text:style-name="T21">Métodos: </text:span><text:span text:style-name="T24">depositar()</text:span><text:span text:style-name="T21">, </text:span><text:span text:style-name="T24">sacar()</text:span><text:span text:style-name="T21">, </text:span><text:span text:style-name="T24">getSaldo()</text:span><text:span text:style-name="T21">, </text:span><text:span text:style-name="T24">setSenha()</text:span><text:span text:style-name="T21">, </text:span><text:span text:style-name="T24">transferir()</text:span><text:span text:style-name="T21">, </text:span><text:span text:style-name="T24">validarSenha()</text:span><text:span text:style-name="T21">.</text:span></text:p>
            </text:list-item>
            <text:list-item>
              <text:p text:style-name="P16"><text:span text:style-name="T21">Para cada um: defina como </text:span><text:span text:style-name="T23">public</text:span><text:span text:style-name="T21"> ou </text:span><text:span text:style-name="T23">private</text:span><text:span text:style-name="T21"> e justifique.</text:span></text:p>
            </text:list-item>
            <text:list-item>
              <text:p text:style-name="P16"><text:span text:style-name="T21">Como o titular de outra conta consegue verificar saldo se ele é </text:span><text:span text:style-name="T23">private</text:span><text:span text:style-name="T21">? (dica: </text:span><text:span text:style-name="T22">getter</text:span><text:span text:style-name="T21">)</text:span></text:p>
            </text:list-item>
            <text:list-item>
              <text:p text:style-name="P16"><text:span text:style-name="T21">Tempo: 5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99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0" draw:text-style-name="P13" draw:layer="layout" svg:width="2.539cm" svg:height="1.079cm" svg:x="21.59cm" svg:y="13.208cm">
          <text:p text:style-name="P12"><text:span text:style-name="T15">1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1" draw:text-style-name="P4" draw:layer="layout" svg:width="22.351cm" svg:height="1.777cm" svg:x="1.524cm" svg:y="0.762cm">
          <text:p text:style-name="P3"><text:span text:style-name="T33">Respostas — Dinâmic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2" draw:text-style-name="P28" draw:layer="layout" svg:width="21.335cm" svg:height="9.651cm" svg:x="2.032cm" svg:y="3.048cm">
          <text:list text:style-name="L10">
            <text:list-item>
              <text:p text:style-name="P26"><text:span text:style-name="T23">private</text:span><text:span text:style-name="T21">: </text:span><text:span text:style-name="T24">saldo</text:span><text:span text:style-name="T21">, </text:span><text:span text:style-name="T24">senha</text:span><text:span text:style-name="T21">, </text:span><text:span text:style-name="T24">limiteEspecial</text:span><text:span text:style-name="T21">, </text:span><text:span text:style-name="T24">validarSenha()</text:span><text:span text:style-name="T21"> — detalhes internos sensíveis;</text:span></text:p>
            </text:list-item>
            <text:list-item>
              <text:p text:style-name="P26"><text:span text:style-name="T23">public</text:span><text:span text:style-name="T21">: </text:span><text:span text:style-name="T24">depositar()</text:span><text:span text:style-name="T21">, </text:span><text:span text:style-name="T24">sacar()</text:span><text:span text:style-name="T21">, </text:span><text:span text:style-name="T24">getSaldo()</text:span><text:span text:style-name="T21">, </text:span><text:span text:style-name="T24">transferir()</text:span><text:span text:style-name="T21">, </text:span><text:span text:style-name="T24">titular</text:span><text:span text:style-name="T21"> (leitura via </text:span><text:span text:style-name="T22">getter</text:span><text:span text:style-name="T21">), </text:span><text:span text:style-name="T24">agencia</text:span><text:span text:style-name="T21"> (leitura via </text:span><text:span text:style-name="T22">getter</text:span><text:span text:style-name="T21">);</text:span></text:p>
            </text:list-item>
            <text:list-item>
              <text:p text:style-name="P26"><text:span text:style-name="T24">setSenha()</text:span><text:span text:style-name="T21">: pode ser </text:span><text:span text:style-name="T23">public</text:span><text:span text:style-name="T21"> mas com validação interna (exigir senha antiga antes de trocar);</text:span></text:p>
            </text:list-item>
            <text:list-item>
              <text:p text:style-name="P26"><text:span text:style-name="T21">O </text:span><text:span text:style-name="T24">saldo</text:span><text:span text:style-name="T21"> é lido por outras classes através de </text:span><text:span text:style-name="T24">getSaldo()</text:span><text:span text:style-name="T21"> — nunca diretamente;</text:span></text:p>
            </text:list-item>
            <text:list-item>
              <text:p text:style-name="P26"><text:span text:style-name="T21">Princípio: exponha o mínimo necessário, proteja o máximo possível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03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4" draw:text-style-name="P13" draw:layer="layout" svg:width="2.539cm" svg:height="1.079cm" svg:x="21.59cm" svg:y="13.208cm">
          <text:p text:style-name="P12"><text:span text:style-name="T15">1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4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5" draw:layer="layout" svg:width="1.421cm" svg:height="1.421cm" svg:x="2.083cm" svg:y="5.131cm">
          <draw:image xlink:href="Pictures/100000010000010000000100190CABFB.png" xlink:type="simple" xlink:show="embed" xlink:actuate="onLoad" draw:mime-type="image/png">
            <text:p/>
          </draw:image>
          <svg:desc>preencoded.png</svg:desc>
        </draw:frame>
        <draw:custom-shape draw:name="Text 2" draw:style-name="gr105" draw:text-style-name="P4" draw:layer="layout" svg:width="18.287cm" svg:height="1.777cm" svg:x="5.08cm" svg:y="4.064cm">
          <text:p text:style-name="P3"><text:span text:style-name="T16">6.4 Construtores Múltipl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4" draw:layer="layout" svg:width="18.287cm" svg:height="1.523cm" svg:x="5.08cm" svg:y="6.096cm">
          <text:p text:style-name="P3"><text:span text:style-name="T18">Polimorfismo em C#: sobrecarga de construt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7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8" draw:text-style-name="P13" draw:layer="layout" svg:width="2.539cm" svg:height="1.079cm" svg:x="21.59cm" svg:y="13.208cm">
          <text:p text:style-name="P12"><text:span text:style-name="T15">1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9" draw:text-style-name="P4" draw:layer="layout" svg:width="22.351cm" svg:height="2.031cm" svg:x="1.524cm" svg:y="0.127cm">
          <text:p text:style-name="P3"><text:span text:style-name="T19">Construtores múltiplos em </text:span><text:span text:style-name="T20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0" draw:text-style-name="P17" draw:layer="layout" svg:width="21.335cm" svg:height="9.651cm" svg:x="2.032cm" svg:y="3.048cm">
          <text:list text:style-name="L10">
            <text:list-item>
              <text:p text:style-name="P16"><text:span text:style-name="T21">Polimorfismo via sobrecarga: vários métodos com mesmo nome, parâmetros diferentes;</text:span></text:p>
            </text:list-item>
            <text:list-item>
              <text:p text:style-name="P16"><text:span text:style-name="T21">Construtor: tem o mesmo nome da classe — inicializa o objeto ao instanciar com '</text:span><text:span text:style-name="T24">new</text:span><text:span text:style-name="T21">';</text:span></text:p>
            </text:list-item>
            <text:list-item>
              <text:p text:style-name="P16"><text:span text:style-name="T21">Diferenciação: feita pela quantidade e tipos de parâmetros passados;</text:span></text:p>
            </text:list-item>
            <text:list-item>
              <text:p text:style-name="P16"><text:span text:style-name="T21">Pode-se ter: construtor sem parâmetros, com dados parciais ou com todos os dados;</text:span></text:p>
            </text:list-item>
            <text:list-item>
              <text:p text:style-name="P16"><text:span text:style-name="T21">Sintaxe idêntica ao </text:span><text:span text:style-name="T22">Java</text:span><text:span text:style-name="T21"> — o conceito é universal em linguagens O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11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2" draw:text-style-name="P13" draw:layer="layout" svg:width="2.539cm" svg:height="1.079cm" svg:x="21.59cm" svg:y="13.208cm">
          <text:p text:style-name="P12"><text:span text:style-name="T15">20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3" draw:text-style-name="P4" draw:layer="layout" svg:width="22.351cm" svg:height="2.031cm" svg:x="1.524cm" svg:y="0.127cm">
          <text:p text:style-name="P3"><text:span text:style-name="T19">Classe Aviao em C# com 3 construt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9" draw:text-style-name="P19" draw:layer="layout" svg:width="22.351cm" svg:height="8.127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4" draw:text-style-name="P21" draw:layer="layout" svg:width="20.827cm" svg:height="7.111cm" svg:x="2.286cm" svg:y="3.302cm">
          <text:p text:style-name="P20"><text:span text:style-name="T26">class Aviao</text:span></text:p>
          <text:p text:style-name="P20"><text:span text:style-name="T26">{</text:span></text:p>
          <text:p text:style-name="P20"><text:span text:style-name="T26"><text:s text:c="4"/>private string empresa;</text:span></text:p>
          <text:p text:style-name="P20"><text:span text:style-name="T26"><text:s text:c="4"/>private string modelo;</text:span></text:p>
          <text:p text:style-name="P20"><text:span text:style-name="T27"/></text:p>
          <text:p text:style-name="P20"><text:span text:style-name="T26"><text:s text:c="4"/>public Aviao() <text:s text:c="29"/>// Sem parâmetros</text:span></text:p>
          <text:p text:style-name="P20"><text:span text:style-name="T26"><text:s text:c="4"/>{ Console.WriteLine("E vdou!"); }</text:span></text:p>
          <text:p text:style-name="P20"><text:span text:style-name="T27"/></text:p>
          <text:p text:style-name="P20"><text:span text:style-name="T26"><text:s text:c="4"/>public Aviao(int x, int y) <text:s text:c="17"/>// 2 inteiros</text:span></text:p>
          <text:p text:style-name="P20"><text:span text:style-name="T26"><text:s text:c="4"/>{ Console.WriteLine("Resultado = " + (x + y)); }</text:span></text:p>
          <text:p text:style-name="P20"><text:span text:style-name="T27"/></text:p>
          <text:p text:style-name="P20"><text:span text:style-name="T26"><text:s text:c="4"/>public Aviao(string empresa, string modelo) <text:s/>// 2 strings</text:span></text:p>
          <text:p text:style-name="P20"><text:span text:style-name="T26"><text:s text:c="4"/>{ this.empresa = empresa; this.modelo = modelo; }</text:span></text:p>
          <text:p text:style-name="P20"><text:span text:style-name="T26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5" draw:text-style-name="P4" draw:layer="layout" svg:width="22.351cm" svg:height="1.269cm" svg:x="1.524cm" svg:y="11.303cm">
          <text:p text:style-name="P3"><text:span text:style-name="T29">3 construtores, mesmo nome '</text:span><text:span text:style-name="T49">Aviao</text:span><text:span text:style-name="T29">', parâmetros diferentes = polimorfism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116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7" draw:text-style-name="P13" draw:layer="layout" svg:width="2.539cm" svg:height="1.079cm" svg:x="21.59cm" svg:y="13.208cm">
          <text:p text:style-name="P12"><text:span text:style-name="T15">21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4" draw:layer="layout" svg:width="22.351cm" svg:height="1.777cm" svg:x="1.524cm" svg:y="0.762cm">
          <text:p text:style-name="P3"><text:span text:style-name="T30">Dinâmica 4 — Construtores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2" draw:text-style-name="P22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9" draw:text-style-name="P28" draw:layer="layout" svg:width="21.875cm" svg:height="8.127cm" svg:x="1.9cm" svg:y="3.456cm">
          <text:list text:style-name="L10">
            <text:list-item>
              <text:p text:style-name="P26"><text:span text:style-name="T21">Individualmente, crie a classe '</text:span><text:span text:style-name="T39">Veiculo</text:span><text:span text:style-name="T21">' em </text:span><text:span text:style-name="T22">C#</text:span><text:span text:style-name="T21"> com 3 construtores:</text:span></text:p>
            </text:list-item>
            <text:list-item>
              <text:p text:style-name="P26"><text:span text:style-name="T21">Construtor 1: sem parâmetros → </text:span><text:span text:style-name="T24">Console.WriteLine("Veículo padrão criado")</text:span><text:span text:style-name="T21">.</text:span></text:p>
            </text:list-item>
            <text:list-item>
              <text:p text:style-name="P26"><text:span text:style-name="T21">Construtor 2: recebe (</text:span><text:span text:style-name="T24">string marca</text:span><text:span text:style-name="T21">) → inicializa apenas </text:span><text:span text:style-name="T24">marca</text:span><text:span text:style-name="T21">.</text:span></text:p>
            </text:list-item>
            <text:list-item>
              <text:p text:style-name="P26"><text:span text:style-name="T21">Construtor 3: recebe (</text:span><text:span text:style-name="T24">string marca</text:span><text:span text:style-name="T21">, </text:span><text:span text:style-name="T24">int ano</text:span><text:span text:style-name="T21">, </text:span><text:span text:style-name="T24">float preco</text:span><text:span text:style-name="T21">) → inicializa tudo.</text:span></text:p>
            </text:list-item>
            <text:list-item>
              <text:p text:style-name="P26"><text:span text:style-name="T21">Crie também uma classe '</text:span><text:span text:style-name="T39">Loja</text:span><text:span text:style-name="T21">' com </text:span><text:span text:style-name="T24">Main</text:span><text:span text:style-name="T21"> que instancie 3 objetos </text:span><text:span text:style-name="T39">Veiculo</text:span><text:span text:style-name="T21">, um por construtor.</text:span></text:p>
            </text:list-item>
            <text:list-item>
              <text:p text:style-name="P26"><text:span text:style-name="T21">Tempo: 6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0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1" draw:text-style-name="P13" draw:layer="layout" svg:width="2.539cm" svg:height="1.079cm" svg:x="21.59cm" svg:y="13.208cm">
          <text:p text:style-name="P12"><text:span text:style-name="T15">22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2" draw:text-style-name="P4" draw:layer="layout" svg:width="22.351cm" svg:height="1.777cm" svg:x="1.524cm" svg:y="0.362cm">
          <text:p text:style-name="P3"><text:span text:style-name="T33">Exemplo de resposta — Dinâmica 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3" draw:text-style-name="P40" draw:layer="layout" svg:width="14cm" svg:height="9.651cm" svg:x="0.5cm" svg:y="1.749cm">
          <text:list text:style-name="L10">
            <text:list-header>
              <text:p text:style-name="P39"><text:span text:style-name="T24">public Veiculo() {</text:span></text:p>
              <text:list>
                <text:list-header>
                  <text:p text:style-name="P39"><text:span text:style-name="T24">Console.WriteLine("Veículo padrão criado");</text:span></text:p>
                </text:list-header>
              </text:list>
              <text:p text:style-name="P39"><text:span text:style-name="T24">}</text:span></text:p>
              <text:p text:style-name="P39"><text:span text:style-name="T24">public Veiculo(string marca) {</text:span></text:p>
              <text:list>
                <text:list-header>
                  <text:p text:style-name="P39"><text:span text:style-name="T24">this.marca = marca;</text:span></text:p>
                </text:list-header>
              </text:list>
              <text:p text:style-name="P39"><text:span text:style-name="T24">}</text:span></text:p>
              <text:p text:style-name="P39"><text:span text:style-name="T24">public Veiculo(string marca, int ano, float preco) {</text:span></text:p>
              <text:list>
                <text:list-header>
                  <text:p text:style-name="P39"><text:span text:style-name="T24">this.marca = marca; this.ano = ano;</text:span></text:p>
                  <text:p text:style-name="P39"><text:span text:style-name="T24">this.preco = preco;</text:span></text:p>
                </text:list-header>
              </text:list>
              <text:p text:style-name="P39"><text:span text:style-name="T24">}</text:span></text:p>
            </text:list-header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24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5" draw:text-style-name="P13" draw:layer="layout" svg:width="2.539cm" svg:height="1.079cm" svg:x="21.59cm" svg:y="13.208cm">
          <text:p text:style-name="P12"><text:span text:style-name="T15">23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6" draw:text-style-name="P35" draw:layer="layout" svg:width="13.5cm" svg:height="3.027cm" svg:x="1.27cm" svg:y="10.5cm">
          <draw:text-box>
            <text:list text:style-name="L1">
              <text:list-item>
                <text:p text:style-name="P34"><text:span text:style-name="T34">Na Loja:</text:span></text:p>
                <text:list>
                  <text:list-item>
                    <text:p text:style-name="P34"><text:span text:style-name="T35">Veiculo v1 = new Veiculo()</text:span><text:span text:style-name="T34">;</text:span></text:p>
                  </text:list-item>
                  <text:list-item>
                    <text:p text:style-name="P34"><text:span text:style-name="T35">Veiculo v2 = new Veiculo("Fiat")</text:span><text:span text:style-name="T34">;</text:span></text:p>
                  </text:list-item>
                  <text:list-item>
                    <text:p text:style-name="P34"><text:span text:style-name="T35">Veiculo v3 = new Veiculo("Honda", 2024, 95000f)</text:span><text:span text:style-name="T34">;</text:span></text:p>
                  </text:list-item>
                </text:list>
              </text:list-item>
            </text:list>
          </draw:text-box>
        </draw:frame>
        <draw:frame draw:style-name="gr127" draw:text-style-name="P42" draw:layer="layout" svg:width="9.478cm" svg:height="2.5cm" svg:x="15.022cm" svg:y="11cm">
          <draw:text-box>
            <text:list text:style-name="L1">
              <text:list-item>
                <text:p text:style-name="P41"><text:span text:style-name="T34">Cada '</text:span><text:span text:style-name="T35">new Veiculo(...)</text:span><text:span text:style-name="T34">' aciona um construtor diferente — polimorfismo via sobrecarga.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4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5" draw:layer="layout" svg:width="1.421cm" svg:height="1.421cm" svg:x="2.083cm" svg:y="5.131cm">
          <draw:image xlink:href="Pictures/100000010000010000000100E4775A66.png" xlink:type="simple" xlink:show="embed" xlink:actuate="onLoad" draw:mime-type="image/png">
            <text:p/>
          </draw:image>
          <svg:desc>preencoded.png</svg:desc>
        </draw:frame>
        <draw:custom-shape draw:name="Text 2" draw:style-name="gr128" draw:text-style-name="P4" draw:layer="layout" svg:width="18.287cm" svg:height="1.777cm" svg:x="5.08cm" svg:y="4.064cm">
          <text:p text:style-name="P3"><text:span text:style-name="T16">6.5 Herança em </text:span><text:span text:style-name="T17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9" draw:text-style-name="P4" draw:layer="layout" svg:width="18.287cm" svg:height="1.523cm" svg:x="5.08cm" svg:y="6.096cm">
          <text:p text:style-name="P3"><text:span text:style-name="T18">Subclasses com ':' — reutilização de códi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30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1" draw:text-style-name="P13" draw:layer="layout" svg:width="2.539cm" svg:height="1.079cm" svg:x="21.59cm" svg:y="13.208cm">
          <text:p text:style-name="P12"><text:span text:style-name="T15">24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2" draw:text-style-name="P4" draw:layer="layout" svg:width="22.351cm" svg:height="2.031cm" svg:x="1.524cm" svg:y="0.127cm">
          <text:p text:style-name="P3"><text:span text:style-name="T19">Herança em </text:span><text:span text:style-name="T20">C#</text:span><text:span text:style-name="T19">: dois-pontos '</text:span><text:span text:style-name="T50">:</text:span><text:span text:style-name="T19">'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3" draw:text-style-name="P17" draw:layer="layout" svg:width="21.335cm" svg:height="9.651cm" svg:x="2.032cm" svg:y="3.048cm">
          <text:list text:style-name="L10">
            <text:list-item>
              <text:p text:style-name="P16"><text:span text:style-name="T21">Em </text:span><text:span text:style-name="T22">C#</text:span><text:span text:style-name="T21">, herança é declarada com '</text:span><text:span text:style-name="T23">:</text:span><text:span text:style-name="T21">' (dois-pontos): </text:span><text:span text:style-name="T24">class Onca : Animal { }</text:span><text:span text:style-name="T51">;</text:span></text:p>
            </text:list-item>
            <text:list-item>
              <text:p text:style-name="P16"><text:span text:style-name="T21">Equivalente ao 'extends' do Java — mesmo conceito, sintaxe levemente diferente;</text:span></text:p>
            </text:list-item>
          </text:list>
          <text:list text:style-name="L13">
            <text:list-item>
              <text:p text:style-name="P16"><text:span text:style-name="T52">Classe filha herda todos os atributos e métodos da classe pai</text:span><text:span text:style-name="T51">;</text:span></text:p>
            </text:list-item>
            <text:list-item>
              <text:p text:style-name="P16"><text:span text:style-name="T52">Classe filha pode adicionar atributos e métodos próprios, mais específicos</text:span><text:span text:style-name="T51">;</text:span></text:p>
            </text:list-item>
          </text:list>
          <text:list text:style-name="L10">
            <text:list-item>
              <text:p text:style-name="P16"><text:span text:style-name="T21">Exemplo: </text:span><text:span text:style-name="T39">Animal</text:span><text:span text:style-name="T21"> (</text:span><text:span text:style-name="T24">especie</text:span><text:span text:style-name="T21">, </text:span><text:span text:style-name="T24">tamanho</text:span><text:span text:style-name="T21">, </text:span><text:span text:style-name="T24">cor</text:span><text:span text:style-name="T21">) → </text:span><text:span text:style-name="T39">Onca</text:span><text:span text:style-name="T21"> herda tudo + </text:span><text:span text:style-name="T24">peso</text:span><text:span text:style-name="T21">, </text:span><text:span text:style-name="T24">velocidade</text:span><text:span text:style-name="T21">, </text:span><text:span text:style-name="T24">habitat</text:span><text:span text:style-name="T51">;</text:span></text:p>
            </text:list-item>
            <text:list-item>
              <text:p text:style-name="P16"><text:span text:style-name="T21">Regra: uma onça </text:span><text:span text:style-name="T53">É</text:span><text:span text:style-name="T21"> um animal, mas nem todo animal é uma onç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34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5" draw:text-style-name="P13" draw:layer="layout" svg:width="2.539cm" svg:height="1.079cm" svg:x="21.59cm" svg:y="13.208cm">
          <text:p text:style-name="P12"><text:span text:style-name="T15">25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6" draw:text-style-name="P4" draw:layer="layout" svg:width="22.351cm" svg:height="2.031cm" svg:x="1.524cm" svg:y="0.127cm">
          <text:p text:style-name="P3"><text:span text:style-name="T19">Exemplo: Animal → Onca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2" draw:text-style-name="P19" draw:layer="layout" svg:width="22.351cm" svg:height="9.206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351cm" svg:height="0.101cm" svg:x="1.524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7" draw:text-style-name="P38" draw:layer="layout" svg:width="20.827cm" svg:height="7.111cm" svg:x="2.286cm" svg:y="3.302cm">
          <text:p text:style-name="P37"><text:span text:style-name="T46">class Animal <text:s/>// Superclasse</text:span></text:p>
          <text:p text:style-name="P37"><text:span text:style-name="T46">{</text:span></text:p>
          <text:p text:style-name="P37"><text:span text:style-name="T46"><text:s text:c="4"/>private string especie;</text:span></text:p>
          <text:p text:style-name="P37"><text:span text:style-name="T46"><text:s text:c="4"/>private float tamanho;</text:span></text:p>
          <text:p text:style-name="P37"><text:span text:style-name="T46"><text:s text:c="4"/>private string cor;</text:span></text:p>
          <text:p text:style-name="P37"><text:span text:style-name="T46"><text:s text:c="4"/>// getters e setters...</text:span></text:p>
          <text:p text:style-name="P37"><text:span text:style-name="T46">}</text:span></text:p>
          <text:p text:style-name="P37"><text:span text:style-name="T47"/></text:p>
          <text:p text:style-name="P37"><text:span text:style-name="T46">class Onca : Animal <text:s/>// Subclasse (herda de Animal)</text:span></text:p>
          <text:p text:style-name="P37"><text:span text:style-name="T46">{</text:span></text:p>
          <text:p text:style-name="P37"><text:span text:style-name="T46"><text:s text:c="4"/>private float peso;</text:span></text:p>
          <text:p text:style-name="P37"><text:span text:style-name="T46"><text:s text:c="4"/>private int velocidade;</text:span></text:p>
          <text:p text:style-name="P37"><text:span text:style-name="T46"><text:s text:c="4"/>private string habitat;</text:span></text:p>
          <text:p text:style-name="P37"><text:span text:style-name="T46"><text:s text:c="4"/>// getters e setters próprios...</text:span></text:p>
          <text:p text:style-name="P37"><text:span text:style-name="T46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8" draw:text-style-name="P4" draw:layer="layout" svg:width="22.351cm" svg:height="1.269cm" svg:x="1.524cm" svg:y="11.803cm">
          <text:p text:style-name="P3"><text:span text:style-name="T29">Java: </text:span><text:span text:style-name="T28">extends</text:span><text:span text:style-name="T29"> | C#: '</text:span><text:span text:style-name="T54">:</text:span><text:span text:style-name="T29">' — mesmo conceito, sintaxe difer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8" draw:style-name="gr139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0" draw:text-style-name="P13" draw:layer="layout" svg:width="2.539cm" svg:height="1.079cm" svg:x="21.59cm" svg:y="13.208cm">
          <text:p text:style-name="P12"><text:span text:style-name="T15">26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1" draw:text-style-name="P4" draw:layer="layout" svg:width="22.351cm" svg:height="1.777cm" svg:x="1.524cm" svg:y="0.762cm">
          <text:p text:style-name="P3"><text:span text:style-name="T30">Dinâmica 5 — Herança Completa em 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2" draw:text-style-name="P22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2" draw:text-style-name="P44" draw:layer="layout" svg:width="20.96cm" svg:height="8.127cm" svg:x="2.54cm" svg:y="3.556cm">
          <text:list text:style-name="L10">
            <text:list-item>
              <text:p text:style-name="P27"><text:span text:style-name="T21">Em duplas, criem uma hierarquia em </text:span><text:span text:style-name="T22">C#</text:span><text:span text:style-name="T21"> para um sistema de e-commerce:</text:span></text:p>
              <text:list>
                <text:list-item>
                  <text:p text:style-name="P27"><text:span text:style-name="T21">Superclasse '</text:span><text:span text:style-name="T39">Produto</text:span><text:span text:style-name="T21">':</text:span></text:p>
                  <text:list>
                    <text:list-item>
                      <text:p text:style-name="P27"><text:span text:style-name="T24">private string nome</text:span><text:span text:style-name="T21">, </text:span><text:span text:style-name="T24">float preco</text:span><text:span text:style-name="T21"> + </text:span><text:span text:style-name="T22">getters</text:span><text:span text:style-name="T21">/</text:span><text:span text:style-name="T22">setters</text:span><text:span text:style-name="T21"> + </text:span><text:span text:style-name="T24">exibirInfo()</text:span><text:span text:style-name="T21">;</text:span></text:p>
                    </text:list-item>
                  </text:list>
                </text:list-item>
                <text:list-item>
                  <text:p text:style-name="P43"><text:span text:style-name="T21">Subclasse '</text:span><text:span text:style-name="T39">Eletronico : Produto</text:span><text:span text:style-name="T21">': </text:span><text:span text:style-name="T24">private int voltagem</text:span><text:span text:style-name="T21">, </text:span><text:span text:style-name="T24">int garantiaMeses</text:span><text:span text:style-name="T21"> + </text:span><text:span text:style-name="T22">getters</text:span><text:span text:style-name="T21">/</text:span><text:span text:style-name="T22">setters</text:span><text:span text:style-name="T21">;</text:span></text:p>
                </text:list-item>
                <text:list-item>
                  <text:p text:style-name="P27"><text:span text:style-name="T21">Subclasse '</text:span><text:span text:style-name="T39">Roupa : Produto</text:span><text:span text:style-name="T21">': </text:span><text:span text:style-name="T24">private string tamanho</text:span><text:span text:style-name="T21">, </text:span><text:span text:style-name="T24">string cor</text:span><text:span text:style-name="T21"> + </text:span><text:span text:style-name="T22">getters</text:span><text:span text:style-name="T21">/</text:span><text:span text:style-name="T22">setters</text:span><text:span text:style-name="T21">;</text:span></text:p>
                </text:list-item>
                <text:list-item>
                  <text:p text:style-name="P27"><text:span text:style-name="T21">Classe </text:span><text:span text:style-name="T24">Main</text:span><text:span text:style-name="T21">: instancie 1 </text:span><text:span text:style-name="T39">Eletronico</text:span><text:span text:style-name="T21"> e 1 </text:span><text:span text:style-name="T39">Roupa</text:span><text:span text:style-name="T21">, preencha atributos e chame </text:span><text:span text:style-name="T24">exibirInfo()</text:span><text:span text:style-name="T21">.</text:span></text:p>
                </text:list-item>
              </text:list>
            </text:list-item>
            <text:list-item>
              <text:p text:style-name="P27"><text:span text:style-name="T21">Tempo: 8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43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4" draw:text-style-name="P13" draw:layer="layout" svg:width="2.539cm" svg:height="1.079cm" svg:x="21.59cm" svg:y="13.208cm">
          <text:p text:style-name="P12"><text:span text:style-name="T15">27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8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5" draw:text-style-name="P4" draw:layer="layout" svg:width="22.351cm" svg:height="1.777cm" svg:x="1.524cm" svg:y="0.762cm">
          <text:p text:style-name="P3"><text:span text:style-name="T33">Exemplo de resposta — Dinâmica 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6" draw:text-style-name="P40" draw:layer="layout" svg:width="10.335cm" svg:height="9.651cm" svg:x="1.165cm" svg:y="2.349cm">
          <text:list text:style-name="L10">
            <text:list-header>
              <text:p text:style-name="P39"><text:span text:style-name="T55">class Produto {</text:span></text:p>
              <text:list>
                <text:list-header>
                  <text:p text:style-name="P39"><text:span text:style-name="T55">private string nome;</text:span></text:p>
                  <text:p text:style-name="P39"><text:span text:style-name="T55">private float preco;</text:span></text:p>
                  <text:p text:style-name="P39"><text:span text:style-name="T55">public void exibirInfo() {</text:span></text:p>
                  <text:list>
                    <text:list-header>
                      <text:p text:style-name="P39"><text:span text:style-name="T55">Console.WriteLine(nome + " R$" + preco);</text:span></text:p>
                    </text:list-header>
                  </text:list>
                  <text:p text:style-name="P39"><text:span text:style-name="T55">}</text:span></text:p>
                  <text:p text:style-name="P39"><text:span text:style-name="T55">/* getters/setters */</text:span></text:p>
                </text:list-header>
              </text:list>
              <text:p text:style-name="P39"><text:span text:style-name="T55">}</text:span></text:p>
              <text:p text:style-name="P39"><text:span text:style-name="T55">class Eletronico : Produto {</text:span></text:p>
              <text:list>
                <text:list-header>
                  <text:p text:style-name="P39"><text:span text:style-name="T55">private int voltagem;</text:span></text:p>
                  <text:p text:style-name="P39"><text:span text:style-name="T55">private int garantiaMeses;</text:span></text:p>
                  <text:p text:style-name="P39"><text:span text:style-name="T55">/* getters/setters próprios */</text:span></text:p>
                </text:list-header>
              </text:list>
              <text:p text:style-name="P39"><text:span text:style-name="T55">}</text:span></text:p>
            </text:list-header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47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8" draw:text-style-name="P13" draw:layer="layout" svg:width="2.539cm" svg:height="1.079cm" svg:x="21.59cm" svg:y="13.208cm">
          <text:p text:style-name="P12"><text:span text:style-name="T15">28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9" draw:text-style-name="P47" draw:layer="layout" svg:width="14.549cm" svg:height="6.151cm" svg:x="10.851cm" svg:y="2.349cm">
          <draw:text-box>
            <text:list text:style-name="L1">
              <text:list-header>
                <text:p text:style-name="P45"><text:span text:style-name="T56">class Roupa : Produto {</text:span></text:p>
                <text:list>
                  <text:list-header>
                    <text:p text:style-name="P45"><text:span text:style-name="T56">private string tamanho;</text:span></text:p>
                    <text:p text:style-name="P45"><text:span text:style-name="T56">private string cor;</text:span></text:p>
                    <text:p text:style-name="P45"><text:span text:style-name="T56">/* getters/setters próprios */</text:span></text:p>
                  </text:list-header>
                </text:list>
                <text:p text:style-name="P45"><text:span text:style-name="T56">}</text:span></text:p>
              </text:list-header>
            </text:list>
            <text:p text:style-name="P45"><text:span text:style-name="T56"/></text:p>
            <text:p text:style-name="P45"><text:span text:style-name="T56"/></text:p>
            <text:list text:style-name="L14">
              <text:list-header>
                <text:p text:style-name="P46"><text:span text:style-name="T56">Main:</text:span></text:p>
                <text:list>
                  <text:list-header>
                    <text:p text:style-name="P46"><text:span text:style-name="T56">Eletronico tv = new Eletronico(); tv.setNome("TV");</text:span></text:p>
                    <text:p text:style-name="P46"><text:span text:style-name="T56">tv.setPreco(2500f); tv.exibirInfo();</text:span></text:p>
                  </text:list-header>
                </text:list>
              </text:list-header>
            </text:list>
          </draw:text-box>
        </draw:frame>
        <draw:frame draw:style-name="gr150" draw:text-style-name="P49" draw:layer="layout" svg:width="12.29cm" svg:height="4.035cm" svg:x="11.71cm" svg:y="9.965cm">
          <draw:text-box>
            <text:list text:style-name="L1">
              <text:list-item>
                <text:p text:style-name="P48"><text:span text:style-name="T57">Eletronico e Roupa herdam nome e preço de Produto — sem reescrita. Herança + encapsulamento juntos!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28" presentation:class="page"/>
          <draw:frame draw:name="Notes Placeholder 2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1" draw:text-style-name="P4" draw:layer="layout" svg:width="22.351cm" svg:height="2.031cm" svg:x="1.524cm" svg:y="0.127cm">
          <text:p text:style-name="P3"><text:span text:style-name="T20">Java</text:span><text:span text:style-name="T19"> </text:span><text:span text:style-name="T58">vs</text:span><text:span text:style-name="T19">. </text:span><text:span text:style-name="T20">C#</text:span><text:span text:style-name="T19"> — Comparativo de Sintax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72" draw:text-style-name="P22" draw:layer="layout" svg:width="10.921cm" svg:height="9.397cm" svg:x="1.2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0.921cm" svg:height="0.151cm" svg:x="1.2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2" draw:text-style-name="P51" draw:layer="layout" svg:width="9.905cm" svg:height="1.142cm" svg:x="1.778cm" svg:y="3.302cm">
          <text:p text:style-name="P50"><text:span text:style-name="T59">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3" draw:text-style-name="P53" draw:layer="layout" svg:width="9.905cm" svg:height="7.111cm" svg:x="1.778cm" svg:y="4.699cm">
          <text:list text:style-name="L10">
            <text:list-item>
              <text:p text:style-name="P52"><text:span text:style-name="T24">package</text:span><text:span text:style-name="T21"> → organiza classes;</text:span></text:p>
            </text:list-item>
            <text:list-item>
              <text:p text:style-name="P52"><text:span text:style-name="T24">import</text:span><text:span text:style-name="T21"> → importa bibliotecas;</text:span></text:p>
            </text:list-item>
            <text:list-item>
              <text:p text:style-name="P52"><text:span text:style-name="T24">extends</text:span><text:span text:style-name="T21"> → herança;</text:span></text:p>
            </text:list-item>
            <text:list-item>
              <text:p text:style-name="P52"><text:span text:style-name="T24">System.out.println()</text:span><text:span text:style-name="T21">;</text:span></text:p>
            </text:list-item>
            <text:list-item>
              <text:p text:style-name="P52"><text:span text:style-name="T24">String</text:span><text:span text:style-name="T21"> (maiúsculo);</text:span></text:p>
            </text:list-item>
            <text:list-item>
              <text:p text:style-name="P52"><text:span text:style-name="T22">JVM</text:span><text:span text:style-name="T21"> (máquina virtual);</text:span></text:p>
            </text:list-item>
            <text:list-item>
              <text:p text:style-name="P52"><text:span text:style-name="T22">IDE</text:span><text:span text:style-name="T21">: </text:span><text:span text:style-name="T22">NetBeans</text:span><text:span text:style-name="T21"> / </text:span><text:span text:style-name="T22">Eclipse</text:span><text:span text:style-name="T21">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2" draw:text-style-name="P22" draw:layer="layout" svg:width="10.921cm" svg:height="9.397cm" svg:x="13.208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10.921cm" svg:height="0.151cm" svg:x="13.208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4" draw:text-style-name="P51" draw:layer="layout" svg:width="9.905cm" svg:height="1.142cm" svg:x="13.716cm" svg:y="3.302cm">
          <text:p text:style-name="P50"><text:span text:style-name="T60">C#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5" draw:text-style-name="P53" draw:layer="layout" svg:width="9.905cm" svg:height="7.111cm" svg:x="13.716cm" svg:y="4.699cm">
          <text:list text:style-name="L10">
            <text:list-item>
              <text:p text:style-name="P52"><text:span text:style-name="T24">namespace</text:span><text:span text:style-name="T21"> → organiza classes;</text:span></text:p>
            </text:list-item>
            <text:list-item>
              <text:p text:style-name="P52"><text:span text:style-name="T24">using</text:span><text:span text:style-name="T21"> → importa bibliotecas;</text:span></text:p>
            </text:list-item>
            <text:list-item>
              <text:p text:style-name="P52"><text:span text:style-name="T24">:</text:span><text:span text:style-name="T21"> (dois-pontos) → herança;</text:span></text:p>
            </text:list-item>
            <text:list-item>
              <text:p text:style-name="P52"><text:span text:style-name="T24">Console.WriteLine()</text:span><text:span text:style-name="T21">;</text:span></text:p>
            </text:list-item>
            <text:list-item>
              <text:p text:style-name="P52"><text:span text:style-name="T24">string</text:span><text:span text:style-name="T21"> (minúsculo);</text:span></text:p>
            </text:list-item>
            <text:list-item>
              <text:p text:style-name="P52"><text:span text:style-name="T22">.NET Framework</text:span><text:span text:style-name="T21"> / </text:span><text:span text:style-name="T22">CLR</text:span><text:span text:style-name="T21">;</text:span></text:p>
            </text:list-item>
            <text:list-item>
              <text:p text:style-name="P52"><text:span text:style-name="T22">IDE</text:span><text:span text:style-name="T21">: </text:span><text:span text:style-name="T22">Visual Studio</text:span><text:span text:style-name="T21">;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12" draw:style-name="gr156" draw:text-style-name="P4" draw:layer="layout" svg:width="15.239cm" svg:height="1.079cm" svg:x="1.27cm" svg:y="13.208cm">
          <text:p text:style-name="P3"><text:span text:style-name="T15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7" draw:text-style-name="P13" draw:layer="layout" svg:width="2.539cm" svg:height="1.079cm" svg:x="21.59cm" svg:y="13.208cm">
          <text:p text:style-name="P12"><text:span text:style-name="T15">29 / 3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9" presentation:class="page"/>
          <draw:frame draw:name="Notes Placeholder 2" presentation:style-name="pr3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0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72" draw:text-style-name="P22" draw:layer="layout" svg:width="21.335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8" draw:text-style-name="P55" draw:layer="layout" svg:width="19.557cm" svg:height="2.793cm" svg:x="3.048cm" svg:y="1.27cm">
          <text:p text:style-name="P54"><text:span text:style-name="T61">"C# e Java compartilham a mesma base sintática do C e os mesmos 4 princípios OO — a migração entre elas é natural e produtiva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9" draw:text-style-name="P4" draw:layer="layout" svg:width="21.335cm" svg:height="1.269cm" svg:x="2.032cm" svg:y="5.08cm">
          <text:p text:style-name="P3"><text:span text:style-name="T62">Pontos-chave da aul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0" draw:text-style-name="P57" draw:layer="layout" svg:width="21.335cm" svg:height="5.587cm" svg:x="2.032cm" svg:y="6.604cm">
          <text:list text:style-name="L10">
            <text:list-item>
              <text:p text:style-name="P56"><text:span text:style-name="T63">C#</text:span><text:span text:style-name="T64">: criada pela </text:span><text:span text:style-name="T63">Microsoft</text:span><text:span text:style-name="T64"> (2000) para </text:span><text:span text:style-name="T63">.NET</text:span><text:span text:style-name="T64"> — fácil aprendizagem, alta produtividade.</text:span></text:p>
            </text:list-item>
            <text:list-item>
              <text:p text:style-name="P56"><text:span text:style-name="T55">namespace</text:span><text:span text:style-name="T64"> = </text:span><text:span text:style-name="T55">package</text:span><text:span text:style-name="T64"> | </text:span><text:span text:style-name="T55">using</text:span><text:span text:style-name="T64"> = </text:span><text:span text:style-name="T55">import</text:span><text:span text:style-name="T64"> | </text:span><text:span text:style-name="T55">Console.WriteLine</text:span><text:span text:style-name="T64"> = </text:span><text:span text:style-name="T55">System.out.println</text:span><text:span text:style-name="T64">.</text:span></text:p>
            </text:list-item>
            <text:list-item>
              <text:p text:style-name="P56"><text:span text:style-name="T64">Encapsulamento: </text:span><text:span text:style-name="T65">private</text:span><text:span text:style-name="T64"> + </text:span><text:span text:style-name="T63">getters</text:span><text:span text:style-name="T64">/</text:span><text:span text:style-name="T63">setters</text:span><text:span text:style-name="T64"> públicos — mesmo padrão do </text:span><text:span text:style-name="T63">Java</text:span><text:span text:style-name="T64">.</text:span></text:p>
            </text:list-item>
            <text:list-item>
              <text:p text:style-name="P56"><text:span text:style-name="T64">Polimorfismo: construtores múltiplos com parâmetros diferentes.</text:span></text:p>
            </text:list-item>
            <text:list-item>
              <text:p text:style-name="P56"><text:span text:style-name="T64">Herança: '</text:span><text:span text:style-name="T65">:</text:span><text:span text:style-name="T64">' no </text:span><text:span text:style-name="T63">C#</text:span><text:span text:style-name="T64"> equivale a '</text:span><text:span text:style-name="T55">extends</text:span><text:span text:style-name="T64">' no </text:span><text:span text:style-name="T63">Java</text:span><text:span text:style-name="T64"> — mesma lógica, sintaxe levemente diferente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1" draw:text-style-name="P4" draw:layer="layout" svg:width="12.699cm" svg:height="1.587cm" svg:x="2.032cm" svg:y="12.7cm">
          <text:p text:style-name="P3"><text:span text:style-name="T66">Obrigado! Até a próxima aul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2" draw:text-style-name="P13" draw:layer="layout" svg:width="10.159cm" svg:height="1.587cm" svg:x="13.97cm" svg:y="12.7cm">
          <text:p text:style-name="P12"><text:span text:style-name="T67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0" presentation:class="page"/>
          <draw:frame draw:name="Notes Placeholder 2" presentation:style-name="pr3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Mono Prop 10" svg:font-family="'LM Mono Prop 10'" style:font-pitch="variable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 Gyre Cursor" svg:font-family="'TeX Gyre Cursor'" style:font-pitch="variable"/>
    <style:font-face style:name="Tlwg Mono" svg:font-family="'Tlwg Mono'" style:font-pitch="fixed"/>
    <style:font-face style:name="Ubuntu Sans Mono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O — Aula 6</dc:title>
    <dc:subject>PptxGenJS Presentation</dc:subject>
    <meta:initial-creator>UNISA</meta:initial-creator>
    <meta:editing-cycles>25</meta:editing-cycles>
    <meta:creation-date>2026-03-14T05:54:41</meta:creation-date>
    <dc:date>2026-05-14T04:54:17.243132676</dc:date>
    <meta:editing-duration>PT58M54S</meta:editing-duration>
    <meta:generator>LibreOffice/25.8.1.1$Linux_X86_64 LibreOffice_project/54047653041915e595ad4e45cccea684809c77b5</meta:generator>
    <meta:print-date>2026-05-14T04:22:31.736494415</meta:print-date>
    <meta:printed-by>Arquivos PDF</meta:printed-by>
    <meta:document-statistic meta:object-count="374"/>
    <meta:user-defined meta:name="AppVersion">16.0000</meta:user-defined>
    <meta:user-defined meta:name="Company">PptxGenJS</meta:user-defined>
    <meta:user-defined meta:name="Notes" meta:value-type="float">30</meta:user-defined>
    <meta:user-defined meta:name="PresentationFormat">On-screen Show (16:9)</meta:user-defined>
    <meta:user-defined meta:name="Slides" meta:value-type="float">30</meta:user-defined>
  </office:meta>
</office:document-meta>
</file>