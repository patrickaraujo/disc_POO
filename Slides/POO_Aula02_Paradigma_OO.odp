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F5A393F9.png" manifest:media-type="image/png"/>
  <manifest:file-entry manifest:full-path="Pictures/100000010000010000000100E4775A66.png" manifest:media-type="image/png"/>
  <manifest:file-entry manifest:full-path="Pictures/1000000100000100000001009D404509.png" manifest:media-type="image/png"/>
  <manifest:file-entry manifest:full-path="Pictures/100000010000010000000100945BDA93.png" manifest:media-type="image/png"/>
  <manifest:file-entry manifest:full-path="Pictures/1000000100000100000001008FF3F88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503cm" fo:min-width="20.836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62cm" fo:min-width="9.723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62cm" fo:min-width="10.422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21.868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386cm" fo:min-width="21.376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338cm" fo:min-width="21.969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43652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6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7" style:family="paragraph">
      <loext:graphic-properties draw:fill="solid" draw:fill-color="#162236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19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1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22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.21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5" style:family="paragraph">
      <loext:graphic-properties draw:fill="none"/>
      <style:paragraph-properties fo:margin-left="0cm" fo:margin-right="0cm" fo:margin-top="0cm" fo:margin-bottom="0.21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.212cm" fo:line-height="150%" fo:text-align="start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Sans Quot 8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loext:graphic-properties draw:fill="none"/>
      <style:paragraph-properties fo:margin-left="0cm" fo:margin-right="0cm" fo:margin-top="0cm" fo:margin-bottom="0.212cm" fo:line-height="15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Sans Quot 8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30" style:family="paragraph">
      <style:paragraph-properties fo:margin-left="0cm" fo:margin-right="0cm" fo:margin-top="0cm" fo:margin-bottom="0.21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31" style:family="paragraph">
      <loext:graphic-properties draw:fill="none"/>
      <style:paragraph-properties fo:margin-left="0cm" fo:margin-right="0cm" fo:margin-top="0cm" fo:margin-bottom="0.21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4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9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1" style:font-size-complex="16pt" style:font-style-complex="italic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Roman Unslanted 10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17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2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Mono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Roman Unslanted 10" fo:font-size="32pt" fo:letter-spacing="normal" fo:language="en" fo:country="US" fo:font-style="italic" style:text-underline-style="none" fo:font-weight="bold" fo:background-color="transparent" style:font-name-asian="Georgia1" style:font-size-asian="32pt" style:font-style-asian="italic" style:font-weight-asian="bold" style:font-name-complex="Georgia" style:font-size-complex="32pt" style:font-style-complex="italic" style:font-weight-complex="bold"/>
    </style:style>
    <style:style style:name="T25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26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27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normal" fo:background-color="transparent" style:font-name-asian="Georgia1" style:font-size-asian="14pt" style:font-style-asian="italic" style:font-weight-asian="normal" style:font-name-complex="Georgia" style:font-size-complex="14pt" style:font-style-complex="italic" style:font-weight-complex="normal"/>
    </style:style>
    <style:style style:name="T2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29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30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apítulo 2 — Paradigma de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3">Aula 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4">Universidade Santa Amaro — UNI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6">O que veremos hoj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7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8">Algoritmos: conceito e importânc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8">Programação e gerações de linguage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7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3"><text:span text:style-name="T8">Programação Estrutu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7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8">Programação Orientada a Objetos (PO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7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8">Estruturada vs. Orientada a Objetos — comparativ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7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9">Dinâmicas &amp; Atividades prát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2" draw:style-name="gr2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3" draw:text-style-name="P12" draw:layer="layout" svg:width="2.539cm" svg:height="1.079cm" svg:x="21.59cm" svg:y="13.208cm">
          <text:p text:style-name="P11"><text:span text:style-name="T10">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8FF3F88E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4" draw:layer="layout" svg:width="18.287cm" svg:height="1.777cm" svg:x="5.08cm" svg:y="4.064cm">
          <text:p text:style-name="P3"><text:span text:style-name="T11">2.1 Algoritm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4" draw:layer="layout" svg:width="18.287cm" svg:height="1.523cm" svg:x="5.08cm" svg:y="6.096cm">
          <text:p text:style-name="P3"><text:span text:style-name="T12">Sequências finitas de etapas para executar taref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2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" draw:text-style-name="P12" draw:layer="layout" svg:width="2.539cm" svg:height="1.079cm" svg:x="21.59cm" svg:y="13.208cm">
          <text:p text:style-name="P11"><text:span text:style-name="T10">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2.351cm" svg:height="2.031cm" svg:x="1.524cm" svg:y="0.127cm">
          <text:p text:style-name="P3"><text:span text:style-name="T13">O que são algoritmo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16" draw:layer="layout" svg:width="21.335cm" svg:height="9.651cm" svg:x="2.032cm" svg:y="3.048cm">
          <text:list text:style-name="L10">
            <text:list-item>
              <text:p text:style-name="P15"><text:span text:style-name="T14">Algoritmo: sequência finita de etapas para executar uma tarefa pré-determinada;</text:span></text:p>
            </text:list-item>
            <text:list-item>
              <text:p text:style-name="P15"><text:span text:style-name="T14">Executamos algoritmos no cotidiano: tomar banho, escovar dentes, atravessar a rua, conferir troco;</text:span></text:p>
            </text:list-item>
            <text:list-item>
              <text:p text:style-name="P15"><text:span text:style-name="T14">Algoritmos computacionais também nos cercam: </text:span><text:span text:style-name="T15">GPS</text:span><text:span text:style-name="T14"> calcula menor rota, e-commerce detecta fraudes;</text:span></text:p>
            </text:list-item>
            <text:list-item>
              <text:p text:style-name="P15"><text:span text:style-name="T14">Diferença crucial: instruções para humanos podem ser livres; para computadores exigem precisão perfeita;</text:span></text:p>
            </text:list-item>
            <text:list-item>
              <text:p text:style-name="P15"><text:span text:style-name="T14">O computador executa exatamente o que lhe for indicado, linha a linha, sem questionamen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12" draw:layer="layout" svg:width="2.539cm" svg:height="1.079cm" svg:x="21.59cm" svg:y="13.208cm">
          <text:p text:style-name="P11"><text:span text:style-name="T10">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4" draw:layer="layout" svg:width="22.351cm" svg:height="2.031cm" svg:x="1.524cm" svg:y="0.127cm">
          <text:p text:style-name="P3"><text:span text:style-name="T13">Precisão computacional </text:span><text:span text:style-name="T16">vs</text:span><text:span text:style-name="T13">. huma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" draw:text-style-name="P16" draw:layer="layout" svg:width="21.335cm" svg:height="9.651cm" svg:x="2.032cm" svg:y="3.048cm">
          <text:list text:style-name="L10">
            <text:list-item>
              <text:p text:style-name="P15"><text:span text:style-name="T14">Um ser humano tem capacidade cognitiva de interpretar e adaptar instruções ambíguas;</text:span></text:p>
            </text:list-item>
            <text:list-item>
              <text:p text:style-name="P15"><text:span text:style-name="T14">O computador não tem bom senso: se receber uma instrução sem fim, a executa até ser forçado a parar;</text:span></text:p>
            </text:list-item>
            <text:list-item>
              <text:p text:style-name="P15"><text:span text:style-name="T14">Loops infinitos são um erro comum causado por falta de precisão na descrição do algoritmo;</text:span></text:p>
            </text:list-item>
            <text:list-item>
              <text:p text:style-name="P15"><text:span text:style-name="T14">Conclusão: a qualidade do algoritmo depende diretamente da clareza e detalhamento do programador;</text:span></text:p>
            </text:list-item>
            <text:list-item>
              <text:p text:style-name="P15"><text:span text:style-name="T14">Algoritmos bem escritos são a base de qualquer software, independentemente do paradigm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" draw:text-style-name="P12" draw:layer="layout" svg:width="2.539cm" svg:height="1.079cm" svg:x="21.59cm" svg:y="13.208cm">
          <text:p text:style-name="P11"><text:span text:style-name="T10">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" draw:text-style-name="P4" draw:layer="layout" svg:width="22.351cm" svg:height="1.777cm" svg:x="1.524cm" svg:y="0.762cm">
          <text:p text:style-name="P3"><text:span text:style-name="T17">Dinâmica 1 — Algoritmo do Dia a D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7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" draw:text-style-name="P16" draw:layer="layout" svg:width="20.319cm" svg:height="8.127cm" svg:x="2.54cm" svg:y="2.656cm">
          <text:list text:style-name="L10">
            <text:list-item>
              <text:p text:style-name="P15"><text:span text:style-name="T14">Em duplas, escolham uma atividade cotidiana simples (ex.: fazer café, sacar dinheiro no caixa eletrônico);</text:span></text:p>
            </text:list-item>
            <text:list-item>
              <text:p text:style-name="P15"><text:span text:style-name="T14">Escrevam o algoritmo com pelo menos 8 passos sequenciais;</text:span></text:p>
            </text:list-item>
            <text:list-item>
              <text:p text:style-name="P15"><text:span text:style-name="T14">Agora, troquem os algoritmos entre as duplas;</text:span></text:p>
            </text:list-item>
            <text:list-item>
              <text:p text:style-name="P15"><text:span text:style-name="T14">A dupla que recebeu deve executar </text:span><text:span text:style-name="T18">LITERALMENTE</text:span><text:span text:style-name="T14"> cada passo, como um computador faria;</text:span></text:p>
            </text:list-item>
            <text:list-item>
              <text:p text:style-name="P15"><text:span text:style-name="T14">Identifiquem: onde a instrução foi ambígua? O que um computador faria de errado?</text:span></text:p>
            </text:list-item>
            <text:list-item>
              <text:p text:style-name="P15"><text:span text:style-name="T14">Tempo: 7 minutos. Discussão: 3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4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12" draw:layer="layout" svg:width="2.539cm" svg:height="1.079cm" svg:x="21.59cm" svg:y="13.208cm">
          <text:p text:style-name="P11"><text:span text:style-name="T10">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4" draw:layer="layout" svg:width="22.351cm" svg:height="1.777cm" svg:x="1.524cm" svg:y="0.762cm">
          <text:p text:style-name="P3"><text:span text:style-name="T19">Reflexões — Dinâmica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" draw:text-style-name="P19" draw:layer="layout" svg:width="21.335cm" svg:height="9.651cm" svg:x="2.032cm" svg:y="3.048cm">
          <text:list text:style-name="L10">
            <text:list-item>
              <text:p text:style-name="P18"><text:span text:style-name="T14">Exemplo 'Fazer café': se não disse 'colocar filtro no suporte', o computador tentaria jogar pó direto na jarra;</text:span></text:p>
            </text:list-item>
            <text:list-item>
              <text:p text:style-name="P18"><text:span text:style-name="T14">Passos como 'colocar um pouco de açúcar' são ambíguos — quanto é 'um pouco'? O computador precisa de '2 colheres';</text:span></text:p>
            </text:list-item>
            <text:list-item>
              <text:p text:style-name="P18"><text:span text:style-name="T14">Omitir 'ligar a cafeteira' faz o computador esperar infinitamente pela água esquentar;</text:span></text:p>
            </text:list-item>
            <text:list-item>
              <text:p text:style-name="P18"><text:span text:style-name="T14">Lição: algoritmos computacionais exigem cada passo descrito com precisão absolut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4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" draw:text-style-name="P12" draw:layer="layout" svg:width="2.539cm" svg:height="1.079cm" svg:x="21.59cm" svg:y="13.208cm">
          <text:p text:style-name="P11"><text:span text:style-name="T10">7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9D404509.png" xlink:type="simple" xlink:show="embed" xlink:actuate="onLoad" draw:mime-type="image/png">
            <text:p/>
          </draw:image>
          <svg:desc>preencoded.png</svg:desc>
        </draw:frame>
        <draw:custom-shape draw:name="Text 2" draw:style-name="gr47" draw:text-style-name="P4" draw:layer="layout" svg:width="18.287cm" svg:height="1.777cm" svg:x="5.08cm" svg:y="4.064cm">
          <text:p text:style-name="P3"><text:span text:style-name="T11">2.2 Program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8" draw:text-style-name="P4" draw:layer="layout" svg:width="18.287cm" svg:height="1.523cm" svg:x="5.08cm" svg:y="6.096cm">
          <text:p text:style-name="P3"><text:span text:style-name="T12">Das linguagens de máquina ao alto ní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0" draw:text-style-name="P12" draw:layer="layout" svg:width="2.539cm" svg:height="1.079cm" svg:x="21.59cm" svg:y="13.208cm">
          <text:p text:style-name="P11"><text:span text:style-name="T10">8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4" draw:layer="layout" svg:width="22.351cm" svg:height="2.031cm" svg:x="1.524cm" svg:y="0.127cm">
          <text:p text:style-name="P3"><text:span text:style-name="T13">O que é programaçã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2" draw:text-style-name="P21" draw:layer="layout" svg:width="21.335cm" svg:height="7.752cm" svg:x="2.032cm" svg:y="4.048cm">
          <text:list text:style-name="L10">
            <text:list-item>
              <text:p text:style-name="P20"><text:span text:style-name="T14">Programação: processo de transcrição dos algoritmos para o computador;</text:span></text:p>
            </text:list-item>
            <text:list-item>
              <text:p text:style-name="P20"><text:span text:style-name="T14">Um sistema de computador é composto por algoritmos que se complementam para executar processos;</text:span></text:p>
            </text:list-item>
            <text:list-item>
              <text:p text:style-name="P20"><text:span text:style-name="T14">Para desenvolver sistemas, é necessário escolher uma linguagem de programação e uma metodologia;</text:span></text:p>
            </text:list-item>
            <text:list-item>
              <text:p text:style-name="P20"><text:span text:style-name="T14">As linguagens evoluíram ao longo das décadas, dividindo-se em três gerações principai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4" draw:text-style-name="P12" draw:layer="layout" svg:width="2.539cm" svg:height="1.079cm" svg:x="21.59cm" svg:y="13.208cm">
          <text:p text:style-name="P11"><text:span text:style-name="T10">9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4" draw:layer="layout" svg:width="22.351cm" svg:height="2.031cm" svg:x="1.524cm" svg:y="0.127cm">
          <text:p text:style-name="P3"><text:span text:style-name="T13">As três gerações de linguage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6" draw:text-style-name="P21" draw:layer="layout" svg:width="21.335cm" svg:height="9.651cm" svg:x="2.032cm" svg:y="2.748cm">
          <text:list text:style-name="L10">
            <text:list-item>
              <text:p text:style-name="P20"><text:span text:style-name="T14">1ª Geração — Linguagem de máquina: sequências numéricas (binário), complexa e custosa, linguagem natural do hardware;</text:span></text:p>
            </text:list-item>
            <text:list-item>
              <text:p text:style-name="P20"><text:span text:style-name="T14">2ª Geração — Linguagem assembler: abreviações em inglês substituem os números, mais produtiva, mas requer tradutores;</text:span></text:p>
            </text:list-item>
            <text:list-item>
              <text:p text:style-name="P20"><text:span text:style-name="T14">3ª Geração — Linguagem de alto nível: semelhante à comunicação humana, baseada no inglês, usa expressões matemáticas;</text:span></text:p>
            </text:list-item>
            <text:list-item>
              <text:p text:style-name="P20"><text:span text:style-name="T14">Evolução permitiu ao programador focar em funcionalidades, não na complexidade da linguagem;</text:span></text:p>
            </text:list-item>
            <text:list-item>
              <text:p text:style-name="P20"><text:span text:style-name="T14">Exemplos atuais de alto nível: </text:span><text:span text:style-name="T15">Java</text:span><text:span text:style-name="T14">, </text:span><text:span text:style-name="T15">Python</text:span><text:span text:style-name="T14">, </text:span><text:span text:style-name="T15">C#</text:span><text:span text:style-name="T14">, </text:span><text:span text:style-name="T15">JavaScript</text:span><text:span text:style-name="T14"> — todas operam com paradigmas como O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" draw:text-style-name="P12" draw:layer="layout" svg:width="2.539cm" svg:height="1.079cm" svg:x="21.59cm" svg:y="13.208cm">
          <text:p text:style-name="P11"><text:span text:style-name="T10">10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9" draw:text-style-name="P4" draw:layer="layout" svg:width="22.351cm" svg:height="1.777cm" svg:x="1.524cm" svg:y="0.762cm">
          <text:p text:style-name="P3"><text:span text:style-name="T17">Dinâmica 2 — Traduzindo entre Geraç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7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16" draw:layer="layout" svg:width="20.319cm" svg:height="8.127cm" svg:x="2.54cm" svg:y="2.656cm">
          <text:list text:style-name="L10">
            <text:list-item>
              <text:p text:style-name="P15"><text:span text:style-name="T14">Em grupos de 3, imaginem a instrução: 'Some os números 5 e 3 e mostre o resultado'.</text:span></text:p>
            </text:list-item>
            <text:list-item>
              <text:p text:style-name="P15"><text:span text:style-name="T14">Como seria essa instrução em cada geração?</text:span></text:p>
            </text:list-item>
            <text:list-item>
              <text:p text:style-name="P15"><text:span text:style-name="T14">Geração 1 (máquina): tentem representar com números fictícios (ex.: </text:span><text:span text:style-name="T20">0010 0101 0011 ...</text:span><text:span text:style-name="T14">).</text:span></text:p>
            </text:list-item>
            <text:list-item>
              <text:p text:style-name="P15"><text:span text:style-name="T14">Geração 2 (assembler): usem mnemônicos (ex.: </text:span><text:span text:style-name="T21">LOAD 5</text:span><text:span text:style-name="T14">, </text:span><text:span text:style-name="T21">ADD 3</text:span><text:span text:style-name="T14">, </text:span><text:span text:style-name="T21">PRINT</text:span><text:span text:style-name="T14">).</text:span></text:p>
            </text:list-item>
            <text:list-item>
              <text:p text:style-name="P15"><text:span text:style-name="T14">Geração 3 (alto nível): escrevam em pseudocódigo ou qualquer linguagem que conheçam.</text:span></text:p>
            </text:list-item>
            <text:list-item>
              <text:p text:style-name="P15"><text:span text:style-name="T14">Tempo: 5 minutos. Qual geração foi mais intuitiva?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6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12" draw:layer="layout" svg:width="2.539cm" svg:height="1.079cm" svg:x="21.59cm" svg:y="13.208cm">
          <text:p text:style-name="P11"><text:span text:style-name="T10">11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4" draw:layer="layout" svg:width="22.351cm" svg:height="1.777cm" svg:x="1.524cm" svg:y="0.762cm">
          <text:p text:style-name="P3"><text:span text:style-name="T19">Exemplos de resposta — Dinâmic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19" draw:layer="layout" svg:width="21.335cm" svg:height="9.651cm" svg:x="2.032cm" svg:y="3.048cm">
          <text:list text:style-name="L10">
            <text:list-item>
              <text:p text:style-name="P18"><text:span text:style-name="T14">Máquina: </text:span><text:span text:style-name="T20">00101000 00000101 00110000 00000011 01010000</text:span><text:span text:style-name="T14"> — incompreensível sem documentação.</text:span></text:p>
            </text:list-item>
            <text:list-item>
              <text:p text:style-name="P18"><text:span text:style-name="T15">Assembler</text:span><text:span text:style-name="T14">: </text:span><text:span text:style-name="T21">LOAD R1, 5</text:span><text:span text:style-name="T14"> / </text:span><text:span text:style-name="T21">ADD R1, 3</text:span><text:span text:style-name="T14"> / </text:span><text:span text:style-name="T21">MOV R2, R1</text:span><text:span text:style-name="T14"> / </text:span><text:span text:style-name="T21">PRINT R2</text:span><text:span text:style-name="T14"> — legível mas verboso.</text:span></text:p>
            </text:list-item>
            <text:list-item>
              <text:p text:style-name="P18"><text:span text:style-name="T14">Alto nível: </text:span><text:span text:style-name="T22">resultado = 5 + 3</text:span><text:span text:style-name="T14">; </text:span><text:span text:style-name="T22">print(resultado)</text:span><text:span text:style-name="T14"> — quase uma frase em inglês.</text:span></text:p>
            </text:list-item>
            <text:list-item>
              <text:p text:style-name="P18"><text:span text:style-name="T14">A cada geração, o programador ganha produtividade e se aproxima do raciocínio human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6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" draw:text-style-name="P12" draw:layer="layout" svg:width="2.539cm" svg:height="1.079cm" svg:x="21.59cm" svg:y="13.208cm">
          <text:p text:style-name="P11"><text:span text:style-name="T10">1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E4775A66.png" xlink:type="simple" xlink:show="embed" xlink:actuate="onLoad" draw:mime-type="image/png">
            <text:p/>
          </draw:image>
          <svg:desc>preencoded.png</svg:desc>
        </draw:frame>
        <draw:custom-shape draw:name="Text 2" draw:style-name="gr67" draw:text-style-name="P4" draw:layer="layout" svg:width="18.287cm" svg:height="1.777cm" svg:x="5.08cm" svg:y="4.064cm">
          <text:p text:style-name="P3"><text:span text:style-name="T11">2.3 Prog. Estrutu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8" draw:text-style-name="P4" draw:layer="layout" svg:width="18.287cm" svg:height="1.523cm" svg:x="5.08cm" svg:y="6.096cm">
          <text:p text:style-name="P3"><text:span text:style-name="T12">O paradigma clássico: execução sequencial de instruç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6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0" draw:text-style-name="P12" draw:layer="layout" svg:width="2.539cm" svg:height="1.079cm" svg:x="21.59cm" svg:y="13.208cm">
          <text:p text:style-name="P11"><text:span text:style-name="T10">1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1" draw:text-style-name="P4" draw:layer="layout" svg:width="22.351cm" svg:height="2.031cm" svg:x="1.524cm" svg:y="0.127cm">
          <text:p text:style-name="P3"><text:span text:style-name="T13">O que é um paradigma de programaçã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2" draw:text-style-name="P21" draw:layer="layout" svg:width="21.335cm" svg:height="9.651cm" svg:x="2.032cm" svg:y="2.648cm">
          <text:list text:style-name="L10">
            <text:list-item>
              <text:p text:style-name="P20"><text:span text:style-name="T14">Paradigma = forma como pensamos ao programar. Define desde o levantamento de requisitos até a execução;</text:span></text:p>
            </text:list-item>
            <text:list-item>
              <text:p text:style-name="P20"><text:span text:style-name="T14">Existem vários: programação estruturada, orientada a objetos, concorrente, funcional, etc;</text:span></text:p>
            </text:list-item>
            <text:list-item>
              <text:p text:style-name="P20"><text:span text:style-name="T14">Cada paradigma exige do programador conhecimentos e formas de raciocínio específicos;</text:span></text:p>
            </text:list-item>
            <text:list-item>
              <text:p text:style-name="P20"><text:span text:style-name="T14">Linguagens orientadas a paradigma obrigam o uso de um estilo; outras permitem flexibilidade;</text:span></text:p>
            </text:list-item>
            <text:list-item>
              <text:p text:style-name="P20"><text:span text:style-name="T14">O paradigma influencia toda a cadeia: análise → projeto → codificação → uso pelo usuári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4" draw:text-style-name="P12" draw:layer="layout" svg:width="2.539cm" svg:height="1.079cm" svg:x="21.59cm" svg:y="13.208cm">
          <text:p text:style-name="P11"><text:span text:style-name="T10">1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5" draw:text-style-name="P4" draw:layer="layout" svg:width="22.351cm" svg:height="2.031cm" svg:x="1.524cm" svg:y="0.127cm">
          <text:p text:style-name="P3"><text:span text:style-name="T13">Características da Programação Estrutu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6" draw:text-style-name="P21" draw:layer="layout" svg:width="21.335cm" svg:height="9.651cm" svg:x="2.032cm" svg:y="3.048cm">
          <text:list text:style-name="L10">
            <text:list-item>
              <text:p text:style-name="P20"><text:span text:style-name="T14">Método mais clássico e geralmente o primeiro paradigma aprendido por programadores;</text:span></text:p>
            </text:list-item>
            <text:list-item>
              <text:p text:style-name="P20"><text:span text:style-name="T14">Baseia-se na execução de instruções em ordem sequencial — passo a passo;</text:span></text:p>
            </text:list-item>
            <text:list-item>
              <text:p text:style-name="P20"><text:span text:style-name="T14">Permite agrupamento de código em funções ou procedimentos reutilizáveis;</text:span></text:p>
            </text:list-item>
            <text:list-item>
              <text:p text:style-name="P20"><text:span text:style-name="T14">Exemplo: calcular média → receber 2 números → somar → dividir por 2 (um passo de cada vez);</text:span></text:p>
            </text:list-item>
            <text:list-item>
              <text:p text:style-name="P20"><text:span text:style-name="T14">Mesmo com funções, o código é executado linha por linha de forma sequencial;</text:span></text:p>
            </text:list-item>
            <text:list-item>
              <text:p text:style-name="P20"><text:span text:style-name="T14">Aprendizado mais fácil inicialmente por ser mais 'ordenada' e linear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12" draw:layer="layout" svg:width="2.539cm" svg:height="1.079cm" svg:x="21.59cm" svg:y="13.208cm">
          <text:p text:style-name="P11"><text:span text:style-name="T10">1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9" draw:text-style-name="P4" draw:layer="layout" svg:width="22.351cm" svg:height="1.777cm" svg:x="1.524cm" svg:y="0.762cm">
          <text:p text:style-name="P3"><text:span text:style-name="T17">Dinâmica 3 — Pensando de Forma Estrutu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7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21" draw:layer="layout" svg:width="20.319cm" svg:height="8.127cm" svg:x="2.54cm" svg:y="3.556cm">
          <text:list text:style-name="L10">
            <text:list-item>
              <text:p text:style-name="P20"><text:span text:style-name="T14">Individualmente, escreva um algoritmo estruturado para: 'Calcular o salário líquido de um funcionário';</text:span></text:p>
            </text:list-item>
            <text:list-item>
              <text:p text:style-name="P20"><text:span text:style-name="T14">Dados: salário bruto, desconto INSS (11%), desconto IR (15% sobre o que resta após INSS);</text:span></text:p>
            </text:list-item>
            <text:list-item>
              <text:p text:style-name="P20"><text:span text:style-name="T14">Escreva passo a passo, de forma sequencial, como na programação estruturada;</text:span></text:p>
            </text:list-item>
            <text:list-item>
              <text:p text:style-name="P20"><text:span text:style-name="T14">Não use classes nem objetos — apenas variáveis e passos em sequência;</text:span></text:p>
            </text:list-item>
            <text:list-item>
              <text:p text:style-name="P20"><text:span text:style-name="T14">Tempo: 5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8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2" draw:text-style-name="P12" draw:layer="layout" svg:width="2.539cm" svg:height="1.079cm" svg:x="21.59cm" svg:y="13.208cm">
          <text:p text:style-name="P11"><text:span text:style-name="T10">1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3" draw:text-style-name="P4" draw:layer="layout" svg:width="22.351cm" svg:height="1.777cm" svg:x="1.524cm" svg:y="0.762cm">
          <text:p text:style-name="P3"><text:span text:style-name="T19">Resposta possível — Dinâmic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4" draw:text-style-name="P23" draw:layer="layout" svg:width="21.335cm" svg:height="9.651cm" svg:x="2.032cm" svg:y="3.048cm">
          <text:list text:style-name="L10">
            <text:list-item>
              <text:p text:style-name="P22"><text:span text:style-name="T14">Passo 1: Receber </text:span><text:span text:style-name="T21">salarioBruto</text:span><text:span text:style-name="T14">;</text:span></text:p>
            </text:list-item>
            <text:list-item>
              <text:p text:style-name="P22"><text:span text:style-name="T14">Passo 2: </text:span><text:span text:style-name="T21">descontoINSS = salarioBruto × 0.11</text:span><text:span text:style-name="T14">;</text:span></text:p>
            </text:list-item>
            <text:list-item>
              <text:p text:style-name="P22"><text:span text:style-name="T14">Passo 3: </text:span><text:span text:style-name="T21">baseIR = salarioBruto − descontoINSS</text:span><text:span text:style-name="T14">;</text:span></text:p>
            </text:list-item>
            <text:list-item>
              <text:p text:style-name="P22"><text:span text:style-name="T14">Passo 4: </text:span><text:span text:style-name="T21">descontoIR = baseIR × 0.15</text:span><text:span text:style-name="T14">;</text:span></text:p>
            </text:list-item>
            <text:list-item>
              <text:p text:style-name="P22"><text:span text:style-name="T14">Passo 5: </text:span><text:span text:style-name="T21">salarioLiquido = baseIR − descontoIR</text:span><text:span text:style-name="T14">;</text:span></text:p>
            </text:list-item>
            <text:list-item>
              <text:p text:style-name="P22"><text:span text:style-name="T14">Passo 6: Exibir </text:span><text:span text:style-name="T21">salarioLiquido</text:span><text:span text:style-name="T14">;</text:span></text:p>
            </text:list-item>
            <text:list-item>
              <text:p text:style-name="P22"><text:span text:style-name="T14">Note: tudo é sequencial, sem troca de mensagens entre objetos — uma instrução após a outr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8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6" draw:text-style-name="P12" draw:layer="layout" svg:width="2.539cm" svg:height="1.079cm" svg:x="21.59cm" svg:y="13.208cm">
          <text:p text:style-name="P11"><text:span text:style-name="T10">17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F5A393F9.png" xlink:type="simple" xlink:show="embed" xlink:actuate="onLoad" draw:mime-type="image/png">
            <text:p/>
          </draw:image>
          <svg:desc>preencoded.png</svg:desc>
        </draw:frame>
        <draw:custom-shape draw:name="Text 2" draw:style-name="gr87" draw:text-style-name="P4" draw:layer="layout" svg:width="18.287cm" svg:height="1.777cm" svg:x="5.08cm" svg:y="4.064cm">
          <text:p text:style-name="P3"><text:span text:style-name="T11">2.4 Programação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4" draw:layer="layout" svg:width="18.287cm" svg:height="1.523cm" svg:x="5.08cm" svg:y="6.096cm">
          <text:p text:style-name="P3"><text:span text:style-name="T12">Classes, objetos e troca de mensagens desde os anos 196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12" draw:layer="layout" svg:width="2.539cm" svg:height="1.079cm" svg:x="21.59cm" svg:y="13.208cm">
          <text:p text:style-name="P11"><text:span text:style-name="T10">18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4" draw:layer="layout" svg:width="22.351cm" svg:height="2.031cm" svg:x="1.524cm" svg:y="0.127cm">
          <text:p text:style-name="P3"><text:span text:style-name="T13">Origens e popularização da P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2" draw:text-style-name="P16" draw:layer="layout" svg:width="21.335cm" svg:height="9.651cm" svg:x="2.032cm" svg:y="3.048cm">
          <text:list text:style-name="L10">
            <text:list-item>
              <text:p text:style-name="P15"><text:span text:style-name="T14">Surgiu na década de 1960 com a linguagem Simula 67 — uma das primeiras com conceito de classes;</text:span></text:p>
            </text:list-item>
            <text:list-item>
              <text:p text:style-name="P15"><text:span text:style-name="T14">Tornou-se popular na década de 1980 e é um dos paradigmas mais utilizados hoje;</text:span></text:p>
            </text:list-item>
            <text:list-item>
              <text:p text:style-name="P15"><text:span text:style-name="T14">Grande facilitador: reaproveitamento de código por meio de herança e composição;</text:span></text:p>
            </text:list-item>
            <text:list-item>
              <text:p text:style-name="P15"><text:span text:style-name="T14">Desde a análise de requisitos, o software é pensado em termos de classes e objetos do mundo real;</text:span></text:p>
            </text:list-item>
            <text:list-item>
              <text:p text:style-name="P15"><text:span text:style-name="T14">Reutilização de objetos ocorre desde o início do desenvolvimento, acelerando entrega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4" draw:text-style-name="P12" draw:layer="layout" svg:width="2.539cm" svg:height="1.079cm" svg:x="21.59cm" svg:y="13.208cm">
          <text:p text:style-name="P11"><text:span text:style-name="T10">19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5" draw:text-style-name="P4" draw:layer="layout" svg:width="22.351cm" svg:height="2.031cm" svg:x="1.524cm" svg:y="0.127cm">
          <text:p text:style-name="P3"><text:span text:style-name="T13">Como funciona a execução na PO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6" draw:text-style-name="P21" draw:layer="layout" svg:width="21.335cm" svg:height="9.651cm" svg:x="2.032cm" svg:y="3.048cm">
          <text:list text:style-name="L10">
            <text:list-item>
              <text:p text:style-name="P20"><text:span text:style-name="T14">A execução não é estritamente sequencial como na programação estruturada;</text:span></text:p>
            </text:list-item>
            <text:list-item>
              <text:p text:style-name="P20"><text:span text:style-name="T14">O motor do sistema é a troca de mensagens entre objetos — um objeto chama métodos de outro;</text:span></text:p>
            </text:list-item>
            <text:list-item>
              <text:p text:style-name="P20"><text:span text:style-name="T14">A sequência de instruções muda conforme as requisições feitas entre os objetos em execução;</text:span></text:p>
            </text:list-item>
            <text:list-item>
              <text:p text:style-name="P20"><text:span text:style-name="T14">Cada objeto pode ter seus próprios métodos sendo invocados em qualquer ordem necessária;</text:span></text:p>
            </text:list-item>
            <text:list-item>
              <text:p text:style-name="P20"><text:span text:style-name="T14">Resultado: um fluxo de execução dinâmico, mais próximo da forma como processos reais acontecem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8" draw:text-style-name="P12" draw:layer="layout" svg:width="2.539cm" svg:height="1.079cm" svg:x="21.59cm" svg:y="13.208cm">
          <text:p text:style-name="P11"><text:span text:style-name="T10">20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4" draw:layer="layout" svg:width="22.351cm" svg:height="1.777cm" svg:x="1.524cm" svg:y="0.762cm">
          <text:p text:style-name="P3"><text:span text:style-name="T17">Dinâmica 4 — Mesmo Problema, Pensamento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7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0" draw:text-style-name="P21" draw:layer="layout" svg:width="20.319cm" svg:height="8.127cm" svg:x="2.54cm" svg:y="3.556cm">
          <text:list text:style-name="L10">
            <text:list-item>
              <text:p text:style-name="P20"><text:span text:style-name="T14">Retome o cálculo do salário líquido da Dinâmica 3;</text:span></text:p>
            </text:list-item>
            <text:list-item>
              <text:p text:style-name="P20"><text:span text:style-name="T14">Agora, modele a solução usando orientação a objetos:</text:span></text:p>
              <text:list>
                <text:list-item>
                  <text:p text:style-name="P20"><text:span text:style-name="T14">Quais classes você criaria? (ex.: </text:span><text:span text:style-name="T20">Funcionario</text:span><text:span text:style-name="T14">, </text:span><text:span text:style-name="T20">FolhaPagamento</text:span><text:span text:style-name="T14">, </text:span><text:span text:style-name="T23">Imposto...</text:span><text:span text:style-name="T14">)</text:span></text:p>
                </text:list-item>
                <text:list-item>
                  <text:p text:style-name="P20"><text:span text:style-name="T14">Quais atributos e métodos cada classe teria?</text:span></text:p>
                </text:list-item>
                <text:list-item>
                  <text:p text:style-name="P20"><text:span text:style-name="T14">Como os objetos trocariam mensagens para calcular o salário líquido?</text:span></text:p>
                </text:list-item>
              </text:list>
            </text:list-item>
            <text:list-item>
              <text:p text:style-name="P20"><text:span text:style-name="T14">Tempo: 7 minutos. Discutam em dupla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0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2" draw:text-style-name="P12" draw:layer="layout" svg:width="2.539cm" svg:height="1.079cm" svg:x="21.59cm" svg:y="13.208cm">
          <text:p text:style-name="P11"><text:span text:style-name="T10">21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3" draw:text-style-name="P4" draw:layer="layout" svg:width="22.351cm" svg:height="1.777cm" svg:x="1.524cm" svg:y="0.762cm">
          <text:p text:style-name="P3"><text:span text:style-name="T19">Exemplo de resposta — Dinâmica 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4" draw:text-style-name="P19" draw:layer="layout" svg:width="21.335cm" svg:height="9.651cm" svg:x="2.032cm" svg:y="2.648cm">
          <text:list text:style-name="L10">
            <text:list-item>
              <text:p text:style-name="P18"><text:span text:style-name="T14">Classe </text:span><text:span text:style-name="T20">Funcionario</text:span><text:span text:style-name="T14">: atributos (</text:span><text:span text:style-name="T21">nome</text:span><text:span text:style-name="T14">, </text:span><text:span text:style-name="T21">salarioBruto</text:span><text:span text:style-name="T14">). Método: </text:span><text:span text:style-name="T21">getSalarioBruto()</text:span><text:span text:style-name="T14">;</text:span></text:p>
            </text:list-item>
            <text:list-item>
              <text:p text:style-name="P18"><text:span text:style-name="T14">Classe </text:span><text:span text:style-name="T20">Imposto</text:span><text:span text:style-name="T14">: atributos (</text:span><text:span text:style-name="T21">aliquotaINSS</text:span><text:span text:style-name="T14">, </text:span><text:span text:style-name="T21">aliquotaIR</text:span><text:span text:style-name="T14">). Métodos: </text:span><text:span text:style-name="T21">calcularINSS(bruto)</text:span><text:span text:style-name="T14">, </text:span><text:span text:style-name="T21">calcularIR(base)</text:span><text:span text:style-name="T14">;</text:span></text:p>
            </text:list-item>
            <text:list-item>
              <text:p text:style-name="P18"><text:span text:style-name="T14">Classe </text:span><text:span text:style-name="T20">FolhaPagamento</text:span><text:span text:style-name="T14">: método </text:span><text:span text:style-name="T21">calcularLiquido(funcionario, imposto)</text:span><text:span text:style-name="T14"> — chama métodos dos outros objetos;</text:span></text:p>
            </text:list-item>
            <text:list-item>
              <text:p text:style-name="P18"><text:span text:style-name="T14">Fluxo: </text:span><text:span text:style-name="T20">FolhaPagamento</text:span><text:span text:style-name="T14"> pede salário ao </text:span><text:span text:style-name="T20">Funcionario</text:span><text:span text:style-name="T14"> → envia ao </text:span><text:span text:style-name="T20">Imposto</text:span><text:span text:style-name="T14"> → recebe descontos → calcula líquido;</text:span></text:p>
            </text:list-item>
            <text:list-item>
              <text:p text:style-name="P18"><text:span text:style-name="T14">Diferença: os objetos interagem por mensagens, cada um com sua responsabilidade específic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0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6" draw:text-style-name="P12" draw:layer="layout" svg:width="2.539cm" svg:height="1.079cm" svg:x="21.59cm" svg:y="13.208cm">
          <text:p text:style-name="P11"><text:span text:style-name="T10">2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945BDA93.png" xlink:type="simple" xlink:show="embed" xlink:actuate="onLoad" draw:mime-type="image/png">
            <text:p/>
          </draw:image>
          <svg:desc>preencoded.png</svg:desc>
        </draw:frame>
        <draw:custom-shape draw:name="Text 2" draw:style-name="gr107" draw:text-style-name="P4" draw:layer="layout" svg:width="18.287cm" svg:height="1.777cm" svg:x="5.08cm" svg:y="4.064cm">
          <text:p text:style-name="P3"><text:span text:style-name="T11">2.5 Estruturada </text:span><text:span text:style-name="T24">vs</text:span><text:span text:style-name="T11">.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8" draw:text-style-name="P4" draw:layer="layout" svg:width="18.287cm" svg:height="1.523cm" svg:x="5.08cm" svg:y="6.096cm">
          <text:p text:style-name="P3"><text:span text:style-name="T12">Semelhanças, diferenças e quando usar cada u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0" draw:text-style-name="P12" draw:layer="layout" svg:width="2.539cm" svg:height="1.079cm" svg:x="21.59cm" svg:y="13.208cm">
          <text:p text:style-name="P11"><text:span text:style-name="T10">2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1" draw:text-style-name="P4" draw:layer="layout" svg:width="22.351cm" svg:height="2.031cm" svg:x="1.524cm" svg:y="0.127cm">
          <text:p text:style-name="P3"><text:span text:style-name="T13">Comparativo: Estruturada vs.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9" draw:text-style-name="P17" draw:layer="layout" svg:width="10.921cm" svg:height="9.397cm" svg:x="1.2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10.921cm" svg:height="0.151cm" svg:x="1.2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2" draw:text-style-name="P4" draw:layer="layout" svg:width="9.905cm" svg:height="1.142cm" svg:x="1.778cm" svg:y="3.302cm">
          <text:p text:style-name="P3"><text:span text:style-name="T25">Prog. Estrutu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3" draw:text-style-name="P25" draw:layer="layout" svg:width="10.222cm" svg:height="7.111cm" svg:x="1.778cm" svg:y="4.099cm">
          <text:list text:style-name="L10">
            <text:list-item>
              <text:p text:style-name="P24"><text:span text:style-name="T14">Execução sequencial de instruções;</text:span></text:p>
            </text:list-item>
            <text:list-item>
              <text:p text:style-name="P24"><text:span text:style-name="T14">Agrupamento por funções/procedimentos;</text:span></text:p>
            </text:list-item>
            <text:list-item>
              <text:p text:style-name="P24"><text:span text:style-name="T14">Código executado linha por linha;</text:span></text:p>
            </text:list-item>
            <text:list-item>
              <text:p text:style-name="P24"><text:span text:style-name="T14">Mais fácil de aprender inicialmente;</text:span></text:p>
            </text:list-item>
            <text:list-item>
              <text:p text:style-name="P24"><text:span text:style-name="T14">Pensamento linear e ordenado;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9" draw:text-style-name="P17" draw:layer="layout" svg:width="10.921cm" svg:height="9.397cm" svg:x="13.208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10.921cm" svg:height="0.151cm" svg:x="13.208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4" draw:text-style-name="P4" draw:layer="layout" svg:width="9.905cm" svg:height="1.142cm" svg:x="13.716cm" svg:y="3.302cm">
          <text:p text:style-name="P3"><text:span text:style-name="T26">Prog.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5" draw:text-style-name="P27" draw:layer="layout" svg:width="10.921cm" svg:height="7.111cm" svg:x="13.208cm" svg:y="4.389cm">
          <text:list text:style-name="L10">
            <text:list-item>
              <text:p text:style-name="P26"><text:span text:style-name="T14">Execução baseada em troca de mensagens;</text:span></text:p>
            </text:list-item>
            <text:list-item>
              <text:p text:style-name="P26"><text:span text:style-name="T14">Agrupamento por classes e objetos;</text:span></text:p>
            </text:list-item>
            <text:list-item>
              <text:p text:style-name="P26"><text:span text:style-name="T14">Fluxo dinâmico entre objetos;</text:span></text:p>
            </text:list-item>
            <text:list-item>
              <text:p text:style-name="P26"><text:span text:style-name="T14">Exige adaptação na forma de pensar;</text:span></text:p>
            </text:list-item>
            <text:list-item>
              <text:p text:style-name="P26"><text:span text:style-name="T14">Mais próxima da realidade empresarial;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12" draw:style-name="gr11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7" draw:text-style-name="P12" draw:layer="layout" svg:width="2.539cm" svg:height="1.079cm" svg:x="21.59cm" svg:y="13.208cm">
          <text:p text:style-name="P11"><text:span text:style-name="T10">2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8" draw:text-style-name="P4" draw:layer="layout" svg:width="22.351cm" svg:height="2.031cm" svg:x="1.524cm" svg:y="0.127cm">
          <text:p text:style-name="P3"><text:span text:style-name="T13">O que têm em comum e o que diferencia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9" draw:text-style-name="P16" draw:layer="layout" svg:width="22.367cm" svg:height="9.651cm" svg:x="1.5cm" svg:y="2.5cm">
          <text:list text:style-name="L10">
            <text:list-item>
              <text:p text:style-name="P15"><text:span text:style-name="T14">Ambos paradigmas usam instruções escritas linha a linha com rigor de sintaxe;</text:span></text:p>
            </text:list-item>
            <text:list-item>
              <text:p text:style-name="P15"><text:span text:style-name="T14">Desempenho depende mais da linguagem e do ambiente do que do paradigma em si;</text:span></text:p>
            </text:list-item>
            <text:list-item>
              <text:p text:style-name="P15"><text:span text:style-name="T14">OO tende a segmentar o código em mais partes e faz mais chamadas de classes;</text:span></text:p>
            </text:list-item>
            <text:list-item>
              <text:p text:style-name="P15"><text:span text:style-name="T14">A qualidade do algoritmo do programador é o fator mais determinante para eficiência;</text:span></text:p>
            </text:list-item>
            <text:list-item>
              <text:p text:style-name="P15"><text:span text:style-name="T14">A migração entre os paradigmas não costuma ser difícil — ambos usam instruções escritas;</text:span></text:p>
            </text:list-item>
            <text:list-item>
              <text:p text:style-name="P15"><text:span text:style-name="T14">Linguagens multiparadigma (ex.: </text:span><text:span text:style-name="T15">Python</text:span><text:span text:style-name="T14">, </text:span><text:span text:style-name="T15">C++</text:span><text:span text:style-name="T14">) permitem escolher o estilo mais confortável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2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1" draw:text-style-name="P12" draw:layer="layout" svg:width="2.539cm" svg:height="1.079cm" svg:x="21.59cm" svg:y="13.208cm">
          <text:p text:style-name="P11"><text:span text:style-name="T10">2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2" draw:text-style-name="P4" draw:layer="layout" svg:width="22.351cm" svg:height="1.777cm" svg:x="1.524cm" svg:y="0.762cm">
          <text:p text:style-name="P3"><text:span text:style-name="T17">Dinâmica 5 — Debate: Qual Paradigma Usar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7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3" draw:text-style-name="P21" draw:layer="layout" svg:width="21.875cm" svg:height="8.635cm" svg:x="2cm" svg:y="3.048cm">
          <text:list text:style-name="L10">
            <text:list-item>
              <text:p text:style-name="P20"><text:span text:style-name="T14">Dividam a turma em dois times: Time Estruturada </text:span><text:span text:style-name="T15">vs</text:span><text:span text:style-name="T14">. Time OO;</text:span></text:p>
            </text:list-item>
            <text:list-item>
              <text:p text:style-name="P20"><text:span text:style-name="T14">Cenário: uma startup precisa criar um app de </text:span><text:span text:style-name="T15">delivery</text:span><text:span text:style-name="T14"> de comida;</text:span></text:p>
            </text:list-item>
            <text:list-item>
              <text:p text:style-name="P20"><text:span text:style-name="T14">Cada time deve argumentar por que seu paradigma é melhor para esse projeto;</text:span></text:p>
            </text:list-item>
            <text:list-item>
              <text:p text:style-name="P20"><text:span text:style-name="T14">Considerem: velocidade de desenvolvimento, manutenção futura, tamanho da equipe, reutilização;</text:span></text:p>
            </text:list-item>
            <text:list-item>
              <text:p text:style-name="P20"><text:span text:style-name="T14">Tempo: 5 minutos de preparação + 3 minutos por time para apresentar argumentos;</text:span></text:p>
            </text:list-item>
            <text:list-item>
              <text:p text:style-name="P20"><text:span text:style-name="T14">Professor media o debate e destaca pontos fortes de cada lado ao final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5" draw:text-style-name="P12" draw:layer="layout" svg:width="2.539cm" svg:height="1.079cm" svg:x="21.59cm" svg:y="13.208cm">
          <text:p text:style-name="P11"><text:span text:style-name="T10">2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9" draw:text-style-name="P17" draw:layer="layout" svg:width="21.335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6" draw:text-style-name="P29" draw:layer="layout" svg:width="19.557cm" svg:height="2.793cm" svg:x="3.048cm" svg:y="1.27cm">
          <text:p text:style-name="P28"><text:span text:style-name="T27">"O paradigma de OO vê o mundo como uma coleção de objetos que interagem entre si, tornando a programação muito mais próxima à realidade do cotidiano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7" draw:text-style-name="P4" draw:layer="layout" svg:width="21.335cm" svg:height="1.269cm" svg:x="2.032cm" svg:y="5.08cm">
          <text:p text:style-name="P3"><text:span text:style-name="T28">Pontos-chave da aul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8" draw:text-style-name="P31" draw:layer="layout" svg:width="22.468cm" svg:height="5.587cm" svg:x="2.032cm" svg:y="6.104cm">
          <text:list text:style-name="L10">
            <text:list-item>
              <text:p text:style-name="P30"><text:span text:style-name="T14">Algoritmos são sequências finitas de etapas — base de todo software;</text:span></text:p>
            </text:list-item>
            <text:list-item>
              <text:p text:style-name="P30"><text:span text:style-name="T14">Linguagens evoluíram: máquina → </text:span><text:span text:style-name="T15">assembler</text:span><text:span text:style-name="T14"> → alto nível;</text:span></text:p>
            </text:list-item>
            <text:list-item>
              <text:p text:style-name="P30"><text:span text:style-name="T14">Prog. Estruturada: execução sequencial, agrupamento por funções;</text:span></text:p>
            </text:list-item>
            <text:list-item>
              <text:p text:style-name="P30"><text:span text:style-name="T14">POO: surgiu com </text:span><text:span text:style-name="T15">Simula 67</text:span><text:span text:style-name="T14">, baseia-se em classes, objetos e troca de mensagens;</text:span></text:p>
            </text:list-item>
            <text:list-item>
              <text:p text:style-name="P30"><text:span text:style-name="T14">OO não é necessariamente mais rápida, mas é mais próxima da realidade empresarial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9" draw:text-style-name="P4" draw:layer="layout" svg:width="12.699cm" svg:height="1.587cm" svg:x="2.032cm" svg:y="12.7cm">
          <text:p text:style-name="P3"><text:span text:style-name="T29">Obrigado! Até a próxima aul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0" draw:text-style-name="P12" draw:layer="layout" svg:width="10.159cm" svg:height="1.587cm" svg:x="13.97cm" svg:y="12.7cm">
          <text:p text:style-name="P11"><text:span text:style-name="T3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gramação Orientada a Objetos — Aula 2</dc:title>
    <dc:subject>PptxGenJS Presentation</dc:subject>
    <meta:initial-creator>UNISA</meta:initial-creator>
    <meta:editing-cycles>16</meta:editing-cycles>
    <meta:creation-date>2026-03-09T01:12:10</meta:creation-date>
    <dc:date>2026-05-14T01:34:09.280674507</dc:date>
    <meta:editing-duration>PT26M44S</meta:editing-duration>
    <meta:generator>LibreOffice/25.8.1.1$Linux_X86_64 LibreOffice_project/54047653041915e595ad4e45cccea684809c77b5</meta:generator>
    <meta:document-statistic meta:object-count="320"/>
    <meta:user-defined meta:name="AppVersion">16.0000</meta:user-defined>
    <meta:user-defined meta:name="Company">PptxGenJS</meta:user-defined>
    <meta:user-defined meta:name="Notes" meta:value-type="float">27</meta:user-defined>
    <meta:user-defined meta:name="PresentationFormat">On-screen Show (16:9)</meta:user-defined>
    <meta:user-defined meta:name="Slides" meta:value-type="float">27</meta:user-defined>
  </office:meta>
</office:document-meta>
</file>