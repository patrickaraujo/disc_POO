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E4775A66.png" manifest:media-type="image/png"/>
  <manifest:file-entry manifest:full-path="Pictures/100000010000010000000100190CABFB.png" manifest:media-type="image/png"/>
  <manifest:file-entry manifest:full-path="Pictures/TablePreview1.svm" manifest:media-type=""/>
  <manifest:file-entry manifest:full-path="Pictures/100000010000010000000100D70A47D9.png" manifest:media-type="image/png"/>
  <manifest:file-entry manifest:full-path="Pictures/1000000100000100000001000BF40CBB.png" manifest:media-type="image/png"/>
  <manifest:file-entry manifest:full-path="Pictures/100000010000010000000100F5A393F9.png" manifest:media-type="image/png"/>
  <manifest:file-entry manifest:full-path="Pictures/100000010000010000000100A43C806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libri3" svg:font-family="Calibri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lwg Mono" svg:font-family="'Tlwg Mono'" style:font-pitch="fixed"/>
    <style:font-face style:name="Ubuntu Sans Mono" svg:font-family="'Ubuntu Sans Mono'" style:font-family-generic="swiss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f1b2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2ec4b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d4a84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1a294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24365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>
      <style:graphic-properties draw:stroke="none" svg:stroke-width="0cm" draw:fill="solid" draw:fill-color="#162236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4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>
      <style:graphic-properties draw:stroke="none" svg:stroke-width="0cm" draw:fill="solid" draw:fill-color="#0d1520" draw:textarea-vertical-align="top" draw:auto-grow-height="false" fo:min-height="8.457cm" fo:min-width="21.852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5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02cm" fo:min-width="21.368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>
      <style:graphic-properties draw:stroke="none" svg:stroke-width="0cm" draw:fill="solid" draw:fill-color="#0d1520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7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>
      <style:graphic-properties loext:decorative="false"/>
    </style:style>
    <style:style style:name="gr9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02cm" fo:min-width="11.469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02cm" fo:min-width="12.469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.39cm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>
      <style:graphic-properties draw:stroke="none" svg:stroke-width="0cm" draw:fill="solid" draw:fill-color="#0d1520" draw:textarea-vertical-align="top" draw:auto-grow-height="false" fo:min-height="8.957cm" fo:min-width="21.852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11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703cm" fo:min-width="13.269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>
      <style:graphic-properties draw:stroke="none" draw:fill="none" fo:min-height="3.489cm" loext:decorative="false"/>
      <style:paragraph-properties style:writing-mode="lr-tb"/>
    </style:style>
    <style:style style:name="gr129" style:family="graphic" style:parent-style-name="standard">
      <style:graphic-properties draw:stroke="none" draw:fill="none" fo:min-height="3.818cm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9" style:family="graphic" style:parent-style-name="standard">
      <style:graphic-properties draw:stroke="none" svg:stroke-width="0cm" draw:fill="solid" draw:fill-color="#162236" draw:textarea-vertical-align="top" draw:auto-grow-height="false" fo:min-height="10.203cm" fo:min-width="21.852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140" style:family="graphic" style:parent-style-name="standard">
      <style:graphic-properties draw:stroke="none" svg:stroke-width="0cm" draw:fill="solid" draw:fill-color="#2ec4b6" draw:textarea-vertical-align="top" draw:auto-grow-height="false" fo:min-height="10.203cm" fo:min-width="0cm" fo:padding-top="0.125cm" fo:padding-bottom="0.125cm" fo:padding-left="0.25cm" fo:padding-right="0.25cm" fo:wrap-option="wrap" loext:decorative="false"/>
    </style:style>
    <style:style style:name="gr14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02cm" fo:min-width="10.469cm" fo:padding-top="0.125cm" fo:padding-bottom="0.125cm" fo:padding-left="0.25cm" fo:padding-right="0.25cm" fo:wrap-option="wrap" loext:decorative="false"/>
      <style:paragraph-properties style:writing-mode="lr-tb"/>
    </style:style>
    <style:style style:name="gr14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8" style:family="graphic" style:parent-style-name="standard">
      <style:graphic-properties draw:stroke="none" draw:fill="none" fo:min-height="7.75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justify" fo:min-height="3.07cm" loext:decorative="false"/>
      <style:paragraph-properties style:writing-mode="lr-tb"/>
    </style:style>
    <style:style style:name="gr1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338cm" fo:min-width="21.469cm" fo:padding-top="0.125cm" fo:padding-bottom="0.125cm" fo:padding-left="0.25cm" fo:padding-right="0.25cm" fo:wrap-option="wrap" loext:decorative="false"/>
      <style:paragraph-properties style:writing-mode="lr-tb"/>
    </style:style>
    <style:style style:name="gr1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112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243652" draw:textarea-vertical-align="middle" fo:padding-top="0.127cm" fo:padding-bottom="0.127cm" fo:padding-left="0.254cm" fo:padding-right="0.254cm"/>
      <style:paragraph-properties fo:border="0.26pt solid #2a3a50" style:font-independent-line-spacing="true"/>
    </style:style>
    <style:style style:name="ce2" style:family="table-cell">
      <loext:graphic-properties draw:fill="solid" draw:fill-color="#243652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MathJax_Typewriter" fo:hyphenate="false"/>
    </style:style>
    <style:style style:name="ce3" style:family="table-cell">
      <loext:graphic-properties draw:fill="solid" draw:fill-color="#243652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MathJax_Typewriter" fo:hyphenate="false"/>
    </style:style>
    <style:style style:name="ce4" style:family="table-cell">
      <loext:graphic-properties draw:fill="solid" draw:fill-color="#243652" draw:textarea-vertical-align="middle" fo:padding-top="0.127cm" fo:padding-bottom="0.127cm" fo:padding-left="0.254cm" fo:padding-right="0.254cm"/>
      <style:paragraph-properties fo:border="0.26pt solid #2a3a50" style:font-independent-line-spacing="true"/>
      <style:text-properties style:font-name="MathJax_Typewriter"/>
    </style:style>
    <style:style style:name="ce5" style:family="table-cell">
      <loext:graphic-properties draw:fill="solid" draw:fill-color="#162236" draw:textarea-vertical-align="middle" fo:padding-top="0.127cm" fo:padding-bottom="0.127cm" fo:padding-left="0.254cm" fo:padding-right="0.254cm"/>
      <style:paragraph-properties fo:border="0.26pt solid #2a3a50" style:font-independent-line-spacing="true"/>
    </style:style>
    <style:style style:name="ce6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7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8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9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10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11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12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13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14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15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16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17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18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19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20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ce21" style:family="table-cell">
      <loext:graphic-properties draw:fill="solid" draw:fill-color="#162236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2a3a5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P1" style:family="paragraph">
      <loext:graphic-properties draw:fill="solid" draw:fill-color="#2ec4b6"/>
      <style:paragraph-properties fo:text-align="start"/>
      <style:text-properties fo:font-size="18pt"/>
    </style:style>
    <style:style style:name="P2" style:family="paragraph">
      <loext:graphic-properties draw:fill="solid" draw:fill-color="#d4a843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solid" draw:fill-color="#1a2940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243652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16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17" style:family="paragraph"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18" style:family="paragraph">
      <loext:graphic-properties draw:fill="none"/>
      <style:paragraph-properties fo:margin-left="0cm" fo:margin-right="0cm" fo:margin-top="0cm" fo:margin-bottom="0.282cm" fo:line-height="15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19" style:family="paragraph">
      <loext:graphic-properties draw:fill="solid" draw:fill-color="#162236"/>
      <style:paragraph-properties fo:text-align="start"/>
      <style:text-properties fo:font-size="18pt"/>
    </style:style>
    <style:style style:name="P20" style:family="paragraph">
      <loext:graphic-properties draw:fill="solid" draw:fill-color="#0d1520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MathJax_Typewriter" fo:hyphenate="false"/>
    </style:style>
    <style:style style:name="P22" style:family="paragraph">
      <loext:graphic-properties draw:fill="none"/>
      <style:paragraph-properties fo:margin-left="0cm" fo:margin-right="0cm" fo:margin-top="0cm" fo:margin-bottom="0.071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MathJax_Typewriter" fo:font-size="18pt" fo:hyphenate="false"/>
    </style:style>
    <style:style style:name="P23" style:family="paragraph">
      <style:paragraph-properties fo:margin-left="0cm" fo:margin-right="0cm" fo:margin-top="0cm" fo:margin-bottom="0.282cm" fo:line-height="100%" fo:text-align="start" fo:text-indent="0cm" style:punctuation-wrap="hanging" loext:tab-stop-distance="2.54cm" style:writing-mode="lr-tb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4" style:family="paragraph">
      <loext:graphic-properties draw:fill="none"/>
      <style:paragraph-properties fo:margin-left="0cm" fo:margin-right="0cm" fo:margin-top="0cm" fo:margin-bottom="0.282cm" fo:line-height="10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MathJax_Typewriter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P27" style:family="paragraph"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8" style:family="paragraph">
      <loext:graphic-properties draw:fill="none"/>
      <style:paragraph-properties fo:margin-left="0cm" fo:margin-right="0cm" fo:margin-top="0cm" fo:margin-bottom="0.282cm" fo:line-height="15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9" style:family="paragraph">
      <loext:graphic-properties draw:fill="none"/>
    </style:style>
    <style:style style:name="P30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style:font-name="MathJax_Typewriter" fo:hyphenate="false"/>
    </style:style>
    <style:style style:name="P31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font-independent-line-spacing="true">
        <style:tab-stops/>
      </style:paragraph-properties>
      <style:text-properties style:font-name="MathJax_Typewriter" fo:font-size="18pt" fo:hyphenate="false"/>
    </style:style>
    <style:style style:name="P32" style:family="paragraph">
      <style:paragraph-properties fo:line-height="150%"/>
      <style:text-properties style:font-name="MathJax_Typewriter"/>
    </style:style>
    <style:style style:name="P33" style:family="paragraph">
      <loext:graphic-properties draw:fill="none"/>
      <style:paragraph-properties fo:line-height="150%"/>
      <style:text-properties style:font-name="MathJax_Typewriter"/>
    </style:style>
    <style:style style:name="P34" style:family="paragraph">
      <style:paragraph-properties fo:margin-left="0cm" fo:margin-right="0cm" fo:margin-top="0cm" fo:margin-bottom="0cm" fo:line-height="150%" fo:text-align="justify" fo:text-indent="0cm"/>
    </style:style>
    <style:style style:name="P35" style:family="paragraph">
      <style:paragraph-properties fo:margin-left="0cm" fo:margin-right="0cm" fo:margin-top="0cm" fo:margin-bottom="0.282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6" style:family="paragraph">
      <loext:graphic-properties draw:fill="none"/>
      <style:paragraph-properties fo:margin-left="0cm" fo:margin-right="0cm" fo:margin-top="0cm" fo:margin-bottom="0.282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7" style:family="paragraph">
      <style:paragraph-properties fo:line-height="150%" fo:text-align="justify"/>
      <style:text-properties style:font-name="LM Sans Quot 8"/>
    </style:style>
    <style:style style:name="P38" style:family="paragraph">
      <loext:graphic-properties draw:fill="none"/>
      <style:paragraph-properties fo:line-height="150%" fo:text-align="justify"/>
      <style:text-properties style:font-name="LM Sans Quot 8"/>
    </style:style>
    <style:style style:name="P39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Unslanted 10" fo:font-weight="bold" style:font-weight-asian="bold" style:font-weight-complex="bold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Roman Unslanted 10" fo:font-size="18pt" fo:font-weight="bold" style:font-weight-asian="bold" style:font-weight-complex="bold" fo:hyphenate="false"/>
    </style:style>
    <style:style style:name="P41" style:family="paragraph">
      <style:paragraph-properties fo:margin-left="0cm" fo:margin-right="0cm" fo:margin-top="0cm" fo:margin-bottom="0.21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42" style:family="paragraph">
      <loext:graphic-properties draw:fill="none"/>
      <style:paragraph-properties fo:margin-left="0cm" fo:margin-right="0cm" fo:margin-top="0cm" fo:margin-bottom="0.212cm" fo:line-height="15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6pt" fo:letter-spacing="normal" fo:language="en" fo:country="US" fo:font-style="normal" style:text-underline-style="none" fo:font-weight="bold" fo:background-color="transparent" style:font-name-asian="Georgia1" style:font-size-asian="36pt" style:font-style-asian="normal" style:font-weight-asian="bold" style:font-name-complex="Georgia" style:font-size-complex="36pt" style:font-style-complex="normal" style:font-weight-complex="bold"/>
    </style:style>
    <style:style style:name="T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3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3" style:font-size-asian="16pt" style:font-style-asian="normal" style:font-weight-asian="bold" style:font-name-complex="Calibri1" style:font-size-complex="16pt" style:font-style-complex="normal" style:font-weight-complex="bold"/>
    </style:style>
    <style:style style:name="T4" style:family="text">
      <style:text-properties fo:font-variant="normal" fo:text-transform="none" fo:color="#a8b8c8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7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3" style:font-size-asian="14pt" style:font-style-asian="normal" style:font-weight-asian="bold" style:font-name-complex="Calibri1" style:font-size-complex="14pt" style:font-style-complex="normal" style:font-weight-complex="bold"/>
    </style:style>
    <style:style style:name="T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Calibri1" fo:font-size="15pt" fo:letter-spacing="normal" fo:language="en" fo:country="US" fo:font-style="italic" style:text-underline-style="none" fo:font-weight="normal" fo:background-color="transparent" style:font-name-asian="Calibri3" style:font-size-asian="15pt" style:font-style-asian="italic" style:font-weight-asian="normal" style:font-name-complex="Calibri1" style:font-size-complex="15pt" style:font-style-complex="italic" style:font-weight-complex="normal"/>
    </style:style>
    <style:style style:name="T9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fo:background-color="transparent" style:font-name-asian="Calibri3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10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5pt" fo:letter-spacing="normal" fo:language="en" fo:country="US" fo:font-style="normal" style:text-underline-style="none" fo:font-weight="normal" fo:background-color="transparent" style:font-name-asian="Calibri3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11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3" style:font-size-asian="15pt" style:font-style-asian="normal" style:font-weight-asian="bold" style:font-name-complex="Calibri1" style:font-size-complex="15pt" style:font-style-complex="normal" style:font-weight-complex="bold"/>
    </style:style>
    <style:style style:name="T12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fo:background-color="transparent" style:font-name-asian="Calibri3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italic" style:text-underline-style="none" fo:font-weight="bold" fo:background-color="transparent" style:font-name-asian="Georgia1" style:font-size-asian="32pt" style:font-style-asian="italic" style:font-weight-asian="bold" style:font-name-complex="Georgia" style:font-size-complex="32pt" style:font-style-complex="italic" style:font-weight-complex="bold"/>
    </style:style>
    <style:style style:name="T15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1" fo:font-size="16pt" fo:letter-spacing="normal" fo:language="en" fo:country="US" fo:font-style="italic" style:text-underline-style="none" fo:font-weight="normal" fo:background-color="transparent" style:font-name-asian="Calibri3" style:font-size-asian="16pt" style:font-style-asian="italic" style:font-weight-asian="normal" style:font-name-complex="Calibri1" style:font-size-complex="16pt" style:font-style-complex="italic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italic" style:text-underline-style="none" fo:font-weight="bold" fo:background-color="transparent" style:font-name-asian="Georgia1" style:font-size-asian="22pt" style:font-style-asian="italic" style:font-weight-asian="bold" style:font-name-complex="Georgia" style:font-size-complex="22pt" style:font-style-complex="italic" style:font-weight-complex="bold"/>
    </style:style>
    <style:style style:name="T1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9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none" fo:font-weight="normal" fo:background-color="transparent" style:font-name-asian="Calibri3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20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4pt" fo:letter-spacing="normal" fo:language="en" fo:country="US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1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2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23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Ubuntu Sans Mono" fo:font-size="14pt" fo:letter-spacing="normal" fo:language="en" fo:country="US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4" style:family="text">
      <style:text-properties fo:font-variant="normal" fo:text-transform="none" fo:color="#8be9fd" loext:opacity="100%" style:text-outline="false" style:text-line-through-style="none" style:text-line-through-type="none" style:text-position="0% 100%" style:font-name="MathJax_Typewriter" fo:font-size="11pt" fo:letter-spacing="normal" fo:language="en" fo:country="US" fo:font-style="normal" style:text-underline-style="none" fo:font-weight="normal" fo:background-color="transparent" style:font-name-asian="Consolas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athJax_Typewriter" fo:font-size="11pt" fo:letter-spacing="normal" fo:language="en" fo:country="US" fo:font-style="normal" style:text-underline-style="none" fo:font-weight="normal" fo:background-color="transparent" style:font-name-asian="Consolas" style:font-size-asian="11pt" style:font-style-asian="normal" style:font-weight-asian="normal" style:font-name-complex="Consolas1" style:font-size-complex="11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27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4pt" fo:letter-spacing="normal" fo:language="en" fo:country="US" fo:font-style="normal" fo:text-shadow="none" style:text-underline-style="none" fo:font-weight="normal" style:letter-kerning="true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1" style:font-size-complex="12pt" style:font-style-complex="normal" style:font-weight-complex="bold"/>
    </style:style>
    <style:style style:name="T30" style:family="text">
      <style:text-properties fo:font-variant="normal" fo:text-transform="none" fo:color="#2ec4b6" loext:opacity="10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1" style:font-size-complex="12pt" style:font-style-complex="normal" style:font-weight-complex="bold"/>
    </style:style>
    <style:style style:name="T31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MathJax_Typewriter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1" style:font-size-complex="12pt" style:font-style-complex="normal" style:font-weight-complex="bold"/>
    </style:style>
    <style:style style:name="T32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3" style:family="text">
      <style:text-properties fo:font-variant="normal" fo:text-transform="none" fo:color="#50fa7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background-color="transparent" style:font-name-asian="Calibri3" style:font-size-asian="12pt" style:font-style-asian="normal" style:font-name-complex="Calibri1" style:font-size-complex="12pt" style:font-style-complex="normal"/>
    </style:style>
    <style:style style:name="T34" style:family="text">
      <style:text-properties fo:font-variant="normal" fo:text-transform="none" fo:color="#ff5555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background-color="transparent" style:font-name-asian="Calibri3" style:font-size-asian="12pt" style:font-style-asian="normal" style:font-name-complex="Calibri1" style:font-size-complex="12pt" style:font-style-complex="normal"/>
    </style:style>
    <style:style style:name="T35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MathJax_Typewriter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36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Tlwg Mono" fo:font-size="14pt" fo:letter-spacing="normal" fo:language="en" fo:country="US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7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39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40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41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Roman Unslanted 10" fo:font-size="14pt" fo:letter-spacing="normal" fo:language="en" fo:country="US" fo:font-style="normal" style:text-underline-style="none" fo:font-weight="bold" fo:background-color="transparent" style:font-name-asian="Calibri3" style:font-size-asian="14pt" style:font-style-asian="normal" style:font-weight-asian="bold" style:font-name-complex="Calibri1" style:font-size-complex="14pt" style:font-style-complex="normal" style:font-weight-complex="bold"/>
    </style:style>
    <style:style style:name="T42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43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Ubuntu Sans Mono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44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24pt" fo:letter-spacing="normal" fo:language="en" fo:country="US" fo:font-style="italic" style:text-underline-style="none" fo:font-weight="bold" fo:background-color="transparent" style:font-name-asian="Georgia1" style:font-size-asian="24pt" style:font-style-asian="italic" style:font-weight-asian="bold" style:font-name-complex="Georgia" style:font-size-complex="24pt" style:font-style-complex="italic" style:font-weight-complex="bold"/>
    </style:style>
    <style:style style:name="T45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Tlwg Mono" fo:font-size="14pt" fo:letter-spacing="normal" fo:language="en" fo:country="US" fo:font-style="normal" style:text-underline-style="none" fo:font-weight="bold" fo:background-color="transparent" style:font-name-asian="Calibri3" style:font-size-asian="14pt" style:font-style-asian="normal" style:font-weight-asian="bold" style:font-name-complex="Calibri1" style:font-size-complex="14pt" style:font-style-complex="normal" style:font-weight-complex="bold"/>
    </style:style>
    <style:style style:name="T46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47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LM Roman Unslanted 10" fo:font-size="14pt" fo:letter-spacing="normal" fo:language="en" fo:country="US" fo:font-style="italic" style:text-underline-style="none" fo:font-weight="bold" fo:background-color="transparent" style:font-name-asian="Georgia1" style:font-size-asian="14pt" style:font-style-asian="italic" style:font-weight-asian="bold" style:font-name-complex="Georgia" style:font-size-complex="14pt" style:font-style-complex="italic" style:font-weight-complex="bold"/>
    </style:style>
    <style:style style:name="T48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name-asian="Georgia1" style:font-size-asian="20pt" style:font-style-asian="normal" style:font-weight-asian="bold" style:font-name-complex="Georgia" style:font-size-complex="20pt" style:font-style-complex="normal" style:font-weight-complex="bold"/>
    </style:style>
    <style:style style:name="T49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Roman Unslanted 10" fo:font-size="14pt" fo:letter-spacing="normal" fo:language="en" fo:country="US" fo:font-style="italic" style:text-underline-style="none" fo:font-weight="bold" fo:background-color="transparent" style:font-name-asian="Calibri3" style:font-size-asian="14pt" style:font-style-asian="italic" style:font-weight-asian="bold" style:font-name-complex="Calibri1" style:font-size-complex="14pt" style:font-style-complex="italic" style:font-weight-complex="bold"/>
    </style:style>
    <style:style style:name="T50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1" style:font-size-complex="12pt" style:font-style-complex="normal" style:font-weight-complex="bold"/>
    </style:style>
    <style:style style:name="T51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3" style:font-size-asian="9pt" style:font-style-asian="normal" style:font-weight-asian="normal" style:font-name-complex="Calibri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ec4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4a8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a8b8c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f1b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bd5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8899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fo:font-family="OpenSymbol" fo:color="#cbd5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8be9f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50fa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fo:font-family="OpenSymbol" fo:color="#cbd5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0.304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25.399cm" svg:height="0.101cm" svg:x="0cm" svg:y="9.6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4" draw:layer="layout" svg:width="21.589cm" svg:height="2.539cm" svg:x="2.032cm" svg:y="2.54cm">
          <text:p text:style-name="P3"><text:span text:style-name="T1">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4" draw:layer="layout" svg:width="21.589cm" svg:height="1.523cm" svg:x="2.032cm" svg:y="5.334cm">
          <text:p text:style-name="P3"><text:span text:style-name="T2">Capítulo 5 — Linguagem de Programação 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4" draw:layer="layout" svg:width="21.589cm" svg:height="1.269cm" svg:x="2.032cm" svg:y="7.239cm">
          <text:p text:style-name="P3"><text:span text:style-name="T3">Aula 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587cm" svg:x="0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4" draw:layer="layout" svg:width="21.589cm" svg:height="1.587cm" svg:x="2.032cm" svg:y="12.7cm">
          <text:p text:style-name="P3"><text:span text:style-name="T4">Universidade Santa Amaro — UNIS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" draw:text-style-name="P4" draw:layer="layout" svg:width="22.351cm" svg:height="2.031cm" svg:x="1.524cm" svg:y="0.127cm">
          <text:p text:style-name="P3"><text:span text:style-name="T6">O que veremos hoje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1.066cm" svg:height="1.066cm" svg:x="2.032cm" svg:y="3.04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10" draw:text-style-name="P10" draw:layer="layout" svg:width="1.066cm" svg:height="1.066cm" svg:x="2.032cm" svg:y="3.048cm">
          <text:p text:style-name="P9"><text:span text:style-name="T7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" draw:text-style-name="P4" draw:layer="layout" svg:width="19.811cm" svg:height="1.066cm" svg:x="3.683cm" svg:y="3.048cm">
          <text:p text:style-name="P3"><text:span text:style-name="T8">Java</text:span><text:span text:style-name="T9">: história, portabilidade e </text:span><text:span text:style-name="T8">JV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1.066cm" svg:height="1.066cm" svg:x="2.032cm" svg:y="4.62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12" draw:text-style-name="P10" draw:layer="layout" svg:width="1.066cm" svg:height="1.066cm" svg:x="2.032cm" svg:y="4.623cm">
          <text:p text:style-name="P9"><text:span text:style-name="T7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" draw:text-style-name="P4" draw:layer="layout" svg:width="19.811cm" svg:height="1.066cm" svg:x="3.683cm" svg:y="4.623cm">
          <text:p text:style-name="P3"><text:span text:style-name="T9">Criação de classes e o método </text:span><text:span text:style-name="T10">ma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1.066cm" svg:height="1.066cm" svg:x="2.032cm" svg:y="6.1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4" draw:text-style-name="P10" draw:layer="layout" svg:width="1.066cm" svg:height="1.066cm" svg:x="2.032cm" svg:y="6.198cm">
          <text:p text:style-name="P9"><text:span text:style-name="T7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" draw:text-style-name="P4" draw:layer="layout" svg:width="19.811cm" svg:height="1.066cm" svg:x="3.683cm" svg:y="6.198cm">
          <text:p text:style-name="P3"><text:span text:style-name="T9">Métodos: </text:span><text:span text:style-name="T10">void</text:span><text:span text:style-name="T9">, retorno e comentári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1.066cm" svg:height="1.066cm" svg:x="2.032cm" svg:y="7.7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16" draw:text-style-name="P10" draw:layer="layout" svg:width="1.066cm" svg:height="1.066cm" svg:x="2.032cm" svg:y="7.772cm">
          <text:p text:style-name="P9"><text:span text:style-name="T7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" draw:text-style-name="P4" draw:layer="layout" svg:width="19.811cm" svg:height="1.066cm" svg:x="3.683cm" svg:y="7.772cm">
          <text:p text:style-name="P3"><text:span text:style-name="T9">Modificadores de acesso (encapsulament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1.066cm" svg:height="1.066cm" svg:x="2.032cm" svg:y="9.34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18" draw:text-style-name="P10" draw:layer="layout" svg:width="1.066cm" svg:height="1.066cm" svg:x="2.032cm" svg:y="9.347cm">
          <text:p text:style-name="P9"><text:span text:style-name="T7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9" draw:text-style-name="P4" draw:layer="layout" svg:width="19.811cm" svg:height="1.066cm" svg:x="3.683cm" svg:y="9.347cm">
          <text:p text:style-name="P3"><text:span text:style-name="T9">Construtores múltiplos (polimorfism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" draw:text-style-name="P2" draw:layer="layout" svg:width="1.066cm" svg:height="1.066cm" svg:x="2.032cm" svg:y="10.92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20" draw:text-style-name="P10" draw:layer="layout" svg:width="1.066cm" svg:height="1.066cm" svg:x="2.032cm" svg:y="10.922cm">
          <text:p text:style-name="P9"><text:span text:style-name="T7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1" draw:text-style-name="P4" draw:layer="layout" svg:width="19.811cm" svg:height="1.066cm" svg:x="3.683cm" svg:y="10.922cm">
          <text:p text:style-name="P3"><text:span text:style-name="T11">Superclasses e Subclasses (herança) + Dinâmic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22" draw:style-name="gr22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3" draw:text-style-name="P12" draw:layer="layout" svg:width="2.539cm" svg:height="1.079cm" svg:x="21.59cm" svg:y="13.208cm">
          <text:p text:style-name="P11"><text:span text:style-name="T12">2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A43C8061.png" xlink:type="simple" xlink:show="embed" xlink:actuate="onLoad" draw:mime-type="image/png">
            <text:p/>
          </draw:image>
          <svg:desc>preencoded.png</svg:desc>
        </draw:frame>
        <draw:custom-shape draw:name="Text 2" draw:style-name="gr26" draw:text-style-name="P4" draw:layer="layout" svg:width="18.287cm" svg:height="1.777cm" svg:x="5.08cm" svg:y="4.064cm">
          <text:p text:style-name="P3"><text:span text:style-name="T13">5.1 Linguagem </text:span><text:span text:style-name="T14">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7" draw:text-style-name="P4" draw:layer="layout" svg:width="18.287cm" svg:height="1.523cm" svg:x="5.08cm" svg:y="6.096cm">
          <text:p text:style-name="P3"><text:span text:style-name="T15">Da Sun Microsystems ao mundo: portabilidade com a JV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28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9" draw:text-style-name="P12" draw:layer="layout" svg:width="2.539cm" svg:height="1.079cm" svg:x="21.59cm" svg:y="13.208cm">
          <text:p text:style-name="P11"><text:span text:style-name="T12">3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0" draw:text-style-name="P4" draw:layer="layout" svg:width="22.351cm" svg:height="2.031cm" svg:x="1.524cm" svg:y="0.127cm">
          <text:p text:style-name="P3"><text:span text:style-name="T16">Origem e estratégia do </text:span><text:span text:style-name="T17">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1" draw:text-style-name="P16" draw:layer="layout" svg:width="21.335cm" svg:height="9.651cm" svg:x="2.032cm" svg:y="3.048cm">
          <text:list text:style-name="L10">
            <text:list-item>
              <text:p text:style-name="P15"><text:span text:style-name="T18">Investimento inicial da </text:span><text:span text:style-name="T19">Sun Microsystems</text:span><text:span text:style-name="T18"> — visão de mercado para dispositivos inteligentes;</text:span></text:p>
            </text:list-item>
            <text:list-item>
              <text:p text:style-name="P15"><text:span text:style-name="T18">Estratégia de popularização: sintaxe baseada na linguagem </text:span><text:span text:style-name="T19">C</text:span><text:span text:style-name="T18"> (a mais popular da época);</text:span></text:p>
            </text:list-item>
            <text:list-item>
              <text:p text:style-name="P15"><text:span text:style-name="T18">Programadores migraram facilmente — comandos familiares, curva de aprendizado reduzida;</text:span></text:p>
            </text:list-item>
            <text:list-item>
              <text:p text:style-name="P15"><text:span text:style-name="T18">1995: </text:span><text:span text:style-name="T19">Sun</text:span><text:span text:style-name="T18"> apresenta </text:span><text:span text:style-name="T19">Java</text:span><text:span text:style-name="T18"> para grandes empresas, </text:span><text:span text:style-name="T19">World Wide Web</text:span><text:span text:style-name="T18"> e dispositivos de consumo;</text:span></text:p>
            </text:list-item>
            <text:list-item>
              <text:p text:style-name="P15"><text:span text:style-name="T18">Hoje é uma das linguagens mais populares do mundo, com vasta comunidade e ecossistem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32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12" draw:layer="layout" svg:width="2.539cm" svg:height="1.079cm" svg:x="21.59cm" svg:y="13.208cm">
          <text:p text:style-name="P11"><text:span text:style-name="T12">4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4" draw:text-style-name="P4" draw:layer="layout" svg:width="22.351cm" svg:height="2.031cm" svg:x="1.524cm" svg:y="0.127cm">
          <text:p text:style-name="P3"><text:span text:style-name="T16">Compilação + Interpretação: o papel da </text:span><text:span text:style-name="T17">JV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5" draw:text-style-name="P18" draw:layer="layout" svg:width="21.335cm" svg:height="9.651cm" svg:x="2.032cm" svg:y="2cm">
          <text:list text:style-name="L10">
            <text:list-item>
              <text:p text:style-name="P17"><text:span text:style-name="T18">Java usa modelo híbrido: código é compilado em </text:span><text:span text:style-name="T19">bytecode</text:span><text:span text:style-name="T18"> (intermediário) e interpretado pela </text:span><text:span text:style-name="T19">JVM</text:span><text:span text:style-name="T18">.</text:span></text:p>
            </text:list-item>
            <text:list-item>
              <text:p text:style-name="P17"><text:span text:style-name="T19">JVM</text:span><text:span text:style-name="T18"> (</text:span><text:span text:style-name="T19">Java Virtual Machine</text:span><text:span text:style-name="T18">): máquina virtual instalada no equipamento que interpreta o bytecode.</text:span></text:p>
            </text:list-item>
            <text:list-item>
              <text:p text:style-name="P17"><text:span text:style-name="T18">Compilado (ex.: </text:span><text:span text:style-name="T19">C</text:span><text:span text:style-name="T18">): melhor desempenho, mas sem portabilidade entre SOs.</text:span></text:p>
            </text:list-item>
            <text:list-item>
              <text:p text:style-name="P17"><text:span text:style-name="T18">Interpretado (ex.: </text:span><text:span text:style-name="T19">Python</text:span><text:span text:style-name="T18">): portável, mas mais lento (interpretado a cada execução).</text:span></text:p>
            </text:list-item>
            <text:list-item>
              <text:p text:style-name="P17"><text:span text:style-name="T19">Java</text:span><text:span text:style-name="T18">: meio-termo — </text:span><text:span text:style-name="T19">bytecode</text:span><text:span text:style-name="T18"> compilado uma vez, </text:span><text:span text:style-name="T19">JVM</text:span><text:span text:style-name="T18"> interpreta em qualquer plataforma.</text:span></text:p>
            </text:list-item>
            <text:list-item>
              <text:p text:style-name="P17"><text:span text:style-name="T18">Fluxo: Código </text:span><text:span text:style-name="T19">Java</text:span><text:span text:style-name="T18"> → Compilador → </text:span><text:span text:style-name="T19">Bytecode</text:span><text:span text:style-name="T18"> (</text:span><text:span text:style-name="T20">.class</text:span><text:span text:style-name="T18">) → </text:span><text:span text:style-name="T19">JVM</text:span><text:span text:style-name="T18"> </text:span><text:span text:style-name="T19">Windows</text:span><text:span text:style-name="T18">/</text:span><text:span text:style-name="T19">Linux</text:span><text:span text:style-name="T18">/</text:span><text:span text:style-name="T19">Mac</text:span><text:span text:style-name="T18"> → Execuçã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36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7" draw:text-style-name="P12" draw:layer="layout" svg:width="2.539cm" svg:height="1.079cm" svg:x="21.59cm" svg:y="13.208cm">
          <text:p text:style-name="P11"><text:span text:style-name="T12">5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8" draw:text-style-name="P4" draw:layer="layout" svg:width="22.351cm" svg:height="1.777cm" svg:x="1.524cm" svg:y="0.762cm">
          <text:p text:style-name="P3"><text:span text:style-name="T21">Dinâmica 1 — Compilado vs. Interpretado vs. 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9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0" draw:text-style-name="P16" draw:layer="layout" svg:width="20.319cm" svg:height="8.127cm" svg:x="2.54cm" svg:y="3.556cm">
          <text:list text:style-name="L10">
            <text:list-item>
              <text:p text:style-name="P15"><text:span text:style-name="T18">Em duplas, preencham a tabela comparativa abaixo:</text:span></text:p>
              <text:list>
                <text:list-item>
                  <text:p text:style-name="P15"><text:span text:style-name="T18">Colunas: Compilado (</text:span><text:span text:style-name="T19">C</text:span><text:span text:style-name="T18">) | Interpretado (</text:span><text:span text:style-name="T19">Python</text:span><text:span text:style-name="T18">) | Híbrido (</text:span><text:span text:style-name="T19">Java</text:span><text:span text:style-name="T18">);</text:span></text:p>
                </text:list-item>
                <text:list-item>
                  <text:p text:style-name="P15"><text:span text:style-name="T18">Linhas: Desempenho | Portabilidade | Necessita </text:span><text:span text:style-name="T19">JVM</text:span><text:span text:style-name="T18">? | Exemplo de uso ideal;</text:span></text:p>
                </text:list-item>
                <text:list-item>
                  <text:p text:style-name="P15"><text:span text:style-name="T18">Discutam: por que Java escolheu o modelo híbrido? Quais as vantagens práticas?</text:span></text:p>
                </text:list-item>
              </text:list>
            </text:list-item>
            <text:list-item>
              <text:p text:style-name="P15"><text:span text:style-name="T18">Tempo: 5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41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2" draw:text-style-name="P12" draw:layer="layout" svg:width="2.539cm" svg:height="1.079cm" svg:x="21.59cm" svg:y="13.208cm">
          <text:p text:style-name="P11"><text:span text:style-name="T12">6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3" draw:text-style-name="P4" draw:layer="layout" svg:width="22.351cm" svg:height="1.777cm" svg:x="1.524cm" svg:y="0.762cm">
          <text:p text:style-name="P3"><text:span text:style-name="T22">Respostas — Dinâmica 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4" draw:text-style-name="P16" draw:layer="layout" svg:width="21.335cm" svg:height="9.651cm" svg:x="2.032cm" svg:y="3.048cm">
          <text:list text:style-name="L10">
            <text:list-item>
              <text:p text:style-name="P15"><text:span text:style-name="T19">C</text:span><text:span text:style-name="T18"> (compilado): alto desempenho, baixa portabilidade, não usa </text:span><text:span text:style-name="T19">JVM</text:span><text:span text:style-name="T18">. Ideal: sistemas operacionais, </text:span><text:span text:style-name="T19">drivers</text:span><text:span text:style-name="T18">;</text:span></text:p>
            </text:list-item>
            <text:list-item>
              <text:p text:style-name="P15"><text:span text:style-name="T19">Python</text:span><text:span text:style-name="T18"> (interpretado): desempenho menor, alta portabilidade, não usa </text:span><text:span text:style-name="T19">JVM</text:span><text:span text:style-name="T18">. Ideal: </text:span><text:span text:style-name="T19">scripts</text:span><text:span text:style-name="T18">, </text:span><text:span text:style-name="T19">IA</text:span><text:span text:style-name="T18">, prototipagem;</text:span></text:p>
            </text:list-item>
            <text:list-item>
              <text:p text:style-name="P15"><text:span text:style-name="T19">Java</text:span><text:span text:style-name="T18"> (híbrido): bom desempenho, alta portabilidade, requer </text:span><text:span text:style-name="T19">JVM</text:span><text:span text:style-name="T18">. Ideal: </text:span><text:span text:style-name="T19">apps</text:span><text:span text:style-name="T18"> corporativos, </text:span><text:span text:style-name="T19">Android</text:span><text:span text:style-name="T18">, </text:span><text:span text:style-name="T19">web</text:span><text:span text:style-name="T18">;</text:span></text:p>
            </text:list-item>
            <text:list-item>
              <text:p text:style-name="P15"><text:span text:style-name="T19">Java</text:span><text:span text:style-name="T18"> escolheu o modelo híbrido para ter o lema '</text:span><text:span text:style-name="T19">Write Once, Run Anywhere</text:span><text:span text:style-name="T18">' (escreva uma vez, rode em qualquer lugar)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45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6" draw:text-style-name="P12" draw:layer="layout" svg:width="2.539cm" svg:height="1.079cm" svg:x="21.59cm" svg:y="13.208cm">
          <text:p text:style-name="P11"><text:span text:style-name="T12">7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F5A393F9.png" xlink:type="simple" xlink:show="embed" xlink:actuate="onLoad" draw:mime-type="image/png">
            <text:p/>
          </draw:image>
          <svg:desc>preencoded.png</svg:desc>
        </draw:frame>
        <draw:custom-shape draw:name="Text 2" draw:style-name="gr47" draw:text-style-name="P4" draw:layer="layout" svg:width="18.287cm" svg:height="1.777cm" svg:x="5.08cm" svg:y="4.064cm">
          <text:p text:style-name="P3"><text:span text:style-name="T13">5.1 Classes em </text:span><text:span text:style-name="T14">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8" draw:text-style-name="P4" draw:layer="layout" svg:width="18.287cm" svg:height="1.523cm" svg:x="5.08cm" svg:y="6.096cm">
          <text:p text:style-name="P3"><text:span text:style-name="T15">Criando a estrutura base no NetBea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49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0" draw:text-style-name="P12" draw:layer="layout" svg:width="2.539cm" svg:height="1.079cm" svg:x="21.59cm" svg:y="13.208cm">
          <text:p text:style-name="P11"><text:span text:style-name="T12">8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1" draw:text-style-name="P4" draw:layer="layout" svg:width="22.351cm" svg:height="2.031cm" svg:x="1.524cm" svg:y="0.127cm">
          <text:p text:style-name="P3"><text:span text:style-name="T16">Criando uma classe Java no </text:span><text:span text:style-name="T17">NetBea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2" draw:text-style-name="P16" draw:layer="layout" svg:width="21.335cm" svg:height="9.651cm" svg:x="2.032cm" svg:y="3.048cm">
          <text:list text:style-name="L10">
            <text:list-item>
              <text:p text:style-name="P15"><text:span text:style-name="T18">Ao criar um novo projeto, a </text:span><text:span text:style-name="T19">IDE</text:span><text:span text:style-name="T18"> gera automaticamente a classe principal com o método </text:span><text:span text:style-name="T20">main</text:span><text:span text:style-name="T18">;</text:span></text:p>
            </text:list-item>
            <text:list-item>
              <text:p text:style-name="P15"><text:span text:style-name="T18">O método </text:span><text:span text:style-name="T20">main</text:span><text:span text:style-name="T18"> é o ponto de entrada — primeira coisa executada ao iniciar o programa;</text:span></text:p>
            </text:list-item>
            <text:list-item>
              <text:p text:style-name="P15"><text:span text:style-name="T18">Para criar nova classe: botão direito no pacote → Nova → Classe Java → nomear a classe;</text:span></text:p>
            </text:list-item>
            <text:list-item>
              <text:p text:style-name="P15"><text:span text:style-name="T18">Convenção: nomes de classe sempre iniciam com letra maiúscula (ex.: </text:span><text:span text:style-name="T23">Carro</text:span><text:span text:style-name="T18">, </text:span><text:span text:style-name="T23">Pessoa</text:span><text:span text:style-name="T18">, </text:span><text:span text:style-name="T23">ContaBancaria</text:span><text:span text:style-name="T18">);</text:span></text:p>
            </text:list-item>
            <text:list-item>
              <text:p text:style-name="P15"><text:span text:style-name="T18">Escopo delimitado por { } — tudo entre chaves pertence àquele bloc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53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4" draw:text-style-name="P12" draw:layer="layout" svg:width="2.539cm" svg:height="1.079cm" svg:x="21.59cm" svg:y="13.208cm">
          <text:p text:style-name="P11"><text:span text:style-name="T12">9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5" draw:text-style-name="P4" draw:layer="layout" svg:width="22.351cm" svg:height="2.031cm" svg:x="1.524cm" svg:y="0.127cm">
          <text:p text:style-name="P3"><text:span text:style-name="T16">Exemplo: classe Carro em 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6" draw:text-style-name="P20" draw:layer="layout" svg:width="22.351cm" svg:height="8.706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351cm" svg:height="0.101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7" draw:text-style-name="P22" draw:layer="layout" svg:width="20.827cm" svg:height="7.111cm" svg:x="2.286cm" svg:y="2.802cm">
          <text:p text:style-name="P21"><text:span text:style-name="T24">public class Carro {</text:span></text:p>
          <text:p text:style-name="P21"><text:span text:style-name="T24"><text:s text:c="4"/>// Atributos</text:span></text:p>
          <text:p text:style-name="P21"><text:span text:style-name="T24"><text:s text:c="4"/>public float motor;</text:span></text:p>
          <text:p text:style-name="P21"><text:span text:style-name="T24"><text:s text:c="4"/>public String modelo;</text:span></text:p>
          <text:p text:style-name="P21"><text:span text:style-name="T24"><text:s text:c="4"/>public int ano;</text:span></text:p>
          <text:p text:style-name="P21"><text:span text:style-name="T25"/></text:p>
          <text:p text:style-name="P21"><text:span text:style-name="T24"><text:s text:c="4"/>// Método sem retorno (void)</text:span></text:p>
          <text:p text:style-name="P21"><text:span text:style-name="T24"><text:s text:c="4"/>public void ligar() {</text:span></text:p>
          <text:p text:style-name="P21"><text:span text:style-name="T24"><text:s text:c="8"/>System.out.println("Carro Ligou!");</text:span></text:p>
          <text:p text:style-name="P21"><text:span text:style-name="T24"><text:s text:c="4"/>}</text:span></text:p>
          <text:p text:style-name="P21"><text:span text:style-name="T25"/></text:p>
          <text:p text:style-name="P21"><text:span text:style-name="T24"><text:s text:c="4"/>// Método com retorno (int)</text:span></text:p>
          <text:p text:style-name="P21"><text:span text:style-name="T24"><text:s text:c="4"/>public int calcularAno(int ano) {</text:span></text:p>
          <text:p text:style-name="P21"><text:span text:style-name="T24"><text:s text:c="8"/>return this.ano;</text:span></text:p>
          <text:p text:style-name="P21"><text:span text:style-name="T24"><text:s text:c="4"/>}</text:span></text:p>
          <text:p text:style-name="P21"><text:span text:style-name="T24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8" draw:text-style-name="P4" draw:layer="layout" svg:width="22.351cm" svg:height="1.269cm" svg:x="1.524cm" svg:y="11.303cm">
          <text:p text:style-name="P3"><text:span text:style-name="T26">Atributos definem o estado; métodos definem as ações do objet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8" draw:style-name="gr59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0" draw:text-style-name="P12" draw:layer="layout" svg:width="2.539cm" svg:height="1.079cm" svg:x="21.59cm" svg:y="13.208cm">
          <text:p text:style-name="P11"><text:span text:style-name="T12">10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1" draw:text-style-name="P4" draw:layer="layout" svg:width="22.351cm" svg:height="1.777cm" svg:x="1.524cm" svg:y="0.762cm">
          <text:p text:style-name="P3"><text:span text:style-name="T21">Dinâmica 2 — Crie sua Primeira Clas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9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2" draw:text-style-name="P16" draw:layer="layout" svg:width="20.319cm" svg:height="8.127cm" svg:x="2.54cm" svg:y="2.656cm">
          <text:list text:style-name="L10">
            <text:list-item>
              <text:p text:style-name="P15"><text:span text:style-name="T18">Individualmente, escreva no papel (ou no caderno) uma classe </text:span><text:span text:style-name="T19">Java</text:span><text:span text:style-name="T18"> para '</text:span><text:span text:style-name="T23">Aluno</text:span><text:span text:style-name="T18">';</text:span></text:p>
            </text:list-item>
            <text:list-item>
              <text:p text:style-name="P15"><text:span text:style-name="T18">Inclua: pelo menos 3 atributos (</text:span><text:span text:style-name="T20">nome</text:span><text:span text:style-name="T18">, </text:span><text:span text:style-name="T20">matricula</text:span><text:span text:style-name="T18">, </text:span><text:span text:style-name="T20">nota</text:span><text:span text:style-name="T18">), 1 método </text:span><text:span text:style-name="T20">void</text:span><text:span text:style-name="T18"> e 1 método com retorno;</text:span></text:p>
            </text:list-item>
            <text:list-item>
              <text:p text:style-name="P15"><text:span text:style-name="T18">Lembre-se: classe com letra maiúscula, { } para delimitar escopo, tipos primitivos nos atributos;</text:span></text:p>
            </text:list-item>
            <text:list-item>
              <text:p text:style-name="P15"><text:span text:style-name="T18">Método </text:span><text:span text:style-name="T20">void</text:span><text:span text:style-name="T18">: </text:span><text:span text:style-name="T20">exibirDados()</text:span><text:span text:style-name="T18"> → imprime </text:span><text:span text:style-name="T20">nome</text:span><text:span text:style-name="T18"> e </text:span><text:span text:style-name="T20">matrícula</text:span><text:span text:style-name="T18">;</text:span></text:p>
            </text:list-item>
            <text:list-item>
              <text:p text:style-name="P15"><text:span text:style-name="T18">Método com retorno: </text:span><text:span text:style-name="T20">verificarAprovacao()</text:span><text:span text:style-name="T18"> → retorna </text:span><text:span text:style-name="T20">true</text:span><text:span text:style-name="T18"> se </text:span><text:span text:style-name="T20">nota &gt;= 6</text:span><text:span text:style-name="T18">;</text:span></text:p>
            </text:list-item>
            <text:list-item>
              <text:p text:style-name="P15"><text:span text:style-name="T18">Tempo: 6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63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4" draw:text-style-name="P12" draw:layer="layout" svg:width="2.539cm" svg:height="1.079cm" svg:x="21.59cm" svg:y="13.208cm">
          <text:p text:style-name="P11"><text:span text:style-name="T12">11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1" presentation:class="page"/>
          <draw:frame draw:name="Notes Placeholder 2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5" draw:text-style-name="P4" draw:layer="layout" svg:width="22.351cm" svg:height="1.777cm" svg:x="1.524cm" svg:y="0.762cm">
          <text:p text:style-name="P3"><text:span text:style-name="T22">Exemplo de resposta — Dinâmica 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6" draw:text-style-name="P24" draw:layer="layout" svg:width="21.335cm" svg:height="9.651cm" svg:x="2.032cm" svg:y="2.148cm">
          <text:list text:style-name="L10">
            <text:list-header>
              <text:p text:style-name="P23"><text:span text:style-name="T20">public class Aluno { </text:span></text:p>
              <text:p text:style-name="P23"><text:span text:style-name="T20"><text:s text:c="4"/>public String nome;</text:span></text:p>
              <text:p text:style-name="P23"><text:span text:style-name="T27"><text:s text:c="4"/></text:span><text:span text:style-name="T20">public int matricula;</text:span></text:p>
              <text:p text:style-name="P23"><text:span text:style-name="T27"><text:s text:c="4"/></text:span><text:span text:style-name="T20">public float nota;</text:span></text:p>
              <text:p text:style-name="P23"><text:span text:style-name="T20"><text:s text:c="4"/>public void exibirDados() {</text:span></text:p>
              <text:p text:style-name="P23"><text:span text:style-name="T28"><text:s text:c="4"/></text:span><text:span text:style-name="T27"><text:s text:c="4"/></text:span><text:span text:style-name="T20">System.out.println(nome + " - " + matricula);</text:span></text:p>
              <text:p text:style-name="P23"><text:span text:style-name="T27"><text:s text:c="4"/></text:span><text:span text:style-name="T20">}</text:span></text:p>
              <text:p text:style-name="P23"><text:span text:style-name="T20"><text:s text:c="4"/>public boolean verificarAprovacao() {</text:span></text:p>
              <text:p text:style-name="P23"><text:span text:style-name="T28"><text:s text:c="4"/></text:span><text:span text:style-name="T27"><text:s text:c="4"/></text:span><text:span text:style-name="T20">return this.nota &gt;= 6;</text:span></text:p>
              <text:p text:style-name="P23"><text:span text:style-name="T27"><text:s text:c="4"/></text:span><text:span text:style-name="T20">}</text:span></text:p>
              <text:p text:style-name="P23"><text:span text:style-name="T20">}</text:span></text:p>
            </text:list-header>
            <text:list-item>
              <text:p text:style-name="P23"><text:span text:style-name="T20">void</text:span><text:span text:style-name="T18"> = não retorna nada, apenas executa.</text:span></text:p>
            </text:list-item>
            <text:list-item>
              <text:p text:style-name="P23"><text:span text:style-name="T20">boolean</text:span><text:span text:style-name="T18"> = retorna </text:span><text:span text:style-name="T20">true</text:span><text:span text:style-name="T18">/</text:span><text:span text:style-name="T20">false</text:span><text:span text:style-name="T18"> com '</text:span><text:span text:style-name="T20">return</text:span><text:span text:style-name="T18">'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67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8" draw:text-style-name="P12" draw:layer="layout" svg:width="2.539cm" svg:height="1.079cm" svg:x="21.59cm" svg:y="13.208cm">
          <text:p text:style-name="P11"><text:span text:style-name="T12">12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2" presentation:class="page"/>
          <draw:frame draw:name="Notes Placeholder 2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0BF40CBB.png" xlink:type="simple" xlink:show="embed" xlink:actuate="onLoad" draw:mime-type="image/png">
            <text:p/>
          </draw:image>
          <svg:desc>preencoded.png</svg:desc>
        </draw:frame>
        <draw:custom-shape draw:name="Text 2" draw:style-name="gr69" draw:text-style-name="P4" draw:layer="layout" svg:width="18.287cm" svg:height="1.777cm" svg:x="5.08cm" svg:y="4.064cm">
          <text:p text:style-name="P3"><text:span text:style-name="T13">5.2 Métodos em </text:span><text:span text:style-name="T14">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0" draw:text-style-name="P4" draw:layer="layout" svg:width="18.287cm" svg:height="1.523cm" svg:x="5.08cm" svg:y="6.096cm">
          <text:p text:style-name="P3"><text:span text:style-name="T15">Ações dos objetos: void, retorno e comentári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71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2" draw:text-style-name="P12" draw:layer="layout" svg:width="2.539cm" svg:height="1.079cm" svg:x="21.59cm" svg:y="13.208cm">
          <text:p text:style-name="P11"><text:span text:style-name="T12">13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3" presentation:class="page"/>
          <draw:frame draw:name="Notes Placeholder 2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3" draw:text-style-name="P4" draw:layer="layout" svg:width="22.351cm" svg:height="2.031cm" svg:x="1.524cm" svg:y="0.127cm">
          <text:p text:style-name="P3"><text:span text:style-name="T16">Tipos de métodos e comentári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4" draw:text-style-name="P16" draw:layer="layout" svg:width="21.867cm" svg:height="9.651cm" svg:x="1.5cm" svg:y="2.048cm">
          <text:list text:style-name="L10">
            <text:list-item>
              <text:p text:style-name="P15"><text:span text:style-name="T18">Métodos são ações que os objetos realizam — definidos dentro da classe;</text:span></text:p>
            </text:list-item>
            <text:list-item>
              <text:p text:style-name="P15"><text:span text:style-name="T18">Método </text:span><text:span text:style-name="T20">void</text:span><text:span text:style-name="T18">: não retorna valor. Usa a palavra '</text:span><text:span text:style-name="T20">void</text:span><text:span text:style-name="T18">' antes do nome (ex.: </text:span><text:span text:style-name="T20">public void ligar()</text:span><text:span text:style-name="T18">);</text:span></text:p>
            </text:list-item>
            <text:list-item>
              <text:p text:style-name="P15"><text:span text:style-name="T18">Método com retorno: declara o tipo de retorno antes do nome + usa '</text:span><text:span text:style-name="T20">return</text:span><text:span text:style-name="T18">' no corpo;</text:span></text:p>
            </text:list-item>
            <text:list-item>
              <text:p text:style-name="P15"><text:span text:style-name="T18">Exemplos de retorno: </text:span><text:span text:style-name="T20">int</text:span><text:span text:style-name="T18">, </text:span><text:span text:style-name="T20">float</text:span><text:span text:style-name="T18">, </text:span><text:span text:style-name="T20">String</text:span><text:span text:style-name="T18">, </text:span><text:span text:style-name="T20">boolean</text:span><text:span text:style-name="T18"> — o retorno deve corresponder ao tipo declarado.</text:span></text:p>
            </text:list-item>
            <text:list-item>
              <text:p text:style-name="P15"><text:span text:style-name="T18">Comentários: ‘</text:span><text:span text:style-name="T20">//</text:span><text:span text:style-name="T18">’ para linha única. Tudo após ‘</text:span><text:span text:style-name="T20">//</text:span><text:span text:style-name="T18">’ é ignorado pelo compilador — serve como documentação.</text:span></text:p>
            </text:list-item>
            <text:list-item>
              <text:p text:style-name="P15"><text:span text:style-name="T18">Boas práticas: comente o propósito de cada método para facilitar manutenção e leitura do códig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75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6" draw:text-style-name="P12" draw:layer="layout" svg:width="2.539cm" svg:height="1.079cm" svg:x="21.59cm" svg:y="13.208cm">
          <text:p text:style-name="P11"><text:span text:style-name="T12">14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4" presentation:class="page"/>
          <draw:frame draw:name="Notes Placeholder 2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7" draw:text-style-name="P4" draw:layer="layout" svg:width="22.351cm" svg:height="2.031cm" svg:x="1.524cm" svg:y="0.127cm">
          <text:p text:style-name="P3"><text:span text:style-name="T16">void vs. retorno: comparação lado a la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78" draw:text-style-name="P20" draw:layer="layout" svg:width="22.351cm" svg:height="8.127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351cm" svg:height="0.101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9" draw:text-style-name="P22" draw:layer="layout" svg:width="20.827cm" svg:height="7.111cm" svg:x="2.286cm" svg:y="3.302cm">
          <text:p text:style-name="P21"><text:span text:style-name="T24">// Método SEM retorno (procedimento)</text:span></text:p>
          <text:p text:style-name="P21"><text:span text:style-name="T24">public void exibirDados() {</text:span></text:p>
          <text:p text:style-name="P21"><text:span text:style-name="T24"><text:s text:c="4"/>System.out.println("Modelo: " + this.modelo);</text:span></text:p>
          <text:p text:style-name="P21"><text:span text:style-name="T24"><text:s text:c="4"/>// Não tem return</text:span></text:p>
          <text:p text:style-name="P21"><text:span text:style-name="T24">}</text:span></text:p>
          <text:p text:style-name="P21"><text:span text:style-name="T25"/></text:p>
          <text:p text:style-name="P21"><text:span text:style-name="T24">// Método COM retorno (função)</text:span></text:p>
          <text:p text:style-name="P21"><text:span text:style-name="T24">public int calcularIdade(int anoAtual) {</text:span></text:p>
          <text:p text:style-name="P21"><text:span text:style-name="T24"><text:s text:c="4"/>return anoAtual - this.ano; <text:s/>// Retorna int</text:span></text:p>
          <text:p text:style-name="P21"><text:span text:style-name="T24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0" draw:text-style-name="P4" draw:layer="layout" svg:width="22.351cm" svg:height="1.269cm" svg:x="1.524cm" svg:y="11.303cm">
          <text:p text:style-name="P3"><text:span text:style-name="T26">void = ação sem resposta | tipo primitivo = ação que devolve um val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8" draw:style-name="gr81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2" draw:text-style-name="P12" draw:layer="layout" svg:width="2.539cm" svg:height="1.079cm" svg:x="21.59cm" svg:y="13.208cm">
          <text:p text:style-name="P11"><text:span text:style-name="T12">15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5" presentation:class="page"/>
          <draw:frame draw:name="Notes Placeholder 2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6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D70A47D9.png" xlink:type="simple" xlink:show="embed" xlink:actuate="onLoad" draw:mime-type="image/png">
            <text:p/>
          </draw:image>
          <svg:desc>preencoded.png</svg:desc>
        </draw:frame>
        <draw:custom-shape draw:name="Text 2" draw:style-name="gr83" draw:text-style-name="P4" draw:layer="layout" svg:width="18.287cm" svg:height="1.777cm" svg:x="5.08cm" svg:y="4.064cm">
          <text:p text:style-name="P3"><text:span text:style-name="T13">5.3 Modificadores de Acess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4" draw:text-style-name="P4" draw:layer="layout" svg:width="18.287cm" svg:height="1.523cm" svg:x="5.08cm" svg:y="6.096cm">
          <text:p text:style-name="P3"><text:span text:style-name="T15">Encapsulamento na prática: public, private, protected, defaul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85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6" draw:text-style-name="P12" draw:layer="layout" svg:width="2.539cm" svg:height="1.079cm" svg:x="21.59cm" svg:y="13.208cm">
          <text:p text:style-name="P11"><text:span text:style-name="T12">16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6" presentation:class="page"/>
          <draw:frame draw:name="Notes Placeholder 2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7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7" draw:text-style-name="P4" draw:layer="layout" svg:width="22.351cm" svg:height="2.031cm" svg:x="1.524cm" svg:y="0.127cm">
          <text:p text:style-name="P3"><text:span text:style-name="T16">O que são modificadores de acesso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8" draw:text-style-name="P16" draw:layer="layout" svg:width="21.335cm" svg:height="9.651cm" svg:x="2.032cm" svg:y="3.048cm">
          <text:list text:style-name="L10">
            <text:list-item>
              <text:p text:style-name="P15"><text:span text:style-name="T18">Ferramentas que garantem o encapsulamento na linguagem </text:span><text:span text:style-name="T19">Java</text:span><text:span text:style-name="T18">.</text:span></text:p>
            </text:list-item>
            <text:list-item>
              <text:p text:style-name="P15"><text:span text:style-name="T18">Definem quem tem direito de acessar diretamente atributos ou métodos.</text:span></text:p>
            </text:list-item>
            <text:list-item>
              <text:p text:style-name="P15"><text:span text:style-name="T18">Quatro principais: </text:span><text:span text:style-name="T20">public</text:span><text:span text:style-name="T18">, </text:span><text:span text:style-name="T20">private</text:span><text:span text:style-name="T18">, </text:span><text:span text:style-name="T20">protected</text:span><text:span text:style-name="T18"> e </text:span><text:span text:style-name="T19">default</text:span><text:span text:style-name="T18"> (sem palavra-chave).</text:span></text:p>
            </text:list-item>
            <text:list-item>
              <text:p text:style-name="P15"><text:span text:style-name="T20">public</text:span><text:span text:style-name="T18">: acessível de qualquer lugar — classes, pacotes, subclasses.</text:span></text:p>
            </text:list-item>
            <text:list-item>
              <text:p text:style-name="P15"><text:span text:style-name="T20">private</text:span><text:span text:style-name="T18">: acessível apenas dentro da própria classe — máxima restrição.</text:span></text:p>
            </text:list-item>
            <text:list-item>
              <text:p text:style-name="P15"><text:span text:style-name="T20">protected</text:span><text:span text:style-name="T18">: acessível no mesmo pacote + subclasses em pacotes diferentes.</text:span></text:p>
            </text:list-item>
            <text:list-item>
              <text:p text:style-name="P15"><text:span text:style-name="T19">default</text:span><text:span text:style-name="T18"> (sem modificador): acessível apenas dentro do mesmo pacote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89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0" draw:text-style-name="P12" draw:layer="layout" svg:width="2.539cm" svg:height="1.079cm" svg:x="21.59cm" svg:y="13.208cm">
          <text:p text:style-name="P11"><text:span text:style-name="T12">17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7" presentation:class="page"/>
          <draw:frame draw:name="Notes Placeholder 2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8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1" draw:text-style-name="P4" draw:layer="layout" svg:width="22.351cm" svg:height="2.031cm" svg:x="1.524cm" svg:y="0.127cm">
          <text:p text:style-name="P3"><text:span text:style-name="T16">Tabela de modificadores de acess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92" draw:layer="layout" svg:width="22.351cm" svg:height="3.814cm" svg:x="1.524cm" svg:y="3.048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9"><text:span text:style-name="T29">Escopo</text:span></text:p>
              </table:table-cell>
              <table:table-cell table:style-name="ce2">
                <text:p text:style-name="P25"><text:span text:style-name="T30">public</text:span></text:p>
              </table:table-cell>
              <table:table-cell table:style-name="ce3">
                <text:p text:style-name="P25"><text:span text:style-name="T30">protected</text:span></text:p>
              </table:table-cell>
              <table:table-cell>
                <text:p text:style-name="P9"><text:span text:style-name="T29">default</text:span></text:p>
              </table:table-cell>
              <table:table-cell table:style-name="ce4">
                <text:p text:style-name="P25"><text:span text:style-name="T31">private</text:span></text:p>
              </table:table-cell>
            </table:table-row>
            <table:table-row table:style-name="ro1">
              <table:table-cell table:style-name="ce5">
                <text:p text:style-name="P3"><text:span text:style-name="T32">Mesma classe</text:span></text:p>
              </table:table-cell>
              <table:table-cell table:style-name="ce6">
                <text:p text:style-name="P26"><text:span text:style-name="T33">SIM</text:span></text:p>
              </table:table-cell>
              <table:table-cell table:style-name="ce7">
                <text:p text:style-name="P26"><text:span text:style-name="T33">SIM</text:span></text:p>
              </table:table-cell>
              <table:table-cell table:style-name="ce8">
                <text:p text:style-name="P26"><text:span text:style-name="T33">SIM</text:span></text:p>
              </table:table-cell>
              <table:table-cell table:style-name="ce9">
                <text:p text:style-name="P26"><text:span text:style-name="T33">SIM</text:span></text:p>
              </table:table-cell>
            </table:table-row>
            <table:table-row table:style-name="ro1">
              <table:table-cell table:style-name="ce5">
                <text:p text:style-name="P3"><text:span text:style-name="T32">Mesmo pacote</text:span></text:p>
              </table:table-cell>
              <table:table-cell table:style-name="ce10">
                <text:p text:style-name="P26"><text:span text:style-name="T33">SIM</text:span></text:p>
              </table:table-cell>
              <table:table-cell table:style-name="ce11">
                <text:p text:style-name="P26"><text:span text:style-name="T33">SIM</text:span></text:p>
              </table:table-cell>
              <table:table-cell table:style-name="ce12">
                <text:p text:style-name="P26"><text:span text:style-name="T33">SIM</text:span></text:p>
              </table:table-cell>
              <table:table-cell table:style-name="ce13">
                <text:p text:style-name="P26"><text:span text:style-name="T34">NÃO</text:span></text:p>
              </table:table-cell>
            </table:table-row>
            <table:table-row table:style-name="ro1">
              <table:table-cell table:style-name="ce5">
                <text:p text:style-name="P3"><text:span text:style-name="T32">Pacote diferente (subclasse)</text:span></text:p>
              </table:table-cell>
              <table:table-cell table:style-name="ce14">
                <text:p text:style-name="P26"><text:span text:style-name="T33">SIM</text:span></text:p>
              </table:table-cell>
              <table:table-cell table:style-name="ce15">
                <text:p text:style-name="P26"><text:span text:style-name="T33">SIM</text:span></text:p>
              </table:table-cell>
              <table:table-cell table:style-name="ce16">
                <text:p text:style-name="P26"><text:span text:style-name="T34">NÃO</text:span></text:p>
              </table:table-cell>
              <table:table-cell table:style-name="ce17">
                <text:p text:style-name="P26"><text:span text:style-name="T34">NÃO</text:span></text:p>
              </table:table-cell>
            </table:table-row>
            <table:table-row table:style-name="ro1">
              <table:table-cell table:style-name="ce5">
                <text:p text:style-name="P3"><text:span text:style-name="T32">Pacote diferente (sem subclasse)</text:span></text:p>
              </table:table-cell>
              <table:table-cell table:style-name="ce18">
                <text:p text:style-name="P26"><text:span text:style-name="T33">SIM</text:span></text:p>
              </table:table-cell>
              <table:table-cell table:style-name="ce19">
                <text:p text:style-name="P26"><text:span text:style-name="T34">NÃO</text:span></text:p>
              </table:table-cell>
              <table:table-cell table:style-name="ce20">
                <text:p text:style-name="P26"><text:span text:style-name="T34">NÃO</text:span></text:p>
              </table:table-cell>
              <table:table-cell table:style-name="ce21">
                <text:p text:style-name="P26"><text:span text:style-name="T34">NÃO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3" draw:style-name="gr93" draw:text-style-name="P4" draw:layer="layout" svg:width="22.351cm" svg:height="1.523cm" svg:x="1.524cm" svg:y="9.652cm">
          <text:p text:style-name="P3"><text:span text:style-name="T35">public</text:span><text:span text:style-name="T26"> = acesso total | </text:span><text:span text:style-name="T35">private</text:span><text:span text:style-name="T26"> = apenas dentro da classe | </text:span><text:span text:style-name="T35">protected</text:span><text:span text:style-name="T26"> = pacote + subclasses | default = apenas paco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94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5" draw:text-style-name="P12" draw:layer="layout" svg:width="2.539cm" svg:height="1.079cm" svg:x="21.59cm" svg:y="13.208cm">
          <text:p text:style-name="P11"><text:span text:style-name="T12">18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8" presentation:class="page"/>
          <draw:frame draw:name="Notes Placeholder 2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9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6" draw:text-style-name="P4" draw:layer="layout" svg:width="22.351cm" svg:height="1.777cm" svg:x="1.524cm" svg:y="0.762cm">
          <text:p text:style-name="P3"><text:span text:style-name="T21">Dinâmica 3 — Aplicando Modificado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9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7" draw:text-style-name="P18" draw:layer="layout" svg:width="20.319cm" svg:height="8.127cm" svg:x="2.54cm" svg:y="2.656cm">
          <text:list text:style-name="L10">
            <text:list-item>
              <text:p text:style-name="P17"><text:span text:style-name="T18">Em duplas, considere a classe </text:span><text:span text:style-name="T23">ContaBancaria</text:span><text:span text:style-name="T18"> vista na Aula 3.</text:span></text:p>
            </text:list-item>
            <text:list-item>
              <text:p text:style-name="P17"><text:span text:style-name="T18">Reescreva os atributos e métodos agora com os modificadores </text:span><text:span text:style-name="T19">Java</text:span><text:span text:style-name="T18"> corretos:</text:span></text:p>
              <text:list>
                <text:list-item>
                  <text:p text:style-name="P17"><text:span text:style-name="T20">saldo</text:span><text:span text:style-name="T18"> → </text:span><text:span text:style-name="T36">private</text:span><text:span text:style-name="T18"> (protegido), </text:span><text:span text:style-name="T20">titular</text:span><text:span text:style-name="T18"> → </text:span><text:span text:style-name="T36">private</text:span><text:span text:style-name="T18">, </text:span><text:span text:style-name="T20">depositar()</text:span><text:span text:style-name="T18"> → </text:span><text:span text:style-name="T36">public</text:span><text:span text:style-name="T18">, </text:span><text:span text:style-name="T20">sacar()</text:span><text:span text:style-name="T18"> → </text:span><text:span text:style-name="T36">public</text:span><text:span text:style-name="T18">.</text:span></text:p>
                </text:list-item>
              </text:list>
            </text:list-item>
            <text:list-item>
              <text:p text:style-name="P17"><text:span text:style-name="T20">validarSenha()</text:span><text:span text:style-name="T18"> → </text:span><text:span text:style-name="T36">private</text:span><text:span text:style-name="T18">, </text:span><text:span text:style-name="T20">consultarSaldo()</text:span><text:span text:style-name="T18"> → </text:span><text:span text:style-name="T36">public</text:span><text:span text:style-name="T18">.</text:span></text:p>
            </text:list-item>
            <text:list-item>
              <text:p text:style-name="P17"><text:span text:style-name="T18">Pergunta: como acessar '</text:span><text:span text:style-name="T20">saldo</text:span><text:span text:style-name="T18">' de fora da classe se ele é </text:span><text:span text:style-name="T36">private</text:span><text:span text:style-name="T18">? (dica: </text:span><text:span text:style-name="T19">getters</text:span><text:span text:style-name="T18">/</text:span><text:span text:style-name="T19">setters</text:span><text:span text:style-name="T18">)</text:span></text:p>
            </text:list-item>
            <text:list-item>
              <text:p text:style-name="P17"><text:span text:style-name="T18">Tempo: 5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98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9" draw:text-style-name="P12" draw:layer="layout" svg:width="2.539cm" svg:height="1.079cm" svg:x="21.59cm" svg:y="13.208cm">
          <text:p text:style-name="P11"><text:span text:style-name="T12">19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9" presentation:class="page"/>
          <draw:frame draw:name="Notes Placeholder 2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0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0" draw:text-style-name="P4" draw:layer="layout" svg:width="22.351cm" svg:height="1.777cm" svg:x="1.524cm" svg:y="0.762cm">
          <text:p text:style-name="P3"><text:span text:style-name="T22">Respostas — Dinâmica 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1" draw:text-style-name="P28" draw:layer="layout" svg:width="11.968cm" svg:height="9.651cm" svg:x="0.932cm" svg:y="1.748cm">
          <text:list text:style-name="L10">
            <text:list-item>
              <text:p text:style-name="P27"><text:span text:style-name="T20">private float saldo</text:span><text:span text:style-name="T18">;</text:span></text:p>
              <text:p text:style-name="P27"><text:span text:style-name="T20">private String titular</text:span><text:span text:style-name="T18">;</text:span></text:p>
              <text:list>
                <text:list-item>
                  <text:p text:style-name="P27"><text:span text:style-name="T18">→ protegidos contra acesso externo direto.</text:span></text:p>
                </text:list-item>
              </text:list>
            </text:list-item>
            <text:list-item>
              <text:p text:style-name="P27"><text:span text:style-name="T20">public void depositar(float valor) {</text:span></text:p>
              <text:p text:style-name="P27"><text:span text:style-name="T20"><text:s text:c="2"/>this.saldo += valor;</text:span></text:p>
              <text:p text:style-name="P27"><text:span text:style-name="T20">}</text:span></text:p>
              <text:list>
                <text:list-item>
                  <text:p text:style-name="P27"><text:span text:style-name="T18">→ público, qualquer classe pode chamar.</text:span></text:p>
                </text:list-item>
              </text:list>
            </text:list-item>
            <text:list-item>
              <text:p text:style-name="P27"><text:span text:style-name="T18"/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02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3" draw:text-style-name="P12" draw:layer="layout" svg:width="2.539cm" svg:height="1.079cm" svg:x="21.59cm" svg:y="13.208cm">
          <text:p text:style-name="P11"><text:span text:style-name="T12">20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4" draw:text-style-name="P28" draw:layer="layout" svg:width="12.968cm" svg:height="9.651cm" svg:x="12.232cm" svg:y="1.9cm">
          <text:list text:style-name="L15">
            <text:list-item>
              <text:p text:style-name="P27"><text:span text:style-name="T27">public float </text:span><text:span text:style-name="T27">consultarSaldo() {</text:span></text:p>
              <text:list>
                <text:list-header>
                  <text:p text:style-name="P27"><text:span text:style-name="T27">return this.saldo;</text:span></text:p>
                </text:list-header>
              </text:list>
              <text:p text:style-name="P27"><text:span text:style-name="T27">}</text:span></text:p>
              <text:list>
                <text:list-item>
                  <text:p text:style-name="P27"><text:span text:style-name="T37">→ </text:span><text:span text:style-name="T38">getter</text:span><text:span text:style-name="T37"> público </text:span><text:span text:style-name="T37">para ler o saldo.</text:span></text:p>
                </text:list-item>
              </text:list>
            </text:list-item>
            <text:list-item>
              <text:p text:style-name="P27"><text:span text:style-name="T27">private boolean </text:span><text:span text:style-name="T27">validarSenha(String </text:span><text:span text:style-name="T27">s){</text:span></text:p>
              <text:list>
                <text:list-item>
                  <text:list>
                    <text:list-header>
                      <text:p text:style-name="P27"><text:span text:style-name="T27">…</text:span></text:p>
                    </text:list-header>
                  </text:list>
                  <text:p text:style-name="P27"><text:span text:style-name="T27">}</text:span></text:p>
                </text:list-item>
                <text:list-item>
                  <text:p text:style-name="P27"><text:span text:style-name="T37">→ interno, só a </text:span><text:span text:style-name="T37">própria classe usa.</text:span></text:p>
                </text:list-item>
              </text:list>
            </text:list-item>
            <text:list-item>
              <text:p text:style-name="P27"><text:span text:style-name="T37"/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5" draw:text-style-name="P29" draw:layer="layout" svg:width="22.263cm" svg:height="1.64cm" svg:x="1.594cm" svg:y="11.568cm">
          <draw:text-box>
            <text:p><text:span text:style-name="T39">Padrão </text:span><text:span text:style-name="T40">getter</text:span><text:span text:style-name="T39">/</text:span><text:span text:style-name="T40">setter</text:span><text:span text:style-name="T39">: métodos públicos que controlam acesso a atributos privados — </text:span><text:span text:style-name="T39">encapsulamento na prática!</text:span></text:p>
          </draw:text-box>
        </draw:frame>
        <presentation:notes draw:style-name="dp2">
          <draw:page-thumbnail draw:name="Slide Image Placeholder 1" draw:style-name="gr8" draw:layer="layout" svg:width="15.239cm" svg:height="8.572cm" svg:x="1.905cm" svg:y="3.175cm" draw:page-number="20" presentation:class="page"/>
          <draw:frame draw:name="Notes Placeholder 2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1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190CABFB.png" xlink:type="simple" xlink:show="embed" xlink:actuate="onLoad" draw:mime-type="image/png">
            <text:p/>
          </draw:image>
          <svg:desc>preencoded.png</svg:desc>
        </draw:frame>
        <draw:custom-shape draw:name="Text 2" draw:style-name="gr106" draw:text-style-name="P4" draw:layer="layout" svg:width="18.287cm" svg:height="1.777cm" svg:x="5.08cm" svg:y="4.064cm">
          <text:p text:style-name="P3"><text:span text:style-name="T13">5.4 Construtores Múltipl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7" draw:text-style-name="P4" draw:layer="layout" svg:width="18.287cm" svg:height="1.523cm" svg:x="5.08cm" svg:y="6.096cm">
          <text:p text:style-name="P3"><text:span text:style-name="T15">Polimorfismo na prática: mesmo nome, parâmetros diferen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08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9" draw:text-style-name="P12" draw:layer="layout" svg:width="2.539cm" svg:height="1.079cm" svg:x="21.59cm" svg:y="13.208cm">
          <text:p text:style-name="P11"><text:span text:style-name="T12">21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1" presentation:class="page"/>
          <draw:frame draw:name="Notes Placeholder 2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2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0" draw:text-style-name="P4" draw:layer="layout" svg:width="22.351cm" svg:height="2.031cm" svg:x="1.524cm" svg:y="0.127cm">
          <text:p text:style-name="P3"><text:span text:style-name="T16">O que são construtores múltiplos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1" draw:text-style-name="P18" draw:layer="layout" svg:width="21.335cm" svg:height="9.651cm" svg:x="2.032cm" svg:y="2.548cm">
          <text:list text:style-name="L10">
            <text:list-item>
              <text:p text:style-name="P17"><text:span text:style-name="T18">Método construtor: tem o mesmo nome da classe, inicializa o objeto ao instanciá-lo;</text:span></text:p>
            </text:list-item>
            <text:list-item>
              <text:p text:style-name="P17"><text:span text:style-name="T18">Construtores múltiplos = mesmo nome, mas com parâmetros diferentes (sobrecarga);</text:span></text:p>
            </text:list-item>
            <text:list-item>
              <text:p text:style-name="P17"><text:span text:style-name="T18">Exemplificam polimorfismo: dependendo dos parâmetros passados, um construtor diferente é chamado;</text:span></text:p>
            </text:list-item>
            <text:list-item>
              <text:p text:style-name="P17"><text:span text:style-name="T18">Cada construtor pode inicializar o objeto de forma diferente conforme o contexto;</text:span></text:p>
            </text:list-item>
            <text:list-item>
              <text:p text:style-name="P17"><text:span text:style-name="T18">Permitem flexibilidade: criar objeto vazio, com dados parciais ou com todos os dad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12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3" draw:text-style-name="P12" draw:layer="layout" svg:width="2.539cm" svg:height="1.079cm" svg:x="21.59cm" svg:y="13.208cm">
          <text:p text:style-name="P11"><text:span text:style-name="T12">22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2" presentation:class="page"/>
          <draw:frame draw:name="Notes Placeholder 2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3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4" draw:text-style-name="P4" draw:layer="layout" svg:width="22.351cm" svg:height="2.031cm" svg:x="1.524cm" svg:y="0.127cm">
          <text:p text:style-name="P3"><text:span text:style-name="T16">Exemplo: classe Aviao com 3 construto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5" draw:text-style-name="P20" draw:layer="layout" svg:width="22.351cm" svg:height="9.206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351cm" svg:height="0.101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6" draw:text-style-name="P22" draw:layer="layout" svg:width="20.827cm" svg:height="7.111cm" svg:x="2.286cm" svg:y="3.302cm">
          <text:p text:style-name="P21"><text:span text:style-name="T24">public class Aviao {</text:span></text:p>
          <text:p text:style-name="P21"><text:span text:style-name="T24"><text:s text:c="4"/>private String empresa;</text:span></text:p>
          <text:p text:style-name="P21"><text:span text:style-name="T24"><text:s text:c="4"/>private String modelo;</text:span></text:p>
          <text:p text:style-name="P21"><text:span text:style-name="T25"/></text:p>
          <text:p text:style-name="P21"><text:span text:style-name="T24"><text:s text:c="4"/>public Aviao() { <text:s text:c="19"/>// Sem parâmetros</text:span></text:p>
          <text:p text:style-name="P21"><text:span text:style-name="T24"><text:s text:c="8"/>System.out.println("E vruu!");</text:span></text:p>
          <text:p text:style-name="P21"><text:span text:style-name="T24"><text:s text:c="4"/>}</text:span></text:p>
          <text:p text:style-name="P21"><text:span text:style-name="T24"><text:s text:c="4"/>public Aviao(int x, int y) { <text:s text:c="7"/>// 2 inteiros</text:span></text:p>
          <text:p text:style-name="P21"><text:span text:style-name="T24"><text:s text:c="8"/>System.out.println("Resultado = " + (x+y));</text:span></text:p>
          <text:p text:style-name="P21"><text:span text:style-name="T24"><text:s text:c="4"/>}</text:span></text:p>
          <text:p text:style-name="P21"><text:span text:style-name="T24"><text:s text:c="4"/>public Aviao(String empresa, String modelo) { // 2 Strings</text:span></text:p>
          <text:p text:style-name="P21"><text:span text:style-name="T24"><text:s text:c="8"/>this.empresa = empresa;</text:span></text:p>
          <text:p text:style-name="P21"><text:span text:style-name="T24"><text:s text:c="8"/>this.modelo = modelo;</text:span></text:p>
          <text:p text:style-name="P21"><text:span text:style-name="T24"><text:s text:c="4"/>}</text:span></text:p>
          <text:p text:style-name="P21"><text:span text:style-name="T24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7" draw:text-style-name="P4" draw:layer="layout" svg:width="22.351cm" svg:height="1.269cm" svg:x="1.524cm" svg:y="11.803cm">
          <text:p text:style-name="P3"><text:span text:style-name="T26">3 construtores com mesmo nome 'Aviao', mas parâmetros diferentes = polimorfism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8" draw:style-name="gr118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9" draw:text-style-name="P12" draw:layer="layout" svg:width="2.539cm" svg:height="1.079cm" svg:x="21.59cm" svg:y="13.208cm">
          <text:p text:style-name="P11"><text:span text:style-name="T12">23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3" presentation:class="page"/>
          <draw:frame draw:name="Notes Placeholder 2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4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0" draw:text-style-name="P4" draw:layer="layout" svg:width="22.351cm" svg:height="1.777cm" svg:x="1.524cm" svg:y="0.762cm">
          <text:p text:style-name="P3"><text:span text:style-name="T21">Dinâmica 4 — Criando Construtores Múltipl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9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1" draw:text-style-name="P16" draw:layer="layout" svg:width="20.319cm" svg:height="8.127cm" svg:x="2.54cm" svg:y="3.256cm">
          <text:list text:style-name="L10">
            <text:list-item>
              <text:p text:style-name="P15"><text:span text:style-name="T18">Individualmente, crie a classe '</text:span><text:span text:style-name="T23">Produto</text:span><text:span text:style-name="T18">' com 3 construtores diferentes:</text:span></text:p>
              <text:list>
                <text:list-item>
                  <text:p text:style-name="P15"><text:span text:style-name="T18">Construtor 1: sem parâmetros — imprime '</text:span><text:span text:style-name="T41">Produto genérico criado</text:span><text:span text:style-name="T18">'.</text:span></text:p>
                </text:list-item>
                <text:list-item>
                  <text:p text:style-name="P15"><text:span text:style-name="T18">Construtor 2: recebe (</text:span><text:span text:style-name="T20">String nome</text:span><text:span text:style-name="T18">) — inicializa apenas o </text:span><text:span text:style-name="T20">nome</text:span><text:span text:style-name="T18">.</text:span></text:p>
                </text:list-item>
                <text:list-item>
                  <text:p text:style-name="P15"><text:span text:style-name="T18">Construtor 3: recebe (</text:span><text:span text:style-name="T20">String nome</text:span><text:span text:style-name="T18">, </text:span><text:span text:style-name="T20">float preco</text:span><text:span text:style-name="T18">, </text:span><text:span text:style-name="T20">int estoque</text:span><text:span text:style-name="T18">) — inicializa tudo.</text:span></text:p>
                </text:list-item>
              </text:list>
            </text:list-item>
            <text:list-item>
              <text:p text:style-name="P15"><text:span text:style-name="T18">Escreva também uma classe '</text:span><text:span text:style-name="T23">Loja</text:span><text:span text:style-name="T18">' com método </text:span><text:span text:style-name="T20">main</text:span><text:span text:style-name="T18"> que instancie 3 objetos </text:span><text:span text:style-name="T23">Produto</text:span><text:span text:style-name="T18">, um para cada construtor.</text:span></text:p>
            </text:list-item>
            <text:list-item>
              <text:p text:style-name="P15"><text:span text:style-name="T18">Tempo: 7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22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3" draw:text-style-name="P12" draw:layer="layout" svg:width="2.539cm" svg:height="1.079cm" svg:x="21.59cm" svg:y="13.208cm">
          <text:p text:style-name="P11"><text:span text:style-name="T12">24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4" presentation:class="page"/>
          <draw:frame draw:name="Notes Placeholder 2" presentation:style-name="pr2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4" draw:text-style-name="P4" draw:layer="layout" svg:width="22.351cm" svg:height="1.777cm" svg:x="1.524cm" svg:y="0.762cm">
          <text:p text:style-name="P3"><text:span text:style-name="T22">Exemplo de resposta — Dinâmica 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5" draw:text-style-name="P31" draw:layer="layout" svg:width="13.768cm" svg:height="6.952cm" svg:x="1.232cm" svg:y="1.8cm">
          <text:list text:style-name="L10">
            <text:list-item>
              <text:p text:style-name="P30"><text:span text:style-name="T20">public Produto() {</text:span></text:p>
              <text:list>
                <text:list-header>
                  <text:p text:style-name="P30"><text:span text:style-name="T20">System.out.println("Produto genérico criado");</text:span></text:p>
                </text:list-header>
              </text:list>
              <text:p text:style-name="P30"><text:span text:style-name="T20">}</text:span></text:p>
            </text:list-item>
            <text:list-item>
              <text:p text:style-name="P30"><text:span text:style-name="T20">public Produto(String nome) {</text:span></text:p>
              <text:list>
                <text:list-header>
                  <text:p text:style-name="P30"><text:span text:style-name="T20">this.nome = nome;</text:span></text:p>
                </text:list-header>
              </text:list>
              <text:p text:style-name="P30"><text:span text:style-name="T20">}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26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7" draw:text-style-name="P12" draw:layer="layout" svg:width="2.539cm" svg:height="1.079cm" svg:x="21.59cm" svg:y="13.208cm">
          <text:p text:style-name="P11"><text:span text:style-name="T12">25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8" draw:text-style-name="P33" draw:layer="layout" svg:width="14.71cm" svg:height="3.739cm" svg:x="9.59cm" svg:y="5.239cm">
          <draw:text-box>
            <text:list text:style-name="L1">
              <text:list-item>
                <text:p text:style-name="P32"><text:span text:style-name="T42">public Produto(String nome, float preco, int estoque) {</text:span></text:p>
                <text:list>
                  <text:list-header>
                    <text:p text:style-name="P32"><text:span text:style-name="T42">this.nome = nome;</text:span></text:p>
                    <text:p text:style-name="P32"><text:span text:style-name="T42">this.preco = preco;</text:span></text:p>
                    <text:p text:style-name="P32"><text:span text:style-name="T42">this.estoque = estoque;</text:span></text:p>
                  </text:list-header>
                </text:list>
                <text:p text:style-name="P32"><text:span text:style-name="T42">}</text:span></text:p>
              </text:list-item>
            </text:list>
          </draw:text-box>
        </draw:frame>
        <draw:frame draw:style-name="gr129" draw:text-style-name="P29" draw:layer="layout" svg:width="23.5cm" svg:height="4.398cm" svg:x="1cm" svg:y="8.5cm">
          <draw:text-box>
            <text:p><text:span text:style-name="T39">Na classe </text:span><text:span text:style-name="T43">Loja</text:span><text:span text:style-name="T39">:</text:span></text:p>
            <text:list text:style-name="L1">
              <text:list-item>
                <text:p><text:span text:style-name="T42">Produto p1 = new Produto();</text:span></text:p>
              </text:list-item>
              <text:list-item>
                <text:p><text:span text:style-name="T42">Produto p2 = new Produto("Caneta");</text:span></text:p>
              </text:list-item>
              <text:list-item>
                <text:p><text:span text:style-name="T42">Produto p3 = new Produto("Mouse", 49.90f, 100);</text:span></text:p>
              </text:list-item>
            </text:list>
            <text:p text:style-name="P34"><text:span text:style-name="T39">Cada '</text:span><text:span text:style-name="T42">new Produto(...)</text:span><text:span text:style-name="T39">' chama um construtor diferente — isso é polimorfismo via sobrecarga.</text:span></text:p>
          </draw:text-box>
        </draw:frame>
        <presentation:notes draw:style-name="dp2">
          <draw:page-thumbnail draw:name="Slide Image Placeholder 1" draw:style-name="gr8" draw:layer="layout" svg:width="15.239cm" svg:height="8.572cm" svg:x="1.905cm" svg:y="3.175cm" draw:page-number="25" presentation:class="page"/>
          <draw:frame draw:name="Notes Placeholder 2" presentation:style-name="pr2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6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E4775A66.png" xlink:type="simple" xlink:show="embed" xlink:actuate="onLoad" draw:mime-type="image/png">
            <text:p/>
          </draw:image>
          <svg:desc>preencoded.png</svg:desc>
        </draw:frame>
        <draw:custom-shape draw:name="Text 2" draw:style-name="gr130" draw:text-style-name="P4" draw:layer="layout" svg:width="18.287cm" svg:height="1.777cm" svg:x="5.08cm" svg:y="4.064cm">
          <text:p text:style-name="P3"><text:span text:style-name="T13">5.5 Superclasse e Subclas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1" draw:text-style-name="P4" draw:layer="layout" svg:width="18.287cm" svg:height="1.523cm" svg:x="5.08cm" svg:y="6.096cm">
          <text:p text:style-name="P3"><text:span text:style-name="T15">Herança em Java com a palavra-chave exten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32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3" draw:text-style-name="P12" draw:layer="layout" svg:width="2.539cm" svg:height="1.079cm" svg:x="21.59cm" svg:y="13.208cm">
          <text:p text:style-name="P11"><text:span text:style-name="T12">26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6" presentation:class="page"/>
          <draw:frame draw:name="Notes Placeholder 2" presentation:style-name="pr2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7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4" draw:text-style-name="P4" draw:layer="layout" svg:width="22.351cm" svg:height="2.031cm" svg:x="1.524cm" svg:y="0.127cm">
          <text:p text:style-name="P3"><text:span text:style-name="T16">Herança em Java: exten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5" draw:text-style-name="P18" draw:layer="layout" svg:width="21.335cm" svg:height="9.651cm" svg:x="2.032cm" svg:y="2.448cm">
          <text:list text:style-name="L10">
            <text:list-item>
              <text:p text:style-name="P17"><text:span text:style-name="T18">Para criar uma subclasse, usa-se a palavra-chave '</text:span><text:span text:style-name="T20">extends</text:span><text:span text:style-name="T18">' na declaração;</text:span></text:p>
            </text:list-item>
            <text:list-item>
              <text:p text:style-name="P17"><text:span text:style-name="T18">Exemplo: </text:span><text:span text:style-name="T20">public class Cachorro extends Animal { }</text:span><text:span text:style-name="T18"> → </text:span><text:span text:style-name="T23">Cachorro</text:span><text:span text:style-name="T18"> herda tudo de </text:span><text:span text:style-name="T23">Animal</text:span><text:span text:style-name="T18">;</text:span></text:p>
            </text:list-item>
            <text:list-item>
              <text:p text:style-name="P17"><text:span text:style-name="T18">A superclasse </text:span><text:span text:style-name="T23">Animal</text:span><text:span text:style-name="T18"> tem atributos genéricos: especie, tamanho, cor (</text:span><text:span text:style-name="T36">protected</text:span><text:span text:style-name="T18">);</text:span></text:p>
            </text:list-item>
            <text:list-item>
              <text:p text:style-name="P17"><text:span text:style-name="T18">A subclasse </text:span><text:span text:style-name="T23">Cachorro</text:span><text:span text:style-name="T18"> herda tudo e pode adicionar atributos próprios (ex.: </text:span><text:span text:style-name="T20">raca</text:span><text:span text:style-name="T18">, </text:span><text:span text:style-name="T20">adestrado</text:span><text:span text:style-name="T18">);</text:span></text:p>
            </text:list-item>
            <text:list-item>
              <text:p text:style-name="P17"><text:span text:style-name="T18">Modificador </text:span><text:span text:style-name="T36">protected</text:span><text:span text:style-name="T18"> nos atributos da superclasse permite acesso pelas subclasses;</text:span></text:p>
            </text:list-item>
            <text:list-item>
              <text:p text:style-name="P17"><text:span text:style-name="T18">Resultado: reaproveitamento de código + organização hierárquic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36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7" draw:text-style-name="P12" draw:layer="layout" svg:width="2.539cm" svg:height="1.079cm" svg:x="21.59cm" svg:y="13.208cm">
          <text:p text:style-name="P11"><text:span text:style-name="T12">27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7" presentation:class="page"/>
          <draw:frame draw:name="Notes Placeholder 2" presentation:style-name="pr2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8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8" draw:text-style-name="P4" draw:layer="layout" svg:width="22.351cm" svg:height="1.777cm" svg:x="1.524cm" svg:y="0.762cm">
          <text:p text:style-name="P3"><text:span text:style-name="T21">Dinâmica 5 — Herança Completa em </text:span><text:span text:style-name="T44">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9" draw:text-style-name="P19" draw:layer="layout" svg:width="22.351cm" svg:height="10.452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40" draw:text-style-name="P1" draw:layer="layout" svg:width="0.151cm" svg:height="10.452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1" draw:text-style-name="P16" draw:layer="layout" svg:width="20.319cm" svg:height="8.127cm" svg:x="2.54cm" svg:y="2.656cm">
          <text:list text:style-name="L10">
            <text:list-item>
              <text:p text:style-name="P15"><text:span text:style-name="T18">Em duplas, criem uma hierarquia de herança em </text:span><text:span text:style-name="T19">Java</text:span><text:span text:style-name="T18"> para um sistema de RH:</text:span></text:p>
            </text:list-item>
            <text:list-item>
              <text:p text:style-name="P15"><text:span text:style-name="T18">Superclasse '</text:span><text:span text:style-name="T23">Funcionario</text:span><text:span text:style-name="T18">': atributos </text:span><text:span text:style-name="T45">protected</text:span><text:span text:style-name="T18"> (</text:span><text:span text:style-name="T20">nome</text:span><text:span text:style-name="T18">, </text:span><text:span text:style-name="T20">cpf</text:span><text:span text:style-name="T18">, </text:span><text:span text:style-name="T20">salario</text:span><text:span text:style-name="T18">) + método </text:span><text:span text:style-name="T20">calcularBonificacao()</text:span><text:span text:style-name="T18">.</text:span></text:p>
            </text:list-item>
            <text:list-item>
              <text:p text:style-name="P15"><text:span text:style-name="T18">Subclasse '</text:span><text:span text:style-name="T23">Gerente</text:span><text:span text:style-name="T18">': </text:span><text:span text:style-name="T20">extends</text:span><text:span text:style-name="T18"> </text:span><text:span text:style-name="T23">Funcionario</text:span><text:span text:style-name="T18"> + atributo </text:span><text:span text:style-name="T20">setor</text:span><text:span text:style-name="T18"> + sobrescreve </text:span><text:span text:style-name="T20">calcularBonificacao()</text:span><text:span text:style-name="T18"> (10%).</text:span></text:p>
            </text:list-item>
            <text:list-item>
              <text:p text:style-name="P15"><text:span text:style-name="T18">Subclasse '</text:span><text:span text:style-name="T23">Estagiario</text:span><text:span text:style-name="T18">': </text:span><text:span text:style-name="T20">extends</text:span><text:span text:style-name="T18"> </text:span><text:span text:style-name="T23">Funcionario</text:span><text:span text:style-name="T18"> + atributo </text:span><text:span text:style-name="T20">faculdade</text:span><text:span text:style-name="T18"> + sobrescreve </text:span><text:span text:style-name="T20">calcularBonificacao()</text:span><text:span text:style-name="T18"> (3%).</text:span></text:p>
            </text:list-item>
            <text:list-item>
              <text:p text:style-name="P15"><text:span text:style-name="T18">Escrevam o código completo no papel ou caderno.</text:span></text:p>
            </text:list-item>
            <text:list-item>
              <text:p text:style-name="P15"><text:span text:style-name="T18">Tempo: 8 minutos. Apresentação: 2 minutos por dupl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42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3" draw:text-style-name="P12" draw:layer="layout" svg:width="2.539cm" svg:height="1.079cm" svg:x="21.59cm" svg:y="13.208cm">
          <text:p text:style-name="P11"><text:span text:style-name="T12">28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8" presentation:class="page"/>
          <draw:frame draw:name="Notes Placeholder 2" presentation:style-name="pr2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9" draw:style-name="dp1" draw:master-page-name="DEFAULT">
        <draw:custom-shape draw:name="Shape 0" draw:style-name="gr1" draw:text-style-name="P1" draw:layer="layout" svg:width="25.399cm" svg:height="0.151cm" svg:x="0cm" svg:y="-0.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4" draw:text-style-name="P4" draw:layer="layout" svg:width="22.351cm" svg:height="1.777cm" svg:x="1.524cm" svg:y="0.362cm">
          <text:p text:style-name="P3"><text:span text:style-name="T22">Exemplo de resposta — Dinâmica 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5" draw:text-style-name="P36" draw:layer="layout" svg:width="10.968cm" svg:height="9.651cm" svg:x="1.632cm" svg:y="1.848cm">
          <text:list text:style-name="L10">
            <text:list-header>
              <text:p text:style-name="P35"><text:span text:style-name="T20">public class Funcionario {</text:span></text:p>
              <text:list>
                <text:list-header>
                  <text:p text:style-name="P35"><text:span text:style-name="T20">protected String nome;</text:span></text:p>
                  <text:p text:style-name="P35"><text:span text:style-name="T20">protected float salario;</text:span></text:p>
                  <text:p text:style-name="P35"><text:span text:style-name="T46"/></text:p>
                  <text:p text:style-name="P35"><text:span text:style-name="T20">public float calcularBonificacao() {</text:span></text:p>
                  <text:list>
                    <text:list-header>
                      <text:p text:style-name="P35"><text:span text:style-name="T20">return salario * 0.05f;</text:span></text:p>
                    </text:list-header>
                  </text:list>
                  <text:p text:style-name="P35"><text:span text:style-name="T20">}</text:span></text:p>
                </text:list-header>
              </text:list>
              <text:p text:style-name="P35"><text:span text:style-name="T20">}</text:span></text:p>
            </text:list-header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2.8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46" draw:text-style-name="P4" draw:layer="layout" svg:width="15.239cm" svg:height="1.079cm" svg:x="1.27cm" svg:y="13.208cm">
          <text:p text:style-name="P3"><text:span text:style-name="T12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7" draw:text-style-name="P12" draw:layer="layout" svg:width="2.539cm" svg:height="1.079cm" svg:x="21.59cm" svg:y="13.208cm">
          <text:p text:style-name="P11"><text:span text:style-name="T12">29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8" draw:text-style-name="P33" draw:layer="layout" svg:width="12cm" svg:height="9.156cm" svg:x="12.1cm" svg:y="1.8cm">
          <draw:text-box>
            <text:list text:style-name="L1">
              <text:list-header>
                <text:p text:style-name="P32"><text:span text:style-name="T42">public class Gerente extends Funcionario {</text:span></text:p>
                <text:list>
                  <text:list-header>
                    <text:p text:style-name="P32"><text:span text:style-name="T42">private String setor;</text:span></text:p>
                    <text:p text:style-name="P32"><text:span text:style-name="T42">public float calcularBonificacao() {</text:span></text:p>
                    <text:list>
                      <text:list-header>
                        <text:p text:style-name="P32"><text:span text:style-name="T42">return salario * 0.10f;</text:span></text:p>
                      </text:list-header>
                    </text:list>
                    <text:p text:style-name="P32"><text:span text:style-name="T42">}</text:span></text:p>
                  </text:list-header>
                </text:list>
                <text:p text:style-name="P32"><text:span text:style-name="T42">}</text:span></text:p>
                <text:p text:style-name="P32"><text:span text:style-name="T42">public class Estagiario extends Funcionario {</text:span></text:p>
                <text:list>
                  <text:list-header>
                    <text:p text:style-name="P32"><text:span text:style-name="T42">private String faculdade;</text:span></text:p>
                    <text:p text:style-name="P32"><text:span text:style-name="T42">public float calcularBonificacao() {</text:span></text:p>
                    <text:list>
                      <text:list-header>
                        <text:p text:style-name="P32"><text:span text:style-name="T42">return salario * 0.03f;</text:span></text:p>
                      </text:list-header>
                    </text:list>
                    <text:p text:style-name="P32"><text:span text:style-name="T42">}</text:span></text:p>
                  </text:list-header>
                </text:list>
                <text:p text:style-name="P32"><text:span text:style-name="T42">}</text:span></text:p>
              </text:list-header>
            </text:list>
          </draw:text-box>
        </draw:frame>
        <draw:frame draw:style-name="gr149" draw:text-style-name="P38" draw:layer="layout" svg:width="24cm" svg:height="3.32cm" svg:x="1cm" svg:y="10.28cm">
          <draw:text-box>
            <text:list text:style-name="L1">
              <text:list-item>
                <text:p text:style-name="P37"><text:span text:style-name="T39">Aqui temos herança (</text:span><text:span text:style-name="T42">extends</text:span><text:span text:style-name="T39">) + polimorfismo (mesmo método, comportamento diferente) + </text:span><text:span text:style-name="T39">encapsulamento (</text:span><text:span text:style-name="T42">private</text:span><text:span text:style-name="T39">/</text:span><text:span text:style-name="T42">protected</text:span><text:span text:style-name="T39">).</text:span></text:p>
              </text:list-item>
              <text:list-item>
                <text:p text:style-name="P37"><text:span text:style-name="T39">Os 4 princípios da OO trabalhando juntos na prática!</text:span></text:p>
              </text:list-item>
            </text:list>
          </draw:text-box>
        </draw:frame>
        <presentation:notes draw:style-name="dp2">
          <draw:page-thumbnail draw:name="Slide Image Placeholder 1" draw:style-name="gr8" draw:layer="layout" svg:width="15.239cm" svg:height="8.572cm" svg:x="1.905cm" svg:y="3.175cm" draw:page-number="29" presentation:class="page"/>
          <draw:frame draw:name="Notes Placeholder 2" presentation:style-name="pr3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30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9" draw:text-style-name="P19" draw:layer="layout" svg:width="21.335cm" svg:height="3.301cm" svg:x="2.032cm" svg:y="1.0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0.151cm" svg:height="3.301cm" svg:x="2.032cm" svg:y="1.0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0" draw:text-style-name="P40" draw:layer="layout" svg:width="19.557cm" svg:height="2.793cm" svg:x="3.048cm" svg:y="1.27cm">
          <text:p text:style-name="P39"><text:span text:style-name="T47">"Java une desempenho e portabilidade graças à JVM: escreva uma vez, rode em qualquer lugar.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1" draw:text-style-name="P4" draw:layer="layout" svg:width="21.335cm" svg:height="1.269cm" svg:x="2.032cm" svg:y="4.08cm">
          <text:p text:style-name="P3"><text:span text:style-name="T48">Pontos-chave da aul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2" draw:text-style-name="P42" draw:layer="layout" svg:width="21.968cm" svg:height="5.587cm" svg:x="2.032cm" svg:y="5.104cm">
          <text:list text:style-name="L10">
            <text:list-item>
              <text:p text:style-name="P41"><text:span text:style-name="T19">Java</text:span><text:span text:style-name="T18">: sintaxe baseada em </text:span><text:span text:style-name="T19">C</text:span><text:span text:style-name="T18">, modelo híbrido compilado+interpretado via </text:span><text:span text:style-name="T19">JVM</text:span><text:span text:style-name="T18">;</text:span></text:p>
            </text:list-item>
            <text:list-item>
              <text:p text:style-name="P41"><text:span text:style-name="T18">Classes com letra maiúscula, escopo em </text:span><text:span text:style-name="T20">{ }</text:span><text:span text:style-name="T18">, método main como ponto de entrada.</text:span></text:p>
            </text:list-item>
            <text:list-item>
              <text:p text:style-name="P41"><text:span text:style-name="T18">Métodos </text:span><text:span text:style-name="T20">void</text:span><text:span text:style-name="T18"> (sem retorno) </text:span><text:span text:style-name="T49">vs</text:span><text:span text:style-name="T18">. métodos com retorno (</text:span><text:span text:style-name="T20">int</text:span><text:span text:style-name="T18">, </text:span><text:span text:style-name="T20">String</text:span><text:span text:style-name="T18">, </text:span><text:span text:style-name="T20">boolean...</text:span><text:span text:style-name="T18">).</text:span></text:p>
            </text:list-item>
            <text:list-item>
              <text:p text:style-name="P41"><text:span text:style-name="T18">Modificadores: </text:span><text:span text:style-name="T45">public</text:span><text:span text:style-name="T18">, </text:span><text:span text:style-name="T45">private</text:span><text:span text:style-name="T18">, </text:span><text:span text:style-name="T45">protected</text:span><text:span text:style-name="T18">, </text:span><text:span text:style-name="T19">default</text:span><text:span text:style-name="T18"> — encapsulamento na prática.</text:span></text:p>
            </text:list-item>
            <text:list-item>
              <text:p text:style-name="P41"><text:span text:style-name="T18">Construtores múltiplos = polimorfismo. </text:span><text:span text:style-name="T20">extends</text:span><text:span text:style-name="T18"> = herança entre classe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" draw:text-style-name="P5" draw:layer="layout" svg:width="25.399cm" svg:height="1.587cm" svg:x="0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53" draw:text-style-name="P4" draw:layer="layout" svg:width="12.699cm" svg:height="1.587cm" svg:x="2.032cm" svg:y="12.7cm">
          <text:p text:style-name="P3"><text:span text:style-name="T50">Obrigado! Até a próxima aul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4" draw:text-style-name="P12" draw:layer="layout" svg:width="10.159cm" svg:height="1.587cm" svg:x="13.97cm" svg:y="12.7cm">
          <text:p text:style-name="P11"><text:span text:style-name="T51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0" presentation:class="page"/>
          <draw:frame draw:name="Notes Placeholder 2" presentation:style-name="pr3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libri3" svg:font-family="Calibri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lwg Mono" svg:font-family="'Tlwg Mono'" style:font-pitch="fixed"/>
    <style:font-face style:name="Ubuntu Sans Mono" svg:font-family="'Ubuntu Sans Mono'" style:font-family-generic="swiss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O — Aula 5</dc:title>
    <dc:subject>PptxGenJS Presentation</dc:subject>
    <meta:initial-creator>UNISA</meta:initial-creator>
    <meta:editing-cycles>13</meta:editing-cycles>
    <meta:creation-date>2026-03-14T05:50:03</meta:creation-date>
    <dc:date>2026-05-14T03:52:47.616389968</dc:date>
    <meta:editing-duration>PT34M17S</meta:editing-duration>
    <meta:generator>LibreOffice/25.8.1.1$Linux_X86_64 LibreOffice_project/54047653041915e595ad4e45cccea684809c77b5</meta:generator>
    <meta:document-statistic meta:object-count="359"/>
    <meta:user-defined meta:name="AppVersion">16.0000</meta:user-defined>
    <meta:user-defined meta:name="Company">PptxGenJS</meta:user-defined>
    <meta:user-defined meta:name="Notes" meta:value-type="float">30</meta:user-defined>
    <meta:user-defined meta:name="PresentationFormat">On-screen Show (16:9)</meta:user-defined>
    <meta:user-defined meta:name="Slides" meta:value-type="float">30</meta:user-defined>
  </office:meta>
</office:document-meta>
</file>