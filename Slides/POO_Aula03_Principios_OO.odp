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E4775A66.png" manifest:media-type="image/png"/>
  <manifest:file-entry manifest:full-path="Pictures/100000010000010000000100D70A47D9.png" manifest:media-type="image/png"/>
  <manifest:file-entry manifest:full-path="Pictures/10000001000001000000010043943CB8.png" manifest:media-type="image/png"/>
  <manifest:file-entry manifest:full-path="Pictures/100000010000010000000100296E7B25.png" manifest:media-type="image/png"/>
  <manifest:file-entry manifest:full-path="Pictures/100000010000010000000100CC359D3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M Mono Prop 10" svg:font-family="'LM Mono Prop 10'" style:font-pitch="variable"/>
    <style:font-face style:name="LM Roman Unslanted 10" svg:font-family="'LM Roman Unslanted 10'" style:font-pitch="variable"/>
    <style:font-face style:name="LM Sans Quot 8" svg:font-family="'LM Sans Quot 8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 Sans Mono" svg:font-family="'Ubuntu Sans Mono'" style:font-family-generic="swiss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f1b2d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2ec4b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solid" draw:fill-color="#d4a84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1a294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width="0cm" draw:fill="solid" draw:fill-color="#243652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cm" draw:fill="solid" draw:fill-color="#162236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20%" loext:shadow-blur="0.141cm" loext:decorative="false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402cm" fo:min-width="21.4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7.878cm" fo:min-width="21.8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942cm" fo:min-width="21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402cm" fo:min-width="22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7.878cm" fo:min-width="21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7.878cm" fo:min-width="20.26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2ec4b6"/>
      <style:paragraph-properties fo:text-align="start"/>
      <style:text-properties fo:font-size="18pt"/>
    </style:style>
    <style:style style:name="P2" style:family="paragraph">
      <loext:graphic-properties draw:fill="solid" draw:fill-color="#d4a843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solid" draw:fill-color="#1a2940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solid" draw:fill-color="#243652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solid" draw:fill-color="#162236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Sans Quot 8"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Sans Quot 8" fo:font-size="18pt" fo:hyphenate="false"/>
    </style:style>
    <style:style style:name="P18" style:family="paragraph">
      <style:paragraph-properties fo:margin-left="0cm" fo:margin-right="0cm" fo:margin-top="0cm" fo:margin-bottom="0.282cm" fo:line-height="150%" fo:text-align="justify" fo:text-indent="0cm" style:punctuation-wrap="hanging" loext:tab-stop-distance="2.54cm" style:writing-mode="lr-tb">
        <style:tab-stops/>
      </style:paragraph-properties>
      <style:text-properties style:font-name="LM Sans Quot 8"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.282cm" fo:line-height="150%" fo:text-align="justify" fo:text-indent="0cm" style:punctuation-wrap="hanging" loext:tab-stop-distance="2.54cm" style:writing-mode="lr-tb" style:font-independent-line-spacing="true">
        <style:tab-stops/>
      </style:paragraph-properties>
      <style:text-properties style:font-name="LM Sans Quot 8" fo:font-size="18pt" fo:hyphenate="false"/>
    </style:style>
    <style:style style:name="P20" style:family="paragraph">
      <style:paragraph-properties fo:margin-left="0cm" fo:margin-right="0cm" fo:margin-top="0cm" fo:margin-bottom="0.282cm" fo:line-height="150%" fo:text-align="start" fo:text-indent="0cm" style:punctuation-wrap="hanging" loext:tab-stop-distance="2.54cm" style:writing-mode="lr-tb">
        <style:tab-stops/>
      </style:paragraph-properties>
      <style:text-properties style:font-name="LM Sans Quot 8"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.282cm" fo:line-height="15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LM Sans Quot 8" fo:font-size="18pt" fo:hyphenate="false"/>
    </style:style>
    <style:style style:name="P22" style:family="paragraph">
      <style:paragraph-properties fo:margin-left="0cm" fo:margin-right="0cm" fo:margin-top="0cm" fo:margin-bottom="0.282cm" fo:line-height="150%" fo:text-align="start" fo:text-indent="0cm" style:punctuation-wrap="hanging" loext:tab-stop-distance="2.54cm" style:writing-mode="lr-tb">
        <style:tab-stops/>
      </style:paragraph-properties>
      <style:text-properties style:font-name="LM Sans Quot 8" fo:font-size="14pt" style:font-size-asian="14pt" style:font-size-complex="14pt" fo:hyphenate="false"/>
    </style:style>
    <style:style style:name="P23" style:family="paragraph">
      <loext:graphic-properties draw:fill="none"/>
      <style:paragraph-properties fo:margin-left="0cm" fo:margin-right="0cm" fo:margin-top="0cm" fo:margin-bottom="0.282cm" fo:line-height="15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LM Sans Quot 8" fo:font-size="14pt" style:font-size-asian="14pt" style:font-size-complex="14pt" fo:hyphenate="false"/>
    </style:style>
    <style:style style:name="P24" style:family="paragraph">
      <style:paragraph-properties fo:margin-left="0cm" fo:margin-right="0cm" fo:margin-top="0cm" fo:margin-bottom="0.282cm" fo:line-height="150%" fo:text-align="justify" fo:text-indent="0cm" style:punctuation-wrap="hanging" loext:tab-stop-distance="2.54cm" style:writing-mode="lr-tb">
        <style:tab-stops/>
      </style:paragraph-properties>
      <style:text-properties style:font-name="LM Sans Quot 8" fo:font-size="14pt" style:font-size-asian="14pt" style:font-size-complex="14pt" fo:hyphenate="false"/>
    </style:style>
    <style:style style:name="P25" style:family="paragraph">
      <loext:graphic-properties draw:fill="none"/>
      <style:paragraph-properties fo:margin-left="0cm" fo:margin-right="0cm" fo:margin-top="0cm" fo:margin-bottom="0.282cm" fo:line-height="150%" fo:text-align="justify" fo:text-indent="0cm" style:punctuation-wrap="hanging" loext:tab-stop-distance="2.54cm" style:writing-mode="lr-tb" style:font-independent-line-spacing="true">
        <style:tab-stops/>
      </style:paragraph-properties>
      <style:text-properties style:font-name="LM Sans Quot 8" fo:font-size="14pt" style:font-size-asian="14pt" style:font-size-complex="14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Roman Unslanted 10"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Roman Unslanted 10" fo:font-size="18pt" fo:hyphenate="false"/>
    </style:style>
    <style:style style:name="P28" style:family="paragraph">
      <style:paragraph-properties fo:margin-left="0cm" fo:margin-right="0cm" fo:margin-top="0cm" fo:margin-bottom="0.212cm" fo:line-height="150%" fo:text-align="justify" fo:text-indent="0cm" style:punctuation-wrap="hanging" loext:tab-stop-distance="2.54cm" style:writing-mode="lr-tb">
        <style:tab-stops/>
      </style:paragraph-properties>
      <style:text-properties style:font-name="LM Sans Quot 8"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.212cm" fo:line-height="150%" fo:text-align="justify" fo:text-indent="0cm" style:punctuation-wrap="hanging" loext:tab-stop-distance="2.54cm" style:writing-mode="lr-tb" style:font-independent-line-spacing="true">
        <style:tab-stops/>
      </style:paragraph-properties>
      <style:text-properties style:font-name="LM Sans Quot 8"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6pt" fo:letter-spacing="normal" fo:language="en" fo:country="US" fo:font-style="normal" style:text-underline-style="none" fo:font-weight="bold" fo:background-color="transparent" style:font-name-asian="Georgia1" style:font-size-asian="36pt" style:font-style-asian="normal" style:font-weight-asian="bold" style:font-name-complex="Georgia" style:font-size-complex="36pt" style:font-style-complex="normal" style:font-weight-complex="bold"/>
    </style:style>
    <style:style style:name="T2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Calibri2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3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1" style:font-size-complex="16pt" style:font-style-complex="normal" style:font-weight-complex="bold"/>
    </style:style>
    <style:style style:name="T4" style:family="text">
      <style:text-properties fo:font-variant="normal" fo:text-transform="none" fo:color="#a8b8c8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6pt" fo:letter-spacing="normal" fo:language="en" fo:country="US" fo:font-style="normal" style:text-underline-style="none" fo:font-weight="bold" fo:background-color="transparent" style:font-name-asian="Georgia1" style:font-size-asian="26pt" style:font-style-asian="normal" style:font-weight-asian="bold" style:font-name-complex="Georgia" style:font-size-complex="26pt" style:font-style-complex="normal" style:font-weight-complex="bold"/>
    </style:style>
    <style:style style:name="T7" style:family="text">
      <style:text-properties fo:font-variant="normal" fo:text-transform="none" fo:color="#0f1b2d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8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normal" fo:background-color="transparent" style:font-name-asian="Calibri2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9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name-asian="Calibri2" style:font-size-asian="15pt" style:font-style-asian="normal" style:font-weight-asian="bold" style:font-name-complex="Calibri1" style:font-size-complex="15pt" style:font-style-complex="normal" style:font-weight-complex="bold"/>
    </style:style>
    <style:style style:name="T10" style:family="text">
      <style:text-properties fo:font-variant="normal" fo:text-transform="none" fo:color="#8899aa" loext:opacity="100%" style:text-outline="false" style:text-line-through-style="none" style:text-line-through-type="none" style:text-position="0% 100%" style:font-name="Calibri1" fo:font-size="8pt" fo:letter-spacing="normal" fo:language="en" fo:country="US" fo:font-style="normal" style:text-underline-style="none" fo:font-weight="normal" fo:background-color="transparent" style:font-name-asian="Calibri2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2pt" fo:letter-spacing="normal" fo:language="en" fo:country="US" fo:font-style="normal" style:text-underline-style="none" fo:font-weight="bold" fo:background-color="transparent" style:font-name-asian="Georgia1" style:font-size-asian="32pt" style:font-style-asian="normal" style:font-weight-asian="bold" style:font-name-complex="Georgia" style:font-size-complex="32pt" style:font-style-complex="normal" style:font-weight-complex="bold"/>
    </style:style>
    <style:style style:name="T12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Calibri1" fo:font-size="16pt" fo:letter-spacing="normal" fo:language="en" fo:country="US" fo:font-style="italic" style:text-underline-style="none" fo:font-weight="normal" fo:background-color="transparent" style:font-name-asian="Calibri2" style:font-size-asian="16pt" style:font-style-asian="italic" style:font-weight-asian="normal" style:font-name-complex="Calibri1" style:font-size-complex="16pt" style:font-style-complex="italic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2pt" fo:letter-spacing="normal" fo:language="en" fo:country="US" fo:font-style="normal" style:text-underline-style="none" fo:font-weight="bold" fo:background-color="transparent" style:font-name-asian="Georgia1" style:font-size-asian="22pt" style:font-style-asian="normal" style:font-weight-asian="bold" style:font-name-complex="Georgia" style:font-size-complex="22pt" style:font-style-complex="normal" style:font-weight-complex="bold"/>
    </style:style>
    <style:style style:name="T14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bold" fo:background-color="transparent" style:font-name-asian="Georgia1" style:font-size-asian="16pt" style:font-style-asian="normal" style:font-weight-asian="bold" style:font-name-complex="Georgia" style:font-size-complex="16pt" style:font-style-complex="normal" style:font-weight-complex="bold"/>
    </style:style>
    <style:style style:name="T15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6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bold" fo:background-color="transparent" style:font-name-asian="Georgia1" style:font-size-asian="16pt" style:font-style-asian="normal" style:font-weight-asian="bold" style:font-name-complex="Georgia" style:font-size-complex="16pt" style:font-style-complex="normal" style:font-weight-complex="bold"/>
    </style:style>
    <style:style style:name="T17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18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Georgia" fo:font-size="24pt" fo:letter-spacing="normal" fo:language="en" fo:country="US" fo:font-style="normal" style:text-underline-style="none" fo:font-weight="bold" fo:background-color="transparent" style:font-name-asian="Georgia1" style:font-size-asian="24pt" style:font-style-asian="normal" style:font-weight-asian="bold" style:font-name-complex="Georgia" style:font-size-complex="24pt" style:font-style-complex="normal" style:font-weight-complex="bold"/>
    </style:style>
    <style:style style:name="T19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Georgia" fo:font-size="24pt" fo:letter-spacing="normal" fo:language="en" fo:country="US" fo:font-style="normal" style:text-underline-style="none" fo:font-weight="bold" fo:background-color="transparent" style:font-name-asian="Georgia1" style:font-size-asian="24pt" style:font-style-asian="normal" style:font-weight-asian="bold" style:font-name-complex="Georgia" style:font-size-complex="24pt" style:font-style-complex="normal" style:font-weight-complex="bold"/>
    </style:style>
    <style:style style:name="T20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Ubuntu Sans Mono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1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MathJax_Typewriter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2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Mono Prop 10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3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italic" style:text-underline-style="none" fo:font-weight="normal" fo:background-color="transparent" style:font-name-asian="Calibri2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Roman Unslanted 10" fo:font-size="22pt" fo:letter-spacing="normal" fo:language="en" fo:country="US" fo:font-style="italic" style:text-underline-style="none" fo:font-weight="bold" fo:background-color="transparent" style:font-name-asian="Georgia1" style:font-size-asian="22pt" style:font-style-asian="italic" style:font-weight-asian="bold" style:font-name-complex="Georgia" style:font-size-complex="22pt" style:font-style-complex="italic" style:font-weight-complex="bold"/>
    </style:style>
    <style:style style:name="T25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italic" style:text-underline-style="none" fo:font-weight="bold" fo:background-color="transparent" style:font-name-asian="Calibri2" style:font-size-asian="14pt" style:font-style-asian="italic" style:font-weight-asian="bold" style:font-name-complex="Calibri1" style:font-size-complex="14pt" style:font-style-complex="italic" style:font-weight-complex="bold"/>
    </style:style>
    <style:style style:name="T26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Roman Unslanted 10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27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Roman Unslanted 10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8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LM Roman Unslanted 10" fo:font-size="14pt" fo:letter-spacing="normal" fo:language="en" fo:country="US" fo:font-style="italic" style:text-underline-style="none" fo:font-weight="normal" fo:background-color="transparent" style:font-name-asian="Georgia1" style:font-size-asian="14pt" style:font-style-asian="italic" style:font-weight-asian="normal" style:font-name-complex="Georgia" style:font-size-complex="14pt" style:font-style-complex="italic" style:font-weight-complex="normal"/>
    </style:style>
    <style:style style:name="T29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Georgia" fo:font-size="20pt" fo:letter-spacing="normal" fo:language="en" fo:country="US" fo:font-style="normal" style:text-underline-style="none" fo:font-weight="bold" fo:background-color="transparent" style:font-name-asian="Georgia1" style:font-size-asian="20pt" style:font-style-asian="normal" style:font-weight-asian="bold" style:font-name-complex="Georgia" style:font-size-complex="20pt" style:font-style-complex="normal" style:font-weight-complex="bold"/>
    </style:style>
    <style:style style:name="T30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31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1" style:font-size-complex="12pt" style:font-style-complex="normal" style:font-weight-complex="bold"/>
    </style:style>
    <style:style style:name="T32" style:family="text">
      <style:text-properties fo:font-variant="normal" fo:text-transform="none" fo:color="#8899aa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1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ec4b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d4a8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a8b8c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f1b2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bd5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8899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fo:font-family="OpenSymbol" fo:color="#cbd5e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Shape 0" draw:style-name="gr1" draw:text-style-name="P1" draw:layer="layout" svg:width="0.304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25.399cm" svg:height="0.101cm" svg:x="0cm" svg:y="9.65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" draw:text-style-name="P4" draw:layer="layout" svg:width="21.589cm" svg:height="2.539cm" svg:x="2.032cm" svg:y="2.54cm">
          <text:p text:style-name="P3"><text:span text:style-name="T1">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" draw:text-style-name="P4" draw:layer="layout" svg:width="21.589cm" svg:height="1.523cm" svg:x="2.032cm" svg:y="5.334cm">
          <text:p text:style-name="P3"><text:span text:style-name="T2">Capítulo 3 — Os 4 Princípios da Orientação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" draw:text-style-name="P4" draw:layer="layout" svg:width="21.589cm" svg:height="1.269cm" svg:x="2.032cm" svg:y="7.239cm">
          <text:p text:style-name="P3"><text:span text:style-name="T3">Aula 0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587cm" svg:x="0cm" svg:y="12.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4" draw:layer="layout" svg:width="21.589cm" svg:height="1.587cm" svg:x="2.032cm" svg:y="12.7cm">
          <text:p text:style-name="P3"><text:span text:style-name="T4">Universidade Santa Amaro — UNIS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" presentation:class="page"/>
          <draw:frame draw:name="Notes Placeholder 2" presentation:style-name="pr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" draw:text-style-name="P4" draw:layer="layout" svg:width="22.351cm" svg:height="2.031cm" svg:x="1.524cm" svg:y="0.127cm">
          <text:p text:style-name="P3"><text:span text:style-name="T6">O que veremos hoje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1.066cm" svg:height="1.066cm" svg:x="2.032cm" svg:y="3.04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10" draw:text-style-name="P10" draw:layer="layout" svg:width="1.066cm" svg:height="1.066cm" svg:x="2.032cm" svg:y="3.048cm">
          <text:p text:style-name="P9"><text:span text:style-name="T7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" draw:text-style-name="P4" draw:layer="layout" svg:width="19.811cm" svg:height="1.066cm" svg:x="3.683cm" svg:y="3.048cm">
          <text:p text:style-name="P3"><text:span text:style-name="T8">Os 4 princípios fundamentais da O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1.066cm" svg:height="1.066cm" svg:x="2.032cm" svg:y="4.62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7" draw:style-name="gr12" draw:text-style-name="P10" draw:layer="layout" svg:width="1.066cm" svg:height="1.066cm" svg:x="2.032cm" svg:y="4.623cm">
          <text:p text:style-name="P9"><text:span text:style-name="T7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" draw:text-style-name="P4" draw:layer="layout" svg:width="19.811cm" svg:height="1.066cm" svg:x="3.683cm" svg:y="4.623cm">
          <text:p text:style-name="P3"><text:span text:style-name="T8">Abstração: do mundo real ao comput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1.066cm" svg:height="1.066cm" svg:x="2.032cm" svg:y="6.19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4" draw:text-style-name="P10" draw:layer="layout" svg:width="1.066cm" svg:height="1.066cm" svg:x="2.032cm" svg:y="6.198cm">
          <text:p text:style-name="P9"><text:span text:style-name="T7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5" draw:text-style-name="P4" draw:layer="layout" svg:width="19.811cm" svg:height="1.066cm" svg:x="3.683cm" svg:y="6.198cm">
          <text:p text:style-name="P3"><text:span text:style-name="T8">Encapsulamento: segurança e sigil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1.066cm" svg:height="1.066cm" svg:x="2.032cm" svg:y="7.77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" draw:style-name="gr16" draw:text-style-name="P10" draw:layer="layout" svg:width="1.066cm" svg:height="1.066cm" svg:x="2.032cm" svg:y="7.772cm">
          <text:p text:style-name="P9"><text:span text:style-name="T7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7" draw:text-style-name="P4" draw:layer="layout" svg:width="19.811cm" svg:height="1.066cm" svg:x="3.683cm" svg:y="7.772cm">
          <text:p text:style-name="P3"><text:span text:style-name="T8">Herança: reutilização e produtividad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" draw:text-style-name="P1" draw:layer="layout" svg:width="1.066cm" svg:height="1.066cm" svg:x="2.032cm" svg:y="9.347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6" draw:style-name="gr18" draw:text-style-name="P10" draw:layer="layout" svg:width="1.066cm" svg:height="1.066cm" svg:x="2.032cm" svg:y="9.347cm">
          <text:p text:style-name="P9"><text:span text:style-name="T7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9" draw:text-style-name="P4" draw:layer="layout" svg:width="19.811cm" svg:height="1.066cm" svg:x="3.683cm" svg:y="9.347cm">
          <text:p text:style-name="P3"><text:span text:style-name="T8">Polimorfismo: várias formas, mesmo méto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" draw:text-style-name="P2" draw:layer="layout" svg:width="1.066cm" svg:height="1.066cm" svg:x="2.032cm" svg:y="10.92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20" draw:text-style-name="P10" draw:layer="layout" svg:width="1.066cm" svg:height="1.066cm" svg:x="2.032cm" svg:y="10.922cm">
          <text:p text:style-name="P9"><text:span text:style-name="T7">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1" draw:text-style-name="P4" draw:layer="layout" svg:width="19.811cm" svg:height="1.066cm" svg:x="3.683cm" svg:y="10.922cm">
          <text:p text:style-name="P3"><text:span text:style-name="T9">Dinâmicas &amp; Atividades prátic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22" draw:style-name="gr22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23" draw:text-style-name="P12" draw:layer="layout" svg:width="2.539cm" svg:height="1.079cm" svg:x="21.59cm" svg:y="13.208cm">
          <text:p text:style-name="P11"><text:span text:style-name="T10">2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" presentation:class="page"/>
          <draw:frame draw:name="Notes Placeholder 2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3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CC359D3E.png" xlink:type="simple" xlink:show="embed" xlink:actuate="onLoad" draw:mime-type="image/png">
            <text:p/>
          </draw:image>
          <svg:desc>preencoded.png</svg:desc>
        </draw:frame>
        <draw:custom-shape draw:name="Text 2" draw:style-name="gr26" draw:text-style-name="P4" draw:layer="layout" svg:width="18.287cm" svg:height="1.777cm" svg:x="5.08cm" svg:y="4.064cm">
          <text:p text:style-name="P3"><text:span text:style-name="T11">3.1 Princípios da O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7" draw:text-style-name="P4" draw:layer="layout" svg:width="18.287cm" svg:height="1.523cm" svg:x="5.08cm" svg:y="6.096cm">
          <text:p text:style-name="P3"><text:span text:style-name="T12">Abstração, Encapsulamento, Herança e Polimorfism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28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9" draw:text-style-name="P12" draw:layer="layout" svg:width="2.539cm" svg:height="1.079cm" svg:x="21.59cm" svg:y="13.208cm">
          <text:p text:style-name="P11"><text:span text:style-name="T10">3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" presentation:class="page"/>
          <draw:frame draw:name="Notes Placeholder 2" presentation:style-name="pr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4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0" draw:text-style-name="P4" draw:layer="layout" svg:width="22.351cm" svg:height="2.031cm" svg:x="1.524cm" svg:y="0.127cm">
          <text:p text:style-name="P3"><text:span text:style-name="T13">Os 4 Princípios Fundamentais da O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1" draw:text-style-name="P15" draw:layer="layout" svg:width="10.921cm" svg:height="4.571cm" svg:x="1.27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0.151cm" svg:height="4.571cm" svg:x="1.27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5" draw:text-style-name="P14" draw:layer="layout" svg:width="1.015cm" svg:height="1.015cm" svg:x="1.905cm" svg:y="3.683cm">
          <draw:image xlink:href="Pictures/10000001000001000000010043943CB8.png" xlink:type="simple" xlink:show="embed" xlink:actuate="onLoad" draw:mime-type="image/png">
            <text:p/>
          </draw:image>
          <svg:desc>preencoded.png</svg:desc>
        </draw:frame>
        <draw:custom-shape draw:name="Text 5" draw:style-name="gr32" draw:text-style-name="P4" draw:layer="layout" svg:width="8.127cm" svg:height="1.142cm" svg:x="3.302cm" svg:y="3.429cm">
          <text:p text:style-name="P3"><text:span text:style-name="T14">Abstr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" draw:text-style-name="P17" draw:layer="layout" svg:width="9.651cm" svg:height="1.777cm" svg:x="1.905cm" svg:y="5.207cm">
          <text:p text:style-name="P16"><text:span text:style-name="T15">Identificar objetos, atributos e métodos relevantes do mundo re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31" draw:text-style-name="P15" draw:layer="layout" svg:width="10.921cm" svg:height="4.571cm" svg:x="13.208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" draw:text-style-name="P2" draw:layer="layout" svg:width="0.151cm" svg:height="4.571cm" svg:x="13.208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25" draw:text-style-name="P14" draw:layer="layout" svg:width="1.015cm" svg:height="1.015cm" svg:x="13.843cm" svg:y="3.683cm">
          <draw:image xlink:href="Pictures/100000010000010000000100D70A47D9.png" xlink:type="simple" xlink:show="embed" xlink:actuate="onLoad" draw:mime-type="image/png">
            <text:p/>
          </draw:image>
          <svg:desc>preencoded.png</svg:desc>
        </draw:frame>
        <draw:custom-shape draw:name="Text 9" draw:style-name="gr34" draw:text-style-name="P4" draw:layer="layout" svg:width="8.127cm" svg:height="1.142cm" svg:x="15.24cm" svg:y="3.429cm">
          <text:p text:style-name="P3"><text:span text:style-name="T16">Encapsulame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5" draw:text-style-name="P17" draw:layer="layout" svg:width="9.651cm" svg:height="1.777cm" svg:x="13.843cm" svg:y="5.207cm">
          <text:p text:style-name="P16"><text:span text:style-name="T15">Esconder detalhes internos, controlar acesso público/priva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31" draw:text-style-name="P15" draw:layer="layout" svg:width="10.921cm" svg:height="4.571cm" svg:x="1.27cm" svg:y="8.2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0.151cm" svg:height="4.571cm" svg:x="1.27cm" svg:y="8.2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25" draw:text-style-name="P14" draw:layer="layout" svg:width="1.015cm" svg:height="1.015cm" svg:x="1.905cm" svg:y="9.017cm">
          <draw:image xlink:href="Pictures/100000010000010000000100E4775A66.png" xlink:type="simple" xlink:show="embed" xlink:actuate="onLoad" draw:mime-type="image/png">
            <text:p/>
          </draw:image>
          <svg:desc>preencoded.png</svg:desc>
        </draw:frame>
        <draw:custom-shape draw:name="Text 13" draw:style-name="gr36" draw:text-style-name="P4" draw:layer="layout" svg:width="8.127cm" svg:height="1.142cm" svg:x="3.302cm" svg:y="8.763cm">
          <text:p text:style-name="P3"><text:span text:style-name="T14">Heranç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7" draw:text-style-name="P17" draw:layer="layout" svg:width="9.651cm" svg:height="1.777cm" svg:x="1.905cm" svg:y="10.541cm">
          <text:p text:style-name="P16"><text:span text:style-name="T15">Reutilizar características de classes existentes em novas clas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31" draw:text-style-name="P15" draw:layer="layout" svg:width="10.921cm" svg:height="4.571cm" svg:x="13.208cm" svg:y="8.2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2" draw:text-style-name="P2" draw:layer="layout" svg:width="0.151cm" svg:height="4.571cm" svg:x="13.208cm" svg:y="8.2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25" draw:text-style-name="P14" draw:layer="layout" svg:width="1.015cm" svg:height="1.015cm" svg:x="13.843cm" svg:y="9.017cm">
          <draw:image xlink:href="Pictures/100000010000010000000100296E7B25.png" xlink:type="simple" xlink:show="embed" xlink:actuate="onLoad" draw:mime-type="image/png">
            <text:p/>
          </draw:image>
          <svg:desc>preencoded.png</svg:desc>
        </draw:frame>
        <draw:custom-shape draw:name="Text 17" draw:style-name="gr38" draw:text-style-name="P4" draw:layer="layout" svg:width="8.127cm" svg:height="1.142cm" svg:x="15.24cm" svg:y="8.763cm">
          <text:p text:style-name="P3"><text:span text:style-name="T16">Polimorfism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9" draw:text-style-name="P17" draw:layer="layout" svg:width="9.651cm" svg:height="1.777cm" svg:x="13.843cm" svg:y="10.541cm">
          <text:p text:style-name="P16"><text:span text:style-name="T15">Mesmo método com comportamentos diferentes conforme o contex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20" draw:style-name="gr40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1" draw:text-style-name="P12" draw:layer="layout" svg:width="2.539cm" svg:height="1.079cm" svg:x="21.59cm" svg:y="13.208cm">
          <text:p text:style-name="P11"><text:span text:style-name="T10">4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4" presentation:class="page"/>
          <draw:frame draw:name="Notes Placeholder 2" presentation:style-name="pr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5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2" draw:text-style-name="P4" draw:layer="layout" svg:width="22.351cm" svg:height="2.031cm" svg:x="1.524cm" svg:y="0.127cm">
          <text:p text:style-name="P3"><text:span text:style-name="T13">Por que os 4 princípios são essenciais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3" draw:text-style-name="P19" draw:layer="layout" svg:width="21.335cm" svg:height="9.651cm" svg:x="2.032cm" svg:y="2.448cm">
          <text:list text:style-name="L10">
            <text:list-item>
              <text:p text:style-name="P18"><text:span text:style-name="T15">Um projeto que não siga os 4 princípios não é considerado 100% orientado a objetos;</text:span></text:p>
            </text:list-item>
            <text:list-item>
              <text:p text:style-name="P18"><text:span text:style-name="T15">Desde a análise do problema até as últimas linhas de código, o pensamento OO deve ser mantido;</text:span></text:p>
            </text:list-item>
            <text:list-item>
              <text:p text:style-name="P18"><text:span text:style-name="T15">Os princípios garantem segurança no código + reutilização e reaproveitamento eficiente;</text:span></text:p>
            </text:list-item>
            <text:list-item>
              <text:p text:style-name="P18"><text:span text:style-name="T15">A implementação varia entre linguagens, mas o conceito teórico é universa;</text:span></text:p>
            </text:list-item>
            <text:list-item>
              <text:p text:style-name="P18"><text:span text:style-name="T15">A linguagem deve oferecer suporte a todos os 4 para ser considerada orientada a objetos;</text:span></text:p>
            </text:list-item>
            <text:list-item>
              <text:p text:style-name="P18"><text:span text:style-name="T15">No início parece difícil, mas com prática se torna natural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44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5" draw:text-style-name="P12" draw:layer="layout" svg:width="2.539cm" svg:height="1.079cm" svg:x="21.59cm" svg:y="13.208cm">
          <text:p text:style-name="P11"><text:span text:style-name="T10">5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5" presentation:class="page"/>
          <draw:frame draw:name="Notes Placeholder 2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6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43943CB8.png" xlink:type="simple" xlink:show="embed" xlink:actuate="onLoad" draw:mime-type="image/png">
            <text:p/>
          </draw:image>
          <svg:desc>preencoded.png</svg:desc>
        </draw:frame>
        <draw:custom-shape draw:name="Text 2" draw:style-name="gr46" draw:text-style-name="P4" draw:layer="layout" svg:width="18.287cm" svg:height="1.777cm" svg:x="5.08cm" svg:y="4.064cm">
          <text:p text:style-name="P3"><text:span text:style-name="T11">3.2 Abstr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7" draw:text-style-name="P4" draw:layer="layout" svg:width="18.287cm" svg:height="1.523cm" svg:x="5.08cm" svg:y="6.096cm">
          <text:p text:style-name="P3"><text:span text:style-name="T12">Isolar objetos relevantes do mundo real para o sistem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48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9" draw:text-style-name="P12" draw:layer="layout" svg:width="2.539cm" svg:height="1.079cm" svg:x="21.59cm" svg:y="13.208cm">
          <text:p text:style-name="P11"><text:span text:style-name="T10">6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6" presentation:class="page"/>
          <draw:frame draw:name="Notes Placeholder 2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7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0" draw:text-style-name="P4" draw:layer="layout" svg:width="22.351cm" svg:height="2.031cm" svg:x="1.524cm" svg:y="0.127cm">
          <text:p text:style-name="P3"><text:span text:style-name="T13">O que é Abstração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1" draw:text-style-name="P21" draw:layer="layout" svg:width="21.968cm" svg:height="9.651cm" svg:x="2.032cm" svg:y="2.448cm">
          <text:list text:style-name="L10">
            <text:list-item>
              <text:p text:style-name="P20"><text:span text:style-name="T15">Talvez o princípio mais importante: responsável por toda a maneira de pensar ao preparar o sistema;</text:span></text:p>
            </text:list-item>
            <text:list-item>
              <text:p text:style-name="P20"><text:span text:style-name="T15">Abstração = isolar um objeto de reflexão dos fatores que normalmente lhe estão relacionados na realidade;</text:span></text:p>
            </text:list-item>
            <text:list-item>
              <text:p text:style-name="P20"><text:span text:style-name="T15">Transformar objetos do mundo real em objetos utilizáveis computacionalmente;</text:span></text:p>
            </text:list-item>
            <text:list-item>
              <text:p text:style-name="P20"><text:span text:style-name="T15">Identificar quais objetos são relevantes ao projeto e quais atributos e métodos cada um terá;</text:span></text:p>
            </text:list-item>
            <text:list-item>
              <text:p text:style-name="P20"><text:span text:style-name="T15">Nem tudo do cenário real entra no sistema — apenas o que é pertinente às regras de negócio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52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3" draw:text-style-name="P12" draw:layer="layout" svg:width="2.539cm" svg:height="1.079cm" svg:x="21.59cm" svg:y="13.208cm">
          <text:p text:style-name="P11"><text:span text:style-name="T10">7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7" presentation:class="page"/>
          <draw:frame draw:name="Notes Placeholder 2" presentation:style-name="pr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8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4" draw:text-style-name="P4" draw:layer="layout" svg:width="22.351cm" svg:height="2.031cm" svg:x="1.524cm" svg:y="0.127cm">
          <text:p text:style-name="P3"><text:span text:style-name="T13">Abstração na prática: oficina mecânic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5" draw:text-style-name="P19" draw:layer="layout" svg:width="21.335cm" svg:height="9.651cm" svg:x="2.032cm" svg:y="2.148cm">
          <text:list text:style-name="L10">
            <text:list-item>
              <text:p text:style-name="P18"><text:span text:style-name="T15">Objetos encontrados: carro, pneu, lâmpada, mesa, ferramenta, cadeira, mecânico, peças...</text:span></text:p>
            </text:list-item>
            <text:list-item>
              <text:p text:style-name="P18"><text:span text:style-name="T15">Lâmpada: irrelevante para as regras de negócio — não precisa entrar no sistema.</text:span></text:p>
            </text:list-item>
            <text:list-item>
              <text:p text:style-name="P18"><text:span text:style-name="T15">Carro: muito importante — é o objeto central do processo da oficina.</text:span></text:p>
            </text:list-item>
            <text:list-item>
              <text:p text:style-name="P18"><text:span text:style-name="T15">Pneu: depende do contexto — se a oficina faz serviço de borracharia, é relevante; se não, pode ser dispensado.</text:span></text:p>
            </text:list-item>
            <text:list-item>
              <text:p text:style-name="P18"><text:span text:style-name="T15">Caixa: objeto com ação 'fechamento de caixa' — encerra a movimentação financeira do dia.</text:span></text:p>
            </text:list-item>
            <text:list-item>
              <text:p text:style-name="P18"><text:span text:style-name="T15">A abstração define </text:span><text:span text:style-name="T17">O QUÊ</text:span><text:span text:style-name="T15"> entra no sistema e </text:span><text:span text:style-name="T17">COM QUAIS</text:span><text:span text:style-name="T15"> propriedades e ações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56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7" draw:text-style-name="P12" draw:layer="layout" svg:width="2.539cm" svg:height="1.079cm" svg:x="21.59cm" svg:y="13.208cm">
          <text:p text:style-name="P11"><text:span text:style-name="T10">8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8" presentation:class="page"/>
          <draw:frame draw:name="Notes Placeholder 2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9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8" draw:text-style-name="P4" draw:layer="layout" svg:width="22.351cm" svg:height="1.777cm" svg:x="1.524cm" svg:y="0.762cm">
          <text:p text:style-name="P3"><text:span text:style-name="T18">Dinâmica 1 — Abstraindo um Cenário Re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1" draw:text-style-name="P15" draw:layer="layout" svg:width="22.351cm" svg:height="9.143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9" draw:text-style-name="P21" draw:layer="layout" svg:width="22.325cm" svg:height="8.127cm" svg:x="1.675cm" svg:y="2.556cm">
          <text:list text:style-name="L10">
            <text:list-item>
              <text:p text:style-name="P20"><text:span text:style-name="T15">Em grupos de 3–4, vocês são analistas contratados para criar o sistema de um HOSPITAL;</text:span></text:p>
            </text:list-item>
            <text:list-item>
              <text:p text:style-name="P20"><text:span text:style-name="T15">Listem todos os objetos que vocês encontram num hospital (sem filtro, anotem tudo);</text:span></text:p>
            </text:list-item>
            <text:list-item>
              <text:p text:style-name="P20"><text:span text:style-name="T15">Agora, apliquem a abstração: quais objetos são RELEVANTES para um sistema de gestão hospitalar?</text:span></text:p>
            </text:list-item>
            <text:list-item>
              <text:p text:style-name="P20"><text:span text:style-name="T15">Para cada objeto relevante, definam: 2 atributos + 1 método;</text:span></text:p>
            </text:list-item>
            <text:list-item>
              <text:p text:style-name="P20"><text:span text:style-name="T15">Quais objetos vocês DESCARTARAM e por quê?</text:span></text:p>
            </text:list-item>
            <text:list-item>
              <text:p text:style-name="P20"><text:span text:style-name="T15">Tempo: 8 minutos. Apresentação: 2 minutos por grupo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60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1" draw:text-style-name="P12" draw:layer="layout" svg:width="2.539cm" svg:height="1.079cm" svg:x="21.59cm" svg:y="13.208cm">
          <text:p text:style-name="P11"><text:span text:style-name="T10">9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9" presentation:class="page"/>
          <draw:frame draw:name="Notes Placeholder 2" presentation:style-name="pr1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0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2" draw:text-style-name="P4" draw:layer="layout" svg:width="22.351cm" svg:height="1.777cm" svg:x="1.524cm" svg:y="0.762cm">
          <text:p text:style-name="P3"><text:span text:style-name="T19">Exemplos de resposta — Dinâmica 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3" draw:text-style-name="P23" draw:layer="layout" svg:width="21.335cm" svg:height="9.651cm" svg:x="2.032cm" svg:y="2.548cm">
          <text:list text:style-name="L10">
            <text:list-item>
              <text:p text:style-name="P22"><text:span text:style-name="T15">Objetos encontrados: </text:span><text:span text:style-name="T20">médico</text:span><text:span text:style-name="T15">, </text:span><text:span text:style-name="T20">enfermeiro</text:span><text:span text:style-name="T15">, </text:span><text:span text:style-name="T20">paciente</text:span><text:span text:style-name="T15">, </text:span><text:span text:style-name="T20">maca</text:span><text:span text:style-name="T15">, </text:span><text:span text:style-name="T20">bisturi</text:span><text:span text:style-name="T15">, </text:span><text:span text:style-name="T20">prontuário</text:span><text:span text:style-name="T15">, </text:span><text:span text:style-name="T20">cadeira</text:span><text:span text:style-name="T15">, </text:span><text:span text:style-name="T20">TV</text:span><text:span text:style-name="T15">, </text:span><text:span text:style-name="T20">receita</text:span><text:span text:style-name="T15">, </text:span><text:span text:style-name="T20">exame...</text:span></text:p>
            </text:list-item>
            <text:list-item>
              <text:p text:style-name="P22"><text:span text:style-name="T15">Relevantes: </text:span><text:span text:style-name="T20">Médico</text:span><text:span text:style-name="T15"> (</text:span><text:span text:style-name="T21">CRM</text:span><text:span text:style-name="T15">, </text:span><text:span text:style-name="T21">especialidade</text:span><text:span text:style-name="T15">) → </text:span><text:span text:style-name="T21">atenderPaciente()</text:span><text:span text:style-name="T15">; </text:span><text:span text:style-name="T20">Paciente</text:span><text:span text:style-name="T15"> (</text:span><text:span text:style-name="T22">nome</text:span><text:span text:style-name="T15">, </text:span><text:span text:style-name="T21">convênio</text:span><text:span text:style-name="T15">) → </text:span><text:span text:style-name="T21">agendarConsulta()</text:span><text:span text:style-name="T15">.</text:span></text:p>
            </text:list-item>
            <text:list-item>
              <text:p text:style-name="P22"><text:span text:style-name="T20">Prontuário</text:span><text:span text:style-name="T15"> (</text:span><text:span text:style-name="T21">data</text:span><text:span text:style-name="T15">, </text:span><text:span text:style-name="T21">diagnóstico</text:span><text:span text:style-name="T15">) → </text:span><text:span text:style-name="T21">registrarEvolução()</text:span><text:span text:style-name="T15">; </text:span><text:span text:style-name="T20">Exame</text:span><text:span text:style-name="T15"> (</text:span><text:span text:style-name="T21">tipo</text:span><text:span text:style-name="T15">, </text:span><text:span text:style-name="T21">resultado</text:span><text:span text:style-name="T15">) → </text:span><text:span text:style-name="T21">emitirLaudo()</text:span><text:span text:style-name="T15">.</text:span></text:p>
            </text:list-item>
            <text:list-item>
              <text:p text:style-name="P22"><text:span text:style-name="T15">Descartados: </text:span><text:span text:style-name="T20">cadeira</text:span><text:span text:style-name="T15">, </text:span><text:span text:style-name="T20">TV</text:span><text:span text:style-name="T15">, </text:span><text:span text:style-name="T20">bisturi</text:span><text:span text:style-name="T15"> — existem no hospital mas não fazem parte das regras de negócio do sistema.</text:span></text:p>
            </text:list-item>
            <text:list-item>
              <text:p text:style-name="P22"><text:span text:style-name="T15">Chave: a abstração filtra o que é relevante e ignora o que não impacta os processos do </text:span><text:span text:style-name="T23">software</text:span><text:span text:style-name="T15">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64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5" draw:text-style-name="P12" draw:layer="layout" svg:width="2.539cm" svg:height="1.079cm" svg:x="21.59cm" svg:y="13.208cm">
          <text:p text:style-name="P11"><text:span text:style-name="T10">10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0" presentation:class="page"/>
          <draw:frame draw:name="Notes Placeholder 2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1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D70A47D9.png" xlink:type="simple" xlink:show="embed" xlink:actuate="onLoad" draw:mime-type="image/png">
            <text:p/>
          </draw:image>
          <svg:desc>preencoded.png</svg:desc>
        </draw:frame>
        <draw:custom-shape draw:name="Text 2" draw:style-name="gr66" draw:text-style-name="P4" draw:layer="layout" svg:width="18.287cm" svg:height="1.777cm" svg:x="5.08cm" svg:y="4.064cm">
          <text:p text:style-name="P3"><text:span text:style-name="T11">3.3 Encapsulame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7" draw:text-style-name="P4" draw:layer="layout" svg:width="18.287cm" svg:height="1.523cm" svg:x="5.08cm" svg:y="6.096cm">
          <text:p text:style-name="P3"><text:span text:style-name="T12">Esconder detalhes internos e proteger o códig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68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9" draw:text-style-name="P12" draw:layer="layout" svg:width="2.539cm" svg:height="1.079cm" svg:x="21.59cm" svg:y="13.208cm">
          <text:p text:style-name="P11"><text:span text:style-name="T10">11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1" presentation:class="page"/>
          <draw:frame draw:name="Notes Placeholder 2" presentation:style-name="pr1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2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0" draw:text-style-name="P4" draw:layer="layout" svg:width="22.351cm" svg:height="2.031cm" svg:x="1.524cm" svg:y="0.127cm">
          <text:p text:style-name="P3"><text:span text:style-name="T13">O que é Encapsulamento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1" draw:text-style-name="P19" draw:layer="layout" svg:width="21.335cm" svg:height="9.651cm" svg:x="2.032cm" svg:y="3.048cm">
          <text:list text:style-name="L10">
            <text:list-item>
              <text:p text:style-name="P18"><text:span text:style-name="T15">Principal conceito para segmentação e segurança do código fonte;</text:span></text:p>
            </text:list-item>
            <text:list-item>
              <text:p text:style-name="P18"><text:span text:style-name="T15">Consiste em esconder detalhes internos de métodos e atributos que não devem ser compartilhados;</text:span></text:p>
            </text:list-item>
            <text:list-item>
              <text:p text:style-name="P18"><text:span text:style-name="T15">Evita que um método chame outro indevidamente ou que classes externas alterem dados sensíveis;</text:span></text:p>
            </text:list-item>
            <text:list-item>
              <text:p text:style-name="P18"><text:span text:style-name="T15">Permite profissionais especializados apenas em suas classes, sem ver o sistema inteiro;</text:span></text:p>
            </text:list-item>
            <text:list-item>
              <text:p text:style-name="P18"><text:span text:style-name="T15">Mantém informações e procedimentos da empresa com maior sigilo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72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3" draw:text-style-name="P12" draw:layer="layout" svg:width="2.539cm" svg:height="1.079cm" svg:x="21.59cm" svg:y="13.208cm">
          <text:p text:style-name="P11"><text:span text:style-name="T10">12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2" presentation:class="page"/>
          <draw:frame draw:name="Notes Placeholder 2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3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4" draw:text-style-name="P4" draw:layer="layout" svg:width="22.351cm" svg:height="2.031cm" svg:x="1.524cm" svg:y="0.127cm">
          <text:p text:style-name="P3"><text:span text:style-name="T13">Público </text:span><text:span text:style-name="T24">vs</text:span><text:span text:style-name="T13">. Priva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5" draw:text-style-name="P19" draw:layer="layout" svg:width="21.335cm" svg:height="9.651cm" svg:x="2.032cm" svg:y="3.048cm">
          <text:list text:style-name="L10">
            <text:list-item>
              <text:p text:style-name="P18"><text:span text:style-name="T15">Público: métodos e atributos acessíveis a partir de outras classes — tudo que precisa ser compartilhado;</text:span></text:p>
            </text:list-item>
            <text:list-item>
              <text:p text:style-name="P18"><text:span text:style-name="T15">Privado: métodos e atributos que trabalham somente em procedimentos internos da classe;</text:span></text:p>
            </text:list-item>
            <text:list-item>
              <text:p text:style-name="P18"><text:span text:style-name="T15">Regra: sempre que uma informação não for necessária externamente, declare como privada;</text:span></text:p>
            </text:list-item>
            <text:list-item>
              <text:p text:style-name="P18"><text:span text:style-name="T15">Exemplo: método 'fechamento de caixa' pode ser privado — o resultado é passado por mensagem, mas o processo interno fica oculto;</text:span></text:p>
            </text:list-item>
            <text:list-item>
              <text:p text:style-name="P18"><text:span text:style-name="T15">Encapsular = proteger + organizar + simplificar a interface entre classes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76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7" draw:text-style-name="P12" draw:layer="layout" svg:width="2.539cm" svg:height="1.079cm" svg:x="21.59cm" svg:y="13.208cm">
          <text:p text:style-name="P11"><text:span text:style-name="T10">13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3" presentation:class="page"/>
          <draw:frame draw:name="Notes Placeholder 2" presentation:style-name="pr1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4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8" draw:text-style-name="P4" draw:layer="layout" svg:width="22.351cm" svg:height="1.777cm" svg:x="1.524cm" svg:y="0.762cm">
          <text:p text:style-name="P3"><text:span text:style-name="T18">Dinâmica 2 — O que é Público? O que é Privado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1" draw:text-style-name="P15" draw:layer="layout" svg:width="22.351cm" svg:height="9.143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9" draw:text-style-name="P21" draw:layer="layout" svg:width="22.2cm" svg:height="9.191cm" svg:x="1.675cm" svg:y="3cm">
          <text:list text:style-name="L10">
            <text:list-item>
              <text:p text:style-name="P20"><text:span text:style-name="T15">Em duplas, considerem a classe '</text:span><text:span text:style-name="T20">ContaBancaria</text:span><text:span text:style-name="T15">' com os seguintes membros:</text:span></text:p>
              <text:list>
                <text:list-item>
                  <text:p text:style-name="P20"><text:span text:style-name="T15">Atributos: </text:span><text:span text:style-name="T21">saldo</text:span><text:span text:style-name="T15">, </text:span><text:span text:style-name="T21">titular</text:span><text:span text:style-name="T15">, </text:span><text:span text:style-name="T21">senha</text:span><text:span text:style-name="T15">, </text:span><text:span text:style-name="T21">historicoTransacoes</text:span><text:span text:style-name="T15">, </text:span><text:span text:style-name="T21">limiteCredito</text:span><text:span text:style-name="T15">;</text:span></text:p>
                </text:list-item>
                <text:list-item>
                  <text:p text:style-name="P20"><text:span text:style-name="T15">Métodos: </text:span><text:span text:style-name="T21">depositar()</text:span><text:span text:style-name="T15">, </text:span><text:span text:style-name="T21">sacar()</text:span><text:span text:style-name="T15">, </text:span><text:span text:style-name="T21">consultarSaldo()</text:span><text:span text:style-name="T15">, </text:span><text:span text:style-name="T21">validarSenha()</text:span><text:span text:style-name="T15">, </text:span><text:span text:style-name="T21">calcularJuros()</text:span><text:span text:style-name="T15">;</text:span></text:p>
                </text:list-item>
                <text:list-item>
                  <text:p text:style-name="P20"><text:span text:style-name="T15">Classifiquem cada atributo e método como </text:span><text:span text:style-name="T17">PÚBLICO</text:span><text:span text:style-name="T15"> ou </text:span><text:span text:style-name="T17">PRIVADO</text:span><text:span text:style-name="T15">. Justifiquem;</text:span></text:p>
                </text:list-item>
                <text:list-item>
                  <text:p text:style-name="P20"><text:span text:style-name="T15">Pergunta extra: o que poderia acontecer se 'saldo' fosse público?</text:span></text:p>
                </text:list-item>
              </text:list>
            </text:list-item>
            <text:list-item>
              <text:p text:style-name="P20"><text:span text:style-name="T15">Tempo: 5 minutos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80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1" draw:text-style-name="P12" draw:layer="layout" svg:width="2.539cm" svg:height="1.079cm" svg:x="21.59cm" svg:y="13.208cm">
          <text:p text:style-name="P11"><text:span text:style-name="T10">14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4" presentation:class="page"/>
          <draw:frame draw:name="Notes Placeholder 2" presentation:style-name="pr1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5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2" draw:text-style-name="P4" draw:layer="layout" svg:width="22.351cm" svg:height="1.777cm" svg:x="1.524cm" svg:y="0.762cm">
          <text:p text:style-name="P3"><text:span text:style-name="T19">Respostas possíveis — Dinâmica 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3" draw:text-style-name="P23" draw:layer="layout" svg:width="21.335cm" svg:height="9.651cm" svg:x="2.032cm" svg:y="2.548cm">
          <text:list text:style-name="L10">
            <text:list-item>
              <text:p text:style-name="P22"><text:span text:style-name="T15">Público: </text:span><text:span text:style-name="T21">depositar()</text:span><text:span text:style-name="T15">, </text:span><text:span text:style-name="T21">sacar()</text:span><text:span text:style-name="T15">, </text:span><text:span text:style-name="T21">consultarSaldo()</text:span><text:span text:style-name="T15"> — são as ações que outros objetos precisam acessar;</text:span></text:p>
            </text:list-item>
            <text:list-item>
              <text:p text:style-name="P22"><text:span text:style-name="T15">Privado: </text:span><text:span text:style-name="T21">saldo</text:span><text:span text:style-name="T15">, </text:span><text:span text:style-name="T21">senha</text:span><text:span text:style-name="T15">, </text:span><text:span text:style-name="T21">historicoTransacoes</text:span><text:span text:style-name="T15">, </text:span><text:span text:style-name="T21">validarSenha()</text:span><text:span text:style-name="T15">, </text:span><text:span text:style-name="T21">calcularJuros()</text:span><text:span text:style-name="T15"> — detalhes internos sensíveis;</text:span></text:p>
            </text:list-item>
            <text:list-item>
              <text:p text:style-name="P22"><text:span text:style-name="T21">limiteCredito</text:span><text:span text:style-name="T15">: pode ser privado com acesso via método público </text:span><text:span text:style-name="T21">getLimite()</text:span><text:span text:style-name="T15"> (padrão </text:span><text:span text:style-name="T23">getter</text:span><text:span text:style-name="T15">);</text:span></text:p>
            </text:list-item>
            <text:list-item>
              <text:p text:style-name="P22"><text:span text:style-name="T21">titular</text:span><text:span text:style-name="T15">: pode ser público (leitura) mas protegido contra alteração externa;</text:span></text:p>
            </text:list-item>
            <text:list-item>
              <text:p text:style-name="P22"><text:span text:style-name="T15">Se '</text:span><text:span text:style-name="T21">saldo</text:span><text:span text:style-name="T15">' fosse público: qualquer classe poderia alterar o valor diretamente, sem passar por </text:span><text:span text:style-name="T21">sacar()</text:span><text:span text:style-name="T15"> ou </text:span><text:span text:style-name="T21">depositar()</text:span><text:span text:style-name="T15">, quebrando regras de negócio e gerando inconsistência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84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5" draw:text-style-name="P12" draw:layer="layout" svg:width="2.539cm" svg:height="1.079cm" svg:x="21.59cm" svg:y="13.208cm">
          <text:p text:style-name="P11"><text:span text:style-name="T10">15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5" presentation:class="page"/>
          <draw:frame draw:name="Notes Placeholder 2" presentation:style-name="pr1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6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E4775A66.png" xlink:type="simple" xlink:show="embed" xlink:actuate="onLoad" draw:mime-type="image/png">
            <text:p/>
          </draw:image>
          <svg:desc>preencoded.png</svg:desc>
        </draw:frame>
        <draw:custom-shape draw:name="Text 2" draw:style-name="gr86" draw:text-style-name="P4" draw:layer="layout" svg:width="18.287cm" svg:height="1.777cm" svg:x="5.08cm" svg:y="4.064cm">
          <text:p text:style-name="P3"><text:span text:style-name="T11">3.4 Heranç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7" draw:text-style-name="P4" draw:layer="layout" svg:width="18.287cm" svg:height="1.523cm" svg:x="5.08cm" svg:y="6.096cm">
          <text:p text:style-name="P3"><text:span text:style-name="T12">Reutilizar características de classes existen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88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9" draw:text-style-name="P12" draw:layer="layout" svg:width="2.539cm" svg:height="1.079cm" svg:x="21.59cm" svg:y="13.208cm">
          <text:p text:style-name="P11"><text:span text:style-name="T10">16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6" presentation:class="page"/>
          <draw:frame draw:name="Notes Placeholder 2" presentation:style-name="pr1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7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0" draw:text-style-name="P4" draw:layer="layout" svg:width="22.351cm" svg:height="2.031cm" svg:x="1.524cm" svg:y="0.127cm">
          <text:p text:style-name="P3"><text:span text:style-name="T13">O que é Herança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1" draw:text-style-name="P19" draw:layer="layout" svg:width="21.335cm" svg:height="9.651cm" svg:x="2.032cm" svg:y="3.048cm">
          <text:list text:style-name="L10">
            <text:list-item>
              <text:p text:style-name="P18"><text:span text:style-name="T15">Característica mais marcante para agilidade no desenvolvimento e reaproveitamento de código;</text:span></text:p>
            </text:list-item>
            <text:list-item>
              <text:p text:style-name="P18"><text:span text:style-name="T15">Permite usar características de uma classe existente para criar novas classes semelhantes;</text:span></text:p>
            </text:list-item>
            <text:list-item>
              <text:p text:style-name="P18"><text:span text:style-name="T15">Classe base (superclasse/classe pai): fornece as características que serão herdadas;</text:span></text:p>
            </text:list-item>
            <text:list-item>
              <text:p text:style-name="P18"><text:span text:style-name="T15">Classe derivada (subclasse/classe filha): recebe tudo da base e pode acrescentar novidades;</text:span></text:p>
            </text:list-item>
            <text:list-item>
              <text:p text:style-name="P18"><text:span text:style-name="T15">Resultado: melhor estruturação, menos duplicação, manutenção facilitada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92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3" draw:text-style-name="P12" draw:layer="layout" svg:width="2.539cm" svg:height="1.079cm" svg:x="21.59cm" svg:y="13.208cm">
          <text:p text:style-name="P11"><text:span text:style-name="T10">17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7" presentation:class="page"/>
          <draw:frame draw:name="Notes Placeholder 2" presentation:style-name="pr1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8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4" draw:text-style-name="P4" draw:layer="layout" svg:width="22.351cm" svg:height="2.031cm" svg:x="1.524cm" svg:y="0.127cm">
          <text:p text:style-name="P3"><text:span text:style-name="T13">Herança na prática: Pessoa → Cliente / Funcionár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5" draw:text-style-name="P21" draw:layer="layout" svg:width="23cm" svg:height="9.651cm" svg:x="1.2cm" svg:y="2.848cm">
          <text:list text:style-name="L10">
            <text:list-item>
              <text:p text:style-name="P20"><text:span text:style-name="T15">Classe base '</text:span><text:span text:style-name="T20">Pessoa</text:span><text:span text:style-name="T15">': atributos </text:span><text:span text:style-name="T21">nome</text:span><text:span text:style-name="T15">, </text:span><text:span text:style-name="T21">RG</text:span><text:span text:style-name="T15">, </text:span><text:span text:style-name="T21">CPF</text:span><text:span text:style-name="T15">, </text:span><text:span text:style-name="T21">endereço</text:span><text:span text:style-name="T15"> — comuns a todos;</text:span></text:p>
            </text:list-item>
            <text:list-item>
              <text:p text:style-name="P20"><text:span text:style-name="T15">Classe derivada '</text:span><text:span text:style-name="T20">Cliente</text:span><text:span text:style-name="T15">': herda tudo de </text:span><text:span text:style-name="T20">Pessoa</text:span><text:span text:style-name="T15"> + adiciona </text:span><text:span text:style-name="T21">dataCadastro</text:span><text:span text:style-name="T15">, preferencias;</text:span></text:p>
            </text:list-item>
            <text:list-item>
              <text:p text:style-name="P20"><text:span text:style-name="T15">Classe derivada '</text:span><text:span text:style-name="T20">Funcionário</text:span><text:span text:style-name="T15">': herda tudo de </text:span><text:span text:style-name="T20">Pessoa</text:span><text:span text:style-name="T15"> + adiciona </text:span><text:span text:style-name="T21">PIS</text:span><text:span text:style-name="T15">, </text:span><text:span text:style-name="T21">cargo</text:span><text:span text:style-name="T15">, </text:span><text:span text:style-name="T21">salario</text:span><text:span text:style-name="T15">;</text:span></text:p>
            </text:list-item>
            <text:list-item>
              <text:p text:style-name="P20"><text:span text:style-name="T15">Sem herança: teríamos que reescrever </text:span><text:span text:style-name="T21">nome</text:span><text:span text:style-name="T15">, </text:span><text:span text:style-name="T21">RG</text:span><text:span text:style-name="T15">, </text:span><text:span text:style-name="T21">CPF</text:span><text:span text:style-name="T15"> e endereço em cada classe separadamente;</text:span></text:p>
            </text:list-item>
            <text:list-item>
              <text:p text:style-name="P20"><text:span text:style-name="T15">Com herança: alterou algo na classe </text:span><text:span text:style-name="T20">Pessoa</text:span><text:span text:style-name="T15"> → todas as derivadas refletem automaticamente;</text:span></text:p>
            </text:list-item>
            <text:list-item>
              <text:p text:style-name="P20"><text:span text:style-name="T15">Favorece reutilização de código já existente e aumenta produtividade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96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7" draw:text-style-name="P12" draw:layer="layout" svg:width="2.539cm" svg:height="1.079cm" svg:x="21.59cm" svg:y="13.208cm">
          <text:p text:style-name="P11"><text:span text:style-name="T10">18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8" presentation:class="page"/>
          <draw:frame draw:name="Notes Placeholder 2" presentation:style-name="pr1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9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8" draw:text-style-name="P4" draw:layer="layout" svg:width="22.351cm" svg:height="1.777cm" svg:x="1.524cm" svg:y="0.762cm">
          <text:p text:style-name="P3"><text:span text:style-name="T18">Dinâmica 3 — Construindo Hierarquias de Heranç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1" draw:text-style-name="P15" draw:layer="layout" svg:width="22.351cm" svg:height="9.143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9" draw:text-style-name="P21" draw:layer="layout" svg:width="22.2cm" svg:height="8.127cm" svg:x="1.675cm" svg:y="2.556cm">
          <text:list text:style-name="L10">
            <text:list-item>
              <text:p text:style-name="P20"><text:span text:style-name="T15">Em duplas, criem uma hierarquia de herança para um </text:span><text:span text:style-name="T17">SISTEMA DE </text:span><text:span text:style-name="T25">STREAMING</text:span><text:span text:style-name="T17"> DE VÍDEO</text:span><text:span text:style-name="T15">:</text:span></text:p>
              <text:list>
                <text:list-item>
                  <text:p text:style-name="P20"><text:span text:style-name="T15">Definam 1 classe base com pelo menos 4 atributos comuns;</text:span></text:p>
                </text:list-item>
                <text:list-item>
                  <text:p text:style-name="P20"><text:span text:style-name="T15">Criem 3 classes derivadas que herdem da base e adicionem atributos/métodos próprios;</text:span></text:p>
                </text:list-item>
                <text:list-item>
                  <text:p text:style-name="P20"><text:span text:style-name="T15">Exemplo de partida: Classe base 'Conteudo' → Derivadas: ?</text:span></text:p>
                </text:list-item>
                <text:list-item>
                  <text:p text:style-name="P20"><text:span text:style-name="T15">Desenhem a hierarquia no papel mostrando o que cada classe herda e o que adiciona.</text:span></text:p>
                </text:list-item>
              </text:list>
            </text:list-item>
            <text:list-item>
              <text:p text:style-name="P20"><text:span text:style-name="T15">Tempo: 7 minutos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100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1" draw:text-style-name="P12" draw:layer="layout" svg:width="2.539cm" svg:height="1.079cm" svg:x="21.59cm" svg:y="13.208cm">
          <text:p text:style-name="P11"><text:span text:style-name="T10">19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9" presentation:class="page"/>
          <draw:frame draw:name="Notes Placeholder 2" presentation:style-name="pr2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0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2" draw:text-style-name="P4" draw:layer="layout" svg:width="22.351cm" svg:height="1.777cm" svg:x="1.524cm" svg:y="0.762cm">
          <text:p text:style-name="P3"><text:span text:style-name="T19">Exemplo de resposta — Dinâmica 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3" draw:text-style-name="P25" draw:layer="layout" svg:width="21.335cm" svg:height="9.651cm" svg:x="2.032cm" svg:y="3.048cm">
          <text:list text:style-name="L10">
            <text:list-item>
              <text:p text:style-name="P24"><text:span text:style-name="T15">Classe base '</text:span><text:span text:style-name="T20">Conteudo</text:span><text:span text:style-name="T15">': </text:span><text:span text:style-name="T21">titulo</text:span><text:span text:style-name="T15">, </text:span><text:span text:style-name="T21">duracao</text:span><text:span text:style-name="T15">, </text:span><text:span text:style-name="T21">genero</text:span><text:span text:style-name="T15">, </text:span><text:span text:style-name="T21">classificacaoEtaria</text:span><text:span text:style-name="T15">. Método: </text:span><text:span text:style-name="T21">reproduzir()</text:span><text:span text:style-name="T15">;</text:span></text:p>
            </text:list-item>
            <text:list-item>
              <text:p text:style-name="P24"><text:span text:style-name="T15">Derivada '</text:span><text:span text:style-name="T20">Filme</text:span><text:span text:style-name="T15">': herda tudo + </text:span><text:span text:style-name="T21">diretor</text:span><text:span text:style-name="T15">, </text:span><text:span text:style-name="T21">elenco</text:span><text:span text:style-name="T15">. Método: </text:span><text:span text:style-name="T21">exibirCreditos()</text:span><text:span text:style-name="T15">;</text:span></text:p>
            </text:list-item>
            <text:list-item>
              <text:p text:style-name="P24"><text:span text:style-name="T15">Derivada '</text:span><text:span text:style-name="T20">Serie</text:span><text:span text:style-name="T15">': herda tudo + </text:span><text:span text:style-name="T21">temporada</text:span><text:span text:style-name="T15">, </text:span><text:span text:style-name="T21">episodio</text:span><text:span text:style-name="T15">. Método: </text:span><text:span text:style-name="T21">proximoEpisodio()</text:span><text:span text:style-name="T15">;</text:span></text:p>
            </text:list-item>
            <text:list-item>
              <text:p text:style-name="P24"><text:span text:style-name="T15">Derivada '</text:span><text:span text:style-name="T20">Documentario</text:span><text:span text:style-name="T15">': herda tudo + </text:span><text:span text:style-name="T21">tema</text:span><text:span text:style-name="T15">, </text:span><text:span text:style-name="T21">fontes</text:span><text:span text:style-name="T15">. Método: </text:span><text:span text:style-name="T21">exibirBibliografia()</text:span><text:span text:style-name="T15">;</text:span></text:p>
            </text:list-item>
            <text:list-item>
              <text:p text:style-name="P24"><text:span text:style-name="T15">Vantagem: se adicionar '</text:span><text:span text:style-name="T21">idioma</text:span><text:span text:style-name="T15">' em </text:span><text:span text:style-name="T20">Conteudo</text:span><text:span text:style-name="T15">, todas as 3 derivadas ganham automaticamente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104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5" draw:text-style-name="P12" draw:layer="layout" svg:width="2.539cm" svg:height="1.079cm" svg:x="21.59cm" svg:y="13.208cm">
          <text:p text:style-name="P11"><text:span text:style-name="T10">20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0" presentation:class="page"/>
          <draw:frame draw:name="Notes Placeholder 2" presentation:style-name="pr2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1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296E7B25.png" xlink:type="simple" xlink:show="embed" xlink:actuate="onLoad" draw:mime-type="image/png">
            <text:p/>
          </draw:image>
          <svg:desc>preencoded.png</svg:desc>
        </draw:frame>
        <draw:custom-shape draw:name="Text 2" draw:style-name="gr106" draw:text-style-name="P4" draw:layer="layout" svg:width="18.287cm" svg:height="1.777cm" svg:x="5.08cm" svg:y="4.064cm">
          <text:p text:style-name="P3"><text:span text:style-name="T11">3.5 Polimorfism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7" draw:text-style-name="P4" draw:layer="layout" svg:width="18.287cm" svg:height="1.523cm" svg:x="5.08cm" svg:y="6.096cm">
          <text:p text:style-name="P3"><text:span text:style-name="T12">Mesmo nome, comportamentos diferentes conforme o contex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108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9" draw:text-style-name="P12" draw:layer="layout" svg:width="2.539cm" svg:height="1.079cm" svg:x="21.59cm" svg:y="13.208cm">
          <text:p text:style-name="P11"><text:span text:style-name="T10">21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1" presentation:class="page"/>
          <draw:frame draw:name="Notes Placeholder 2" presentation:style-name="pr2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2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0" draw:text-style-name="P4" draw:layer="layout" svg:width="22.351cm" svg:height="2.031cm" svg:x="1.524cm" svg:y="0.127cm">
          <text:p text:style-name="P3"><text:span text:style-name="T13">O que é Polimorfismo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11" draw:text-style-name="P21" draw:layer="layout" svg:width="21.335cm" svg:height="9.651cm" svg:x="2.032cm" svg:y="2.348cm">
          <text:list text:style-name="L10">
            <text:list-item>
              <text:p text:style-name="P20"><text:span text:style-name="T15">Do grego: '</text:span><text:span text:style-name="T26">que pode ter várias formas</text:span><text:span text:style-name="T15">'. Um método pode adotar formas diferentes conforme o contexto.</text:span></text:p>
            </text:list-item>
            <text:list-item>
              <text:p text:style-name="P20"><text:span text:style-name="T15">Não é o objeto que muda — são as ações que diferem quando mudamos a forma de nos referir a ele;</text:span></text:p>
            </text:list-item>
            <text:list-item>
              <text:p text:style-name="P20"><text:span text:style-name="T15">Depende de fatores como: quantidade de parâmetros, tipo de parâmetros, classe que implementa;</text:span></text:p>
            </text:list-item>
            <text:list-item>
              <text:p text:style-name="P20"><text:span text:style-name="T15">Classes derivadas podem ter métodos com o mesmo nome da base, mas com comportamento particular;</text:span></text:p>
            </text:list-item>
            <text:list-item>
              <text:p text:style-name="P20"><text:span text:style-name="T15">É uma forma de controlar, de maneira generalista, os métodos na classe base com particularidades nas derivadas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112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13" draw:text-style-name="P12" draw:layer="layout" svg:width="2.539cm" svg:height="1.079cm" svg:x="21.59cm" svg:y="13.208cm">
          <text:p text:style-name="P11"><text:span text:style-name="T10">22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2" presentation:class="page"/>
          <draw:frame draw:name="Notes Placeholder 2" presentation:style-name="pr2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3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4" draw:text-style-name="P4" draw:layer="layout" svg:width="22.351cm" svg:height="2.031cm" svg:x="1.524cm" svg:y="0.127cm">
          <text:p text:style-name="P3"><text:span text:style-name="T13">Polimorfismo na prática: bônus por carg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15" draw:text-style-name="P19" draw:layer="layout" svg:width="21.335cm" svg:height="9.651cm" svg:x="2.032cm" svg:y="3.048cm">
          <text:list text:style-name="L10">
            <text:list-item>
              <text:p text:style-name="P18"><text:span text:style-name="T15">Classe base '</text:span><text:span text:style-name="T20">Funcionario</text:span><text:span text:style-name="T15">': método </text:span><text:span text:style-name="T21">bonusAnual()</text:span><text:span text:style-name="T15"> — definido genericamente;</text:span></text:p>
            </text:list-item>
            <text:list-item>
              <text:p text:style-name="P18"><text:span text:style-name="T15">Derivada '</text:span><text:span text:style-name="T20">Coordenador</text:span><text:span text:style-name="T15">': </text:span><text:span text:style-name="T21">bonusAnual()</text:span><text:span text:style-name="T15"> retorna salário × 7%;</text:span></text:p>
            </text:list-item>
            <text:list-item>
              <text:p text:style-name="P18"><text:span text:style-name="T15">Derivada '</text:span><text:span text:style-name="T20">Gerente</text:span><text:span text:style-name="T15">': </text:span><text:span text:style-name="T21">bonusAnual()</text:span><text:span text:style-name="T15"> retorna salário × 10%;</text:span></text:p>
            </text:list-item>
            <text:list-item>
              <text:p text:style-name="P18"><text:span text:style-name="T15">Derivada '</text:span><text:span text:style-name="T20">Diretor</text:span><text:span text:style-name="T15">': </text:span><text:span text:style-name="T21">bonusAnual()</text:span><text:span text:style-name="T15"> retorna salário × 12%;</text:span></text:p>
            </text:list-item>
            <text:list-item>
              <text:p text:style-name="P18"><text:span text:style-name="T15">Mesmo nome de método, mas cada classe executa de forma diferente — isso é polimorfismo;</text:span></text:p>
            </text:list-item>
            <text:list-item>
              <text:p text:style-name="P18"><text:span text:style-name="T15">Também pode ocorrer na mesma classe: métodos com mesmo nome mas parâmetros diferentes (sobrecarga)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116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17" draw:text-style-name="P12" draw:layer="layout" svg:width="2.539cm" svg:height="1.079cm" svg:x="21.59cm" svg:y="13.208cm">
          <text:p text:style-name="P11"><text:span text:style-name="T10">23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3" presentation:class="page"/>
          <draw:frame draw:name="Notes Placeholder 2" presentation:style-name="pr2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4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8" draw:text-style-name="P4" draw:layer="layout" svg:width="22.351cm" svg:height="1.777cm" svg:x="1.524cm" svg:y="0.762cm">
          <text:p text:style-name="P3"><text:span text:style-name="T18">Dinâmica 4 — Identificando Polimorfism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1" draw:text-style-name="P15" draw:layer="layout" svg:width="22.351cm" svg:height="9.143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9" draw:text-style-name="P19" draw:layer="layout" svg:width="20.319cm" svg:height="8.127cm" svg:x="2.54cm" svg:y="3.256cm">
          <text:list text:style-name="L10">
            <text:list-item>
              <text:p text:style-name="P18"><text:span text:style-name="T15">Individualmente, considere o cenário: sistema de transporte com veículos;</text:span></text:p>
            </text:list-item>
            <text:list-item>
              <text:p text:style-name="P18"><text:span text:style-name="T15">Classe base '</text:span><text:span text:style-name="T20">Veiculo</text:span><text:span text:style-name="T15">' com método </text:span><text:span text:style-name="T21">calcularTarifa()</text:span><text:span text:style-name="T15">;</text:span></text:p>
            </text:list-item>
            <text:list-item>
              <text:p text:style-name="P18"><text:span text:style-name="T15">Classes derivadas: </text:span><text:span text:style-name="T20">Onibus</text:span><text:span text:style-name="T15">, </text:span><text:span text:style-name="T20">Taxi</text:span><text:span text:style-name="T15">, </text:span><text:span text:style-name="T20">Mototaxi</text:span><text:span text:style-name="T15">;</text:span></text:p>
            </text:list-item>
            <text:list-item>
              <text:p text:style-name="P18"><text:span text:style-name="T15">Defina como </text:span><text:span text:style-name="T21">calcularTarifa()</text:span><text:span text:style-name="T15"> seria </text:span><text:span text:style-name="T17">DIFERENTE</text:span><text:span text:style-name="T15"> em cada classe derivada;</text:span></text:p>
            </text:list-item>
            <text:list-item>
              <text:p text:style-name="P18"><text:span text:style-name="T15">Bônus: crie um exemplo de sobrecarga — mesmo método, parâmetros diferentes na mesma classe;</text:span></text:p>
            </text:list-item>
            <text:list-item>
              <text:p text:style-name="P18"><text:span text:style-name="T15">Tempo: 5 minutos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120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1" draw:text-style-name="P12" draw:layer="layout" svg:width="2.539cm" svg:height="1.079cm" svg:x="21.59cm" svg:y="13.208cm">
          <text:p text:style-name="P11"><text:span text:style-name="T10">24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4" presentation:class="page"/>
          <draw:frame draw:name="Notes Placeholder 2" presentation:style-name="pr2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5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2" draw:text-style-name="P4" draw:layer="layout" svg:width="22.351cm" svg:height="1.777cm" svg:x="1.524cm" svg:y="0.762cm">
          <text:p text:style-name="P3"><text:span text:style-name="T19">Respostas possíveis — Dinâmica 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3" draw:text-style-name="P25" draw:layer="layout" svg:width="21.335cm" svg:height="9.651cm" svg:x="2.032cm" svg:y="3.048cm">
          <text:list text:style-name="L10">
            <text:list-item>
              <text:p text:style-name="P24"><text:span text:style-name="T15">Onibus: </text:span><text:span text:style-name="T21">calcularTarifa()</text:span><text:span text:style-name="T15"> → retorna valor fixo (R$ 4,50), independente da distância;</text:span></text:p>
            </text:list-item>
            <text:list-item>
              <text:p text:style-name="P24"><text:span text:style-name="T20">Taxi</text:span><text:span text:style-name="T15">: </text:span><text:span text:style-name="T21">calcularTarifa()</text:span><text:span text:style-name="T15"> → </text:span><text:span text:style-name="T21">bandeirada + (km × valorPorKm) + tempoParado</text:span><text:span text:style-name="T15">;</text:span></text:p>
            </text:list-item>
            <text:list-item>
              <text:p text:style-name="P24"><text:span text:style-name="T20">Mototaxi</text:span><text:span text:style-name="T15">: </text:span><text:span text:style-name="T21">calcularTarifa()</text:span><text:span text:style-name="T15"> → </text:span><text:span text:style-name="T21">distância × valorPorKm</text:span><text:span text:style-name="T15"> (sem bandeirada, tarifa mais simples);</text:span></text:p>
            </text:list-item>
            <text:list-item>
              <text:p text:style-name="P24"><text:span text:style-name="T20">Sobrecarga</text:span><text:span text:style-name="T15">: </text:span><text:span text:style-name="T21">calcularTarifa()</text:span><text:span text:style-name="T15"> </text:span><text:span text:style-name="T27">vs</text:span><text:span text:style-name="T15">. </text:span><text:span text:style-name="T21">calcularTarifa(desconto)</text:span><text:span text:style-name="T15"> — com 1 parâmetro, aplica percentual de desconto;</text:span></text:p>
            </text:list-item>
            <text:list-item>
              <text:p text:style-name="P24"><text:span text:style-name="T15">Mesmo método '</text:span><text:span text:style-name="T21">calcularTarifa</text:span><text:span text:style-name="T15">', 3 comportamentos totalmente diferentes = polimorfismo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124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5" draw:text-style-name="P12" draw:layer="layout" svg:width="2.539cm" svg:height="1.079cm" svg:x="21.59cm" svg:y="13.208cm">
          <text:p text:style-name="P11"><text:span text:style-name="T10">25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5" presentation:class="page"/>
          <draw:frame draw:name="Notes Placeholder 2" presentation:style-name="pr2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6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6" draw:text-style-name="P4" draw:layer="layout" svg:width="22.351cm" svg:height="1.777cm" svg:x="1.524cm" svg:y="0.762cm">
          <text:p text:style-name="P3"><text:span text:style-name="T18">Dinâmica 5 — Integradora: Os 4 Princípios Jun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1" draw:text-style-name="P15" draw:layer="layout" svg:width="22.351cm" svg:height="9.143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7" draw:text-style-name="P19" draw:layer="layout" svg:width="20.76cm" svg:height="8.127cm" svg:x="2.24cm" svg:y="3.056cm">
          <text:list text:style-name="L10">
            <text:list-item>
              <text:p text:style-name="P18"><text:span text:style-name="T15">Em grupos de 4, projetem um mini-sistema para uma LOCADORA DE VEÍCULOS.</text:span></text:p>
            </text:list-item>
            <text:list-item>
              <text:p text:style-name="P18"><text:span text:style-name="T15">Apliquem os 4 princípios e identifiquem para cada um:</text:span></text:p>
              <text:list>
                <text:list-item>
                  <text:p text:style-name="P18"><text:span text:style-name="T17">ABSTRAÇÃO</text:span><text:span text:style-name="T15">: quais objetos, atributos e métodos são relevantes?</text:span></text:p>
                </text:list-item>
                <text:list-item>
                  <text:p text:style-name="P18"><text:span text:style-name="T17">ENCAPSULAMENTO</text:span><text:span text:style-name="T15">: o que deve ser público e o que deve ser privado?</text:span></text:p>
                </text:list-item>
                <text:list-item>
                  <text:p text:style-name="P18"><text:span text:style-name="T17">HERANÇA</text:span><text:span text:style-name="T15">: existe uma classe base que pode gerar derivadas?</text:span></text:p>
                </text:list-item>
                <text:list-item>
                  <text:p text:style-name="P18"><text:span text:style-name="T17">POLIMORFISMO</text:span><text:span text:style-name="T15">: algum método se comporta diferente conforme o tipo de veículo?</text:span></text:p>
                </text:list-item>
              </text:list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128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9" draw:text-style-name="P12" draw:layer="layout" svg:width="2.539cm" svg:height="1.079cm" svg:x="21.59cm" svg:y="13.208cm">
          <text:p text:style-name="P11"><text:span text:style-name="T10">26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6" presentation:class="page"/>
          <draw:frame draw:name="Notes Placeholder 2" presentation:style-name="pr2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7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30" draw:text-style-name="P4" draw:layer="layout" svg:width="22.351cm" svg:height="1.777cm" svg:x="1.524cm" svg:y="0.762cm">
          <text:p text:style-name="P3"><text:span text:style-name="T19">Exemplo de resposta — Dinâmica 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31" draw:text-style-name="P25" draw:layer="layout" svg:width="21.335cm" svg:height="9.651cm" svg:x="1.732cm" svg:y="2.748cm">
          <text:list text:style-name="L10">
            <text:list-item>
              <text:p text:style-name="P24"><text:span text:style-name="T17">ABSTRAÇÃO</text:span><text:span text:style-name="T15">: </text:span><text:span text:style-name="T20">Veiculo</text:span><text:span text:style-name="T15"> (</text:span><text:span text:style-name="T21">placa</text:span><text:span text:style-name="T15">, </text:span><text:span text:style-name="T21">modelo</text:span><text:span text:style-name="T15">, </text:span><text:span text:style-name="T21">diaria</text:span><text:span text:style-name="T15">), </text:span><text:span text:style-name="T20">Cliente</text:span><text:span text:style-name="T15"> (</text:span><text:span text:style-name="T21">nome</text:span><text:span text:style-name="T15">, </text:span><text:span text:style-name="T21">CNH</text:span><text:span text:style-name="T15">), </text:span><text:span text:style-name="T20">Locacao</text:span><text:span text:style-name="T15"> (</text:span><text:span text:style-name="T21">dataInicio</text:span><text:span text:style-name="T15">, </text:span><text:span text:style-name="T21">dataFim</text:span><text:span text:style-name="T15">, </text:span><text:span text:style-name="T21">calcularTotal()</text:span><text:span text:style-name="T15">).</text:span></text:p>
            </text:list-item>
            <text:list-item>
              <text:p text:style-name="P24"><text:span text:style-name="T17">ENCAPSULAMENTO</text:span><text:span text:style-name="T15">: '</text:span><text:span text:style-name="T27">saldo do caixa</text:span><text:span text:style-name="T15">' é privado; '</text:span><text:span text:style-name="T21">consultarDisponibilidade()</text:span><text:span text:style-name="T15">' é público.</text:span></text:p>
            </text:list-item>
            <text:list-item>
              <text:p text:style-name="P24"><text:span text:style-name="T17">HERANÇA</text:span><text:span text:style-name="T15">: </text:span><text:span text:style-name="T20">Veiculo</text:span><text:span text:style-name="T15"> → </text:span><text:span text:style-name="T20">Carro</text:span><text:span text:style-name="T15"> (</text:span><text:span text:style-name="T21">arCondicionado</text:span><text:span text:style-name="T15">), </text:span><text:span text:style-name="T20">Moto</text:span><text:span text:style-name="T15"> (</text:span><text:span text:style-name="T21">cilindrada</text:span><text:span text:style-name="T15">), </text:span><text:span text:style-name="T20">Van</text:span><text:span text:style-name="T15"> (</text:span><text:span text:style-name="T21">capacidadePassageiros</text:span><text:span text:style-name="T15">).</text:span></text:p>
            </text:list-item>
            <text:list-item>
              <text:p text:style-name="P24"><text:span text:style-name="T17">POLIMORFISMO</text:span><text:span text:style-name="T15">: </text:span><text:span text:style-name="T21">calcularDiaria()</text:span><text:span text:style-name="T15"> → </text:span><text:span text:style-name="T20">Carro</text:span><text:span text:style-name="T15">: R$120; </text:span><text:span text:style-name="T20">Moto</text:span><text:span text:style-name="T15">: R$60; </text:span><text:span text:style-name="T20">Van</text:span><text:span text:style-name="T15">: R$200 — mesmo método, valores diferentes.</text:span></text:p>
            </text:list-item>
            <text:list-item>
              <text:p text:style-name="P24"><text:span text:style-name="T15">Os 4 princípios trabalham juntos para um sistema organizado, seguro e reutilizável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132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33" draw:text-style-name="P12" draw:layer="layout" svg:width="2.539cm" svg:height="1.079cm" svg:x="21.59cm" svg:y="13.208cm">
          <text:p text:style-name="P11"><text:span text:style-name="T10">27 / 2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7" presentation:class="page"/>
          <draw:frame draw:name="Notes Placeholder 2" presentation:style-name="pr2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8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31" draw:text-style-name="P15" draw:layer="layout" svg:width="21.335cm" svg:height="3.301cm" svg:x="2.032cm" svg:y="1.01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0.151cm" svg:height="3.301cm" svg:x="2.032cm" svg:y="1.01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4" draw:text-style-name="P27" draw:layer="layout" svg:width="19.557cm" svg:height="2.793cm" svg:x="3.048cm" svg:y="1.27cm">
          <text:p text:style-name="P26"><text:span text:style-name="T28">"Os quatro princípios — abstração, encapsulamento, herança e polimorfismo — garantem todas as vantagens da utilização do paradigma OO."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5" draw:text-style-name="P4" draw:layer="layout" svg:width="21.335cm" svg:height="1.269cm" svg:x="2.032cm" svg:y="5.08cm">
          <text:p text:style-name="P3"><text:span text:style-name="T29">Pontos-chave da aul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36" draw:text-style-name="P29" draw:layer="layout" svg:width="21.335cm" svg:height="5.587cm" svg:x="2.032cm" svg:y="6.604cm">
          <text:list text:style-name="L10">
            <text:list-item>
              <text:p text:style-name="P28"><text:span text:style-name="T30">Abstração filtra o que é relevante do mundo real para o sistema;</text:span></text:p>
            </text:list-item>
            <text:list-item>
              <text:p text:style-name="P28"><text:span text:style-name="T30">Encapsulamento protege dados com visibilidade pública/privada;</text:span></text:p>
            </text:list-item>
            <text:list-item>
              <text:p text:style-name="P28"><text:span text:style-name="T30">Herança permite reutilização: classe base → classes derivadas;</text:span></text:p>
            </text:list-item>
            <text:list-item>
              <text:p text:style-name="P28"><text:span text:style-name="T30">Polimorfismo: mesmo método, comportamentos diferentes por contexto;</text:span></text:p>
            </text:list-item>
            <text:list-item>
              <text:p text:style-name="P28"><text:span text:style-name="T30">Os 4 princípios devem ser aplicados do início ao fim de todo projeto OO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6" draw:text-style-name="P5" draw:layer="layout" svg:width="25.399cm" svg:height="1.587cm" svg:x="0cm" svg:y="12.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37" draw:text-style-name="P4" draw:layer="layout" svg:width="12.699cm" svg:height="1.587cm" svg:x="2.032cm" svg:y="12.7cm">
          <text:p text:style-name="P3"><text:span text:style-name="T31">Obrigado! Até a próxima aul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8" draw:text-style-name="P12" draw:layer="layout" svg:width="10.159cm" svg:height="1.587cm" svg:x="13.97cm" svg:y="12.7cm">
          <text:p text:style-name="P11"><text:span text:style-name="T32">UNISA — Programação Orientada a Obje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8" presentation:class="page"/>
          <draw:frame draw:name="Notes Placeholder 2" presentation:style-name="pr2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M Mono Prop 10" svg:font-family="'LM Mono Prop 10'" style:font-pitch="variable"/>
    <style:font-face style:name="LM Roman Unslanted 10" svg:font-family="'LM Roman Unslanted 10'" style:font-pitch="variable"/>
    <style:font-face style:name="LM Sans Quot 8" svg:font-family="'LM Sans Quot 8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 Sans Mono" svg:font-family="'Ubuntu Sans Mono'" style:font-family-generic="swiss" style:font-pitch="fix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rogramação Orientada a Objetos — Aula 3</dc:title>
    <dc:subject>PptxGenJS Presentation</dc:subject>
    <meta:initial-creator>UNISA</meta:initial-creator>
    <meta:editing-cycles>18</meta:editing-cycles>
    <meta:creation-date>2026-03-10T18:00:30</meta:creation-date>
    <dc:date>2026-05-14T02:22:20.056001103</dc:date>
    <meta:editing-duration>PT44M7S</meta:editing-duration>
    <meta:generator>LibreOffice/25.8.1.1$Linux_X86_64 LibreOffice_project/54047653041915e595ad4e45cccea684809c77b5</meta:generator>
    <meta:document-statistic meta:object-count="341"/>
    <meta:user-defined meta:name="AppVersion">16.0000</meta:user-defined>
    <meta:user-defined meta:name="Company">PptxGenJS</meta:user-defined>
    <meta:user-defined meta:name="Notes" meta:value-type="float">28</meta:user-defined>
    <meta:user-defined meta:name="PresentationFormat">On-screen Show (16:9)</meta:user-defined>
    <meta:user-defined meta:name="Slides" meta:value-type="float">28</meta:user-defined>
  </office:meta>
</office:document-meta>
</file>